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●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❏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2847in"/>
    </style:style>
    <style:style style:name="TableColumn3" style:family="table-column">
      <style:table-column-properties style:column-width="4.3652in"/>
    </style:style>
    <style:style style:name="Table1" style:family="table" style:master-page-name="MP0">
      <style:table-properties style:width="6.6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104in solid #000000" fo:border-left="0in solid #FFFFFF" fo:border-bottom="0in solid #FFFFFF" fo:border-right="0in solid #FFFFFF" style:writing-mode="lr-tb" fo:padding-top="0.0381in" fo:padding-left="0.075in" fo:padding-bottom="0.0381in" fo:padding-right="0.075in"/>
    </style:style>
    <style:style style:name="P6" style:parent-style-name="Normal" style:family="paragraph">
      <style:paragraph-properties fo:break-before="page" fo:margin-bottom="0.0833in" fo:line-height="100%"/>
    </style:style>
    <style:style style:name="T29" style:parent-style-name="DefaultParagraphFont" style:family="text">
      <style:text-properties fo:color="#0F4761" fo:font-size="20pt" style:font-size-asian="20pt" style:font-size-complex="20pt"/>
    </style:style>
    <style:style style:name="TableRow30" style:family="table-row">
      <style:table-row-properties/>
    </style:style>
    <style:style style:name="TableCell31" style:family="table-cell">
      <style:table-cell-properties fo:border="0in solid #FFFFFF" style:writing-mode="lr-tb" fo:padding-top="0.0381in" fo:padding-left="0.075in" fo:padding-bottom="0.0381in" fo:padding-right="0.075in"/>
    </style:style>
    <style:style style:name="P32" style:parent-style-name="Normal" style:family="paragraph">
      <style:paragraph-properties fo:margin-bottom="0.0833in" fo:line-height="100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in solid #FFFFF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Aptos" fo:font-size="10pt" style:font-size-asian="10pt" style:font-size-complex="10pt"/>
    </style:style>
    <style:style style:name="TableCell39" style:family="table-cell">
      <style:table-cell-properties fo:border="0in solid #FFFFF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42" style:parent-style-name="DefaultParagraphFont" style:family="text">
      <style:text-properties style:font-name="Aptos" fo:font-size="10pt" style:font-size-asian="10pt" style:font-size-complex="10pt"/>
    </style:style>
    <style:style style:name="T43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style:font-name="Aptos" fo:font-size="10pt" style:font-size-asian="10pt" style:font-size-complex="10pt"/>
    </style:style>
    <style:style style:name="TableRow45" style:family="table-row">
      <style:table-row-properties/>
    </style:style>
    <style:style style:name="TableCell46" style:family="table-cell">
      <style:table-cell-properties fo:border="0in solid #FFFFF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49" style:parent-style-name="DefaultParagraphFont" style:family="text">
      <style:text-properties style:font-name="Aptos" fo:font-size="10pt" style:font-size-asian="10pt" style:font-size-complex="10pt"/>
    </style:style>
    <style:style style:name="TableCell50" style:family="table-cell">
      <style:table-cell-properties fo:border="0in solid #FFFFF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53" style:parent-style-name="DefaultParagraphFont" style:family="text">
      <style:text-properties style:font-name="Aptos" fo:font-size="10pt" style:font-size-asian="10pt" style:font-size-complex="10pt"/>
    </style:style>
    <style:style style:name="TableRow54" style:family="table-row">
      <style:table-row-properties/>
    </style:style>
    <style:style style:name="TableCell55" style:family="table-cell">
      <style:table-cell-properties fo:border-top="0in solid #FFFFFF" fo:border-left="0in solid #FFFFFF" fo:border-bottom="0.0104in solid #000000" fo:border-right="0in solid 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58" style:parent-style-name="DefaultParagraphFont" style:family="text">
      <style:text-properties style:font-name="Aptos" fo:font-size="10pt" style:font-size-asian="10pt" style:font-size-complex="10pt"/>
    </style:style>
    <style:style style:name="TableCell59" style:family="table-cell">
      <style:table-cell-properties fo:border-top="0in solid #FFFFFF" fo:border-left="0in solid #FFFFFF" fo:border-bottom="0.0104in solid #000000" fo:border-right="0in solid 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ptos" fo:font-weight="bold" style:font-weight-asian="bold" fo:font-size="10pt" style:font-size-asian="10pt" style:font-size-complex="10pt"/>
    </style:style>
    <style:style style:name="T62" style:parent-style-name="DefaultParagraphFont" style:family="text">
      <style:text-properties style:font-name="Aptos" fo:font-size="10pt" style:font-size-asian="10pt" style:font-size-complex="10pt"/>
    </style:style>
    <style:style style:name="P63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 fo:language="en"/>
    </style:style>
    <style:style style:name="P64" style:parent-style-name="Normal" style:family="paragraph">
      <style:paragraph-properties fo:text-align="justify" fo:margin-bottom="0in" fo:line-height="115%"/>
    </style:style>
    <style:style style:name="T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en"/>
    </style:style>
    <style:style style:name="P66" style:parent-style-name="Normal" style:family="paragraph">
      <style:paragraph-properties fo:text-align="justify" fo:margin-bottom="0in" fo:line-height="115%"/>
    </style:style>
    <style:style style:name="T6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en"/>
    </style:style>
    <style:style style:name="P70" style:parent-style-name="Heading2" style:family="paragraph">
      <style:paragraph-properties fo:text-align="justify" fo:margin-top="0.25in" fo:margin-bottom="0.0833in" fo:line-height="115%"/>
    </style:style>
    <style:style style:name="T71" style:parent-style-name="DefaultParagraphFont" style:family="text">
      <style:text-properties style:font-name="Arial" style:font-name-asian="Arial" style:font-name-complex="Arial" fo:language="en"/>
    </style:style>
    <style:style style:name="P72" style:parent-style-name="Normal" style:family="paragraph">
      <style:paragraph-properties fo:text-align="justify" fo:margin-bottom="0in" fo:line-height="115%"/>
    </style:style>
    <style:style style:name="T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5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96" style:parent-style-name="Normal" style:family="paragraph">
      <style:paragraph-properties fo:text-align="justify" fo:margin-bottom="0in" fo:line-height="115%"/>
    </style:style>
    <style:style style:name="T9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3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14" style:parent-style-name="Normal" style:family="paragraph">
      <style:paragraph-properties fo:text-align="justify" fo:margin-bottom="0in" fo:line-height="115%"/>
    </style:style>
    <style:style style:name="T1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9" style:parent-style-name="Heading2" style:family="paragraph">
      <style:paragraph-properties fo:text-align="justify" fo:margin-top="0.25in" fo:margin-bottom="0.0833in" fo:line-height="115%"/>
    </style:style>
    <style:style style:name="T120" style:parent-style-name="DefaultParagraphFont" style:family="text">
      <style:text-properties style:font-name="Arial" style:font-name-asian="Arial" style:font-name-complex="Arial" fo:language="en"/>
    </style:style>
    <style:style style:name="P121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22" style:parent-style-name="ListParagraph" style:list-style-name="LFO10" style:family="paragraph">
      <style:paragraph-properties fo:text-align="justify" fo:margin-bottom="0in" fo:line-height="115%"/>
      <style:text-properties style:font-name="Courier New" style:font-name-asian="Courier New" style:font-name-complex="Courier New" fo:font-size="11pt" style:font-size-asian="11pt" style:font-size-complex="11pt"/>
    </style:style>
    <style:style style:name="P123" style:parent-style-name="ListParagraph" style:list-style-name="LFO10" style:family="paragraph">
      <style:paragraph-properties fo:text-align="justify" fo:margin-bottom="0in" fo:line-height="115%"/>
      <style:text-properties style:font-name="Courier New" style:font-name-asian="Courier New" style:font-name-complex="Courier New" fo:font-size="11pt" style:font-size-asian="11pt" style:font-size-complex="11pt"/>
    </style:style>
    <style:style style:name="P124" style:parent-style-name="Normal" style:family="paragraph">
      <style:paragraph-properties fo:text-align="justify" fo:margin-bottom="0in" fo:line-height="115%"/>
    </style:style>
    <style:style style:name="T12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34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35" style:parent-style-name="Normal" style:family="paragraph">
      <style:paragraph-properties fo:text-align="justify" fo:margin-bottom="0in" fo:line-height="115%"/>
    </style:style>
    <style:style style:name="T1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4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41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2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3" style:parent-style-name="ListParagraph" style:list-style-name="LFO9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4" style:parent-style-name="ListParagraph" style:list-style-name="LFO9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5" style:parent-style-name="ListParagraph" style:list-style-name="LFO9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6" style:parent-style-name="ListParagraph" style:list-style-name="LFO9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7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48" style:parent-style-name="Heading3" style:family="paragraph">
      <style:paragraph-properties fo:text-align="justify" fo:margin-top="0.2222in" fo:line-height="115%"/>
    </style:style>
    <style:style style:name="T149" style:parent-style-name="DefaultParagraphFont" style:family="text">
      <style:text-properties style:font-name="Arial" style:font-name-asian="Arial" style:font-name-complex="Arial" fo:color="#434343" fo:language="en"/>
    </style:style>
    <style:style style:name="T1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en"/>
    </style:style>
    <style:style style:name="P151" style:parent-style-name="Normal" style:family="paragraph">
      <style:paragraph-properties fo:text-align="justify" fo:margin-bottom="0in" fo:line-height="115%"/>
    </style:style>
    <style:style style:name="T15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5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54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55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56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57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58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59" style:parent-style-name="ListParagraph" style:list-style-name="LFO7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60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61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62" style:parent-style-name="Heading2" style:family="paragraph">
      <style:paragraph-properties fo:text-align="justify" fo:margin-top="0.25in" fo:margin-bottom="0.0833in" fo:line-height="115%"/>
    </style:style>
    <style:style style:name="T163" style:parent-style-name="DefaultParagraphFont" style:family="text">
      <style:text-properties style:font-name="Arial" style:font-name-asian="Arial" style:font-name-complex="Arial" fo:language="en"/>
    </style:style>
    <style:style style:name="P164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65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66" style:parent-style-name="Normal" style:family="paragraph">
      <style:paragraph-properties fo:text-align="justify" fo:margin-bottom="0in" fo:line-height="115%"/>
    </style:style>
    <style:style style:name="T16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75" style:parent-style-name="ListParagraph" style:list-style-name="LFO2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76" style:parent-style-name="ListParagraph" style:list-style-name="LFO2" style:family="paragraph">
      <style:paragraph-properties fo:text-align="justify" fo:margin-bottom="0in" fo:line-height="115%"/>
    </style:style>
    <style:style style:name="T1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82" style:parent-style-name="ListParagraph" style:list-style-name="LFO2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83" style:parent-style-name="ListParagraph" style:list-style-name="LFO2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184" style:parent-style-name="Normal" style:family="paragraph">
      <style:paragraph-properties fo:text-align="justify" fo:margin-bottom="0in" fo:line-height="115%"/>
    </style:style>
    <style:style style:name="T18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196" style:family="table-column">
      <style:table-column-properties style:column-width="6.493in"/>
    </style:style>
    <style:style style:name="Table195" style:family="table">
      <style:table-properties style:width="6.493in" fo:margin-left="0in" table:align="left"/>
    </style:style>
    <style:style style:name="TableRow197" style:family="table-row">
      <style:table-row-properties style:min-row-height="0.2083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6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7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8" style:parent-style-name="ListParagraph" style:family="paragraph">
      <style:paragraph-properties fo:margin-bottom="0in" fo:line-height="100%"/>
    </style:style>
    <style:style style:name="T209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1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 fo:language="it" fo:country="IT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2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2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24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25" style:parent-style-name="Normal" style:family="paragraph">
      <style:paragraph-properties fo:text-align="justify" fo:margin-bottom="0in" fo:line-height="115%"/>
    </style:style>
    <style:style style:name="T2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3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240" style:family="table-column">
      <style:table-column-properties style:column-width="6.493in"/>
    </style:style>
    <style:style style:name="Table239" style:family="table">
      <style:table-properties style:width="6.493in" fo:margin-left="0in" table:align="left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6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7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8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6" style:parent-style-name="Normal" style:family="paragraph">
      <style:paragraph-properties fo:text-align="justify" fo:margin-bottom="0in" fo:line-height="115%"/>
    </style:style>
    <style:style style:name="T2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61" style:parent-style-name="ListParagraph" style:list-style-name="LFO1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62" style:parent-style-name="ListParagraph" style:list-style-name="LFO1" style:family="paragraph">
      <style:paragraph-properties fo:text-align="justify" fo:margin-bottom="0in" fo:line-height="115%"/>
    </style:style>
    <style:style style:name="T2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64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6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66" style:parent-style-name="ListParagraph" style:list-style-name="LFO1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67" style:parent-style-name="ListParagraph" style:list-style-name="LFO1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68" style:parent-style-name="ListParagraph" style:list-style-name="LFO1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69" style:parent-style-name="ListParagraph" style:list-style-name="LFO1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70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71" style:parent-style-name="Normal" style:family="paragraph">
      <style:paragraph-properties fo:text-align="justify" fo:margin-bottom="0in" fo:line-height="115%"/>
    </style:style>
    <style:style style:name="T2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275" style:family="table-column">
      <style:table-column-properties style:column-width="5.993in"/>
    </style:style>
    <style:style style:name="Table274" style:family="table">
      <style:table-properties style:width="5.993in" fo:margin-left="0.5in" table:align="left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7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6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7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8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6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297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TableColumn299" style:family="table-column">
      <style:table-column-properties style:column-width="6.493in"/>
    </style:style>
    <style:style style:name="Table298" style:family="table">
      <style:table-properties style:width="6.493in" fo:margin-left="0in" table:align="left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6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7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8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0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2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3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4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5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6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7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8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19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20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21" style:parent-style-name="ListParagraph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22" style:parent-style-name="Heading3" style:family="paragraph">
      <style:paragraph-properties fo:text-align="justify" fo:margin-top="0.2222in" fo:line-height="115%"/>
    </style:style>
    <style:style style:name="T323" style:parent-style-name="DefaultParagraphFont" style:family="text">
      <style:text-properties style:font-name="Arial" style:font-name-asian="Arial" style:font-name-complex="Arial" fo:color="#434343" fo:language="en"/>
    </style:style>
    <style:style style:name="P324" style:parent-style-name="Normal" style:family="paragraph">
      <style:paragraph-properties fo:text-align="justify" fo:margin-bottom="0in" fo:line-height="115%"/>
    </style:style>
    <style:style style:name="T32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26" style:parent-style-name="Normal" style:family="paragraph">
      <style:paragraph-properties fo:text-align="justify" fo:margin-bottom="0in" fo:line-height="115%"/>
    </style:style>
    <style:style style:name="T3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329" style:family="table-column">
      <style:table-column-properties style:column-width="6.493in"/>
    </style:style>
    <style:style style:name="Table328" style:family="table">
      <style:table-properties style:width="6.493in" fo:margin-left="0in" table:align="left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3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4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5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6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7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38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339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TableColumn341" style:family="table-column">
      <style:table-column-properties style:column-width="6.493in"/>
    </style:style>
    <style:style style:name="Table340" style:family="table">
      <style:table-properties style:width="6.493in" fo:margin-left="0in" table:align="left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45" style:parent-style-name="Normal" style:family="paragraph">
      <style:paragraph-properties fo:margin-bottom="0in" fo:line-height="100%"/>
    </style:style>
    <style:style style:name="T346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9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50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51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TableColumn353" style:family="table-column">
      <style:table-column-properties style:column-width="6.493in"/>
    </style:style>
    <style:style style:name="Table352" style:family="table">
      <style:table-properties style:width="6.493in" fo:margin-left="0in" table:align="left"/>
    </style:style>
    <style:style style:name="TableRow354" style:family="table-row">
      <style:table-row-properties style:min-row-height="0.2083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57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58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59" style:parent-style-name="Normal" style:family="paragraph">
      <style:paragraph-properties fo:text-align="justify" fo:margin-bottom="0in" fo:line-height="115%"/>
    </style:style>
    <style:style style:name="T3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362" style:family="table-column">
      <style:table-column-properties style:column-width="6.493in"/>
    </style:style>
    <style:style style:name="Table361" style:family="table">
      <style:table-properties style:width="6.493in" fo:margin-left="0in" table:align="left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66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67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68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69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70" style:parent-style-name="Normal" style:family="paragraph">
      <style:paragraph-properties fo:margin-bottom="0in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371" style:parent-style-name="Normal" style:family="paragraph">
      <style:paragraph-properties fo:text-align="justify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372" style:parent-style-name="Normal" style:family="paragraph">
      <style:paragraph-properties fo:text-align="justify" fo:margin-bottom="0in" fo:line-height="115%"/>
    </style:style>
    <style:style style:name="T3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74" style:parent-style-name="Heading3" style:family="paragraph">
      <style:paragraph-properties fo:text-align="justify" fo:margin-top="0.2222in" fo:line-height="115%"/>
    </style:style>
    <style:style style:name="T375" style:parent-style-name="DefaultParagraphFont" style:family="text">
      <style:text-properties style:font-name="Arial" style:font-name-asian="Arial" style:font-name-complex="Arial" fo:color="#434343" fo:language="en"/>
    </style:style>
    <style:style style:name="T376" style:parent-style-name="DefaultParagraphFont" style:family="text">
      <style:text-properties style:font-name="Courier New" style:font-name-asian="Courier New" style:font-name-complex="Courier New"/>
    </style:style>
    <style:style style:name="P377" style:parent-style-name="ListParagraph" style:list-style-name="LFO3" style:family="paragraph"/>
    <style:style style:name="P378" style:parent-style-name="ListParagraph" style:list-style-name="LFO3" style:family="paragraph"/>
    <style:style style:name="P379" style:parent-style-name="ListParagraph" style:list-style-name="LFO3" style:family="paragraph"/>
    <style:style style:name="P380" style:parent-style-name="ListParagraph" style:list-style-name="LFO3" style:family="paragraph"/>
    <style:style style:name="P381" style:parent-style-name="Heading3" style:family="paragraph">
      <style:paragraph-properties fo:text-align="justify" fo:margin-top="0.2222in" fo:line-height="115%"/>
    </style:style>
    <style:style style:name="T382" style:parent-style-name="DefaultParagraphFont" style:family="text">
      <style:text-properties style:font-name="Arial" style:font-name-asian="Arial" style:font-name-complex="Arial" fo:color="#434343" fo:language="en"/>
    </style:style>
    <style:style style:name="P383" style:parent-style-name="Normal" style:family="paragraph">
      <style:paragraph-properties fo:text-align="justify" fo:margin-bottom="0in" fo:line-height="115%"/>
    </style:style>
    <style:style style:name="T3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8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29">[RFC] [HCPV-???]: MSCP Vault FedRAMP audit logging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Summary:<text:s/></text:span><text:s/>Define how audit logs generated by customer actions are stored and provided to customers in MCSP Vault FedRAMP environment</text:p>
          </table:table-cell>
          <table:covered-table-cell/>
        </table:table-row>
        <table:table-row table:style-name="TableRow34">
          <table:table-cell table:style-name="TableCell35">
            <text:p text:style-name="P36"><text:span text:style-name="T37">Created:</text:span><text:span text:style-name="T38"><text:s/>Jun 29, 2026</text:span></text:p>
          </table:table-cell>
          <table:table-cell table:style-name="TableCell39">
            <text:p text:style-name="P40"><text:span text:style-name="T41">Status:</text:span><text:span text:style-name="T42"><text:s/></text:span><text:span text:style-name="T43">WIP</text:span><text:span text:style-name="T44"><text:s/>| In-Review | Approved | Obsolete</text:span></text:p>
          </table:table-cell>
        </table:table-row>
        <table:table-row table:style-name="TableRow45">
          <table:table-cell table:style-name="TableCell46">
            <text:p text:style-name="P47"><text:span text:style-name="T48">Product:</text:span><text:span text:style-name="T49"><text:s/>HCP Vault</text:span></text:p>
          </table:table-cell>
          <table:table-cell table:style-name="TableCell50">
            <text:p text:style-name="P51"><text:span text:style-name="T52">Owner:</text:span><text:span text:style-name="T53"><text:s/>Manish.Tomar3@ibm.com</text:span></text:p>
          </table:table-cell>
        </table:table-row>
        <table:table-row table:style-name="TableRow54">
          <table:table-cell table:style-name="TableCell55">
            <text:p text:style-name="P56"><text:span text:style-name="T57">Contributors:</text:span><text:span text:style-name="T58"><text:s/></text:span></text:p>
          </table:table-cell>
          <table:table-cell table:style-name="TableCell59">
            <text:p text:style-name="P60"><text:span text:style-name="T61">Approvers:</text:span><text:span text:style-name="T62"><text:s/>N/A</text:span></text:p>
          </table:table-cell>
        </table:table-row>
      </table:table>
      <text:p text:style-name="Normal"/>
      <text:p text:style-name="P63"/>
      <text:p text:style-name="P64"><text:span text:style-name="T65"><text:s/></text:span></text:p>
      <text:p text:style-name="P66"><text:span text:style-name="T67">MCSP Vault offering needs to provide access to audit logs<text:s/></text:span><text:span text:style-name="T68">of customer vault clusters. This RFC documents where these logs are stored and how customers can access them.</text:span><text:span text:style-name="T69"><text:s/></text:span></text:p>
      <text:h text:style-name="P70" text:outline-level="2"><text:span text:style-name="T71">Background</text:span></text:h>
      <text:p text:style-name="P72"><text:span text:style-name="T73">Vault is being offered on<text:s/></text:span><text:a xlink:href="https://www.fedramp.gov/marketplace/products/F1208031461A/" office:target-frame-name="_top" xlink:show="replace"><text:span text:style-name="Hyperlink">FedRAMP certified<text:s/></text:span><text:span text:style-name="Hyperlink">MSCP platform</text:span></text:a><text:span text:style-name="T74"><text:s/></text:span><text:span text:style-name="T75">on<text:s/></text:span><text:span text:style-name="T76">AWS Go</text:span><text:span text:style-name="T77">vC</text:span><text:span text:style-name="T78">loud<text:s/></text:span><text:span text:style-name="T79">and<text:s/></text:span><text:span text:style-name="T80">there is a requirement to<text:s/></text:span><text:span text:style-name="T81">provide<text:s/></text:span><text:span text:style-name="T82">the<text:s/></text:span><text:span text:style-name="T83">capability to store audit logs of<text:s/></text:span><text:span text:style-name="T84">customer<text:s/></text:span><text:span text:style-name="T85">vault cluster</text:span><text:span text:style-name="T86">s</text:span><text:span text:style-name="T87"><text:s/></text:span><text:span text:style-name="T88">and give customers access to them</text:span><text:span text:style-name="T89"><text:s/>in a FedRAMP compliant way</text:span><text:span text:style-name="T90">.<text:s/></text:span><text:span text:style-name="T91">The requirement is called</text:span><text:span text:style-name="T92"><text:s/>out<text:s/></text:span><text:span text:style-name="T93">in<text:s/></text:span><text:a xlink:href="https://ibm.sharepoint.com/:w:/r/sites/hermes/_layouts/15/Doc.aspx?sourcedoc=%7B00635D24-6CB8-4960-BA33-0DFD2091362B%7D&amp;file=HCPV-Vault%20on%20MCSP%20-%20FedRAMP%20Logging%20Approach.docx&amp;action=default&amp;mobileredirect=true&amp;DefaultItemOpen=1" office:target-frame-name="_top" xlink:show="replace"><text:span text:style-name="Hyperlink">this PRD</text:span></text:a><text:span text:style-name="T94">.</text:span></text:p>
      <text:p text:style-name="P95"/>
      <text:p text:style-name="P96"><text:span text:style-name="T97">Currently,<text:s/></text:span><text:a xlink:href="https://ibm.sharepoint.com/:w:/r/sites/hermes/_layouts/15/Doc.aspx?sourcedoc=%7BA03B5201-906E-49D6-8A77-7C28A23A1422%7D&amp;file=VLT-Vault%20on%20MCSP.docx&amp;action=default&amp;mobileredirect=true" office:target-frame-name="_top" xlink:show="replace"><text:span text:style-name="Hyperlink">c</text:span><text:span text:style-name="Hyperlink">ustomer vault clusters are run in Openshift cluster</text:span></text:a><text:span text:style-name="T98"><text:s/></text:span><text:span text:style-name="T99">in a separate namespace (per cluster) and the audit logs<text:s/></text:span><text:span text:style-name="T100">are stored in persistent volume that is backed by EBS.</text:span><text:span text:style-name="T101"><text:s/>Vector is configured as side<text:s/></text:span><text:span text:style-name="T102">in<text:s/></text:span><text:span text:style-name="T103">the vault pods and it can be configured to stream the logs out to customer’s cloudwatch instance in their AWS account. This implementation was done to m</text:span><text:span text:style-name="T104">irror HVD setup and is<text:s/></text:span><text:span text:style-name="T105">document</text:span><text:span text:style-name="T106">ed<text:s/></text:span><text:a xlink:href="https://ibm.sharepoint.com/:w:/r/sites/hermes/_layouts/15/Doc.aspx?sourcedoc=%7BA93EEEEC-AD65-4E73-83D5-CEE42A2CC701%7D&amp;file=HCPV-011_-_MSCP_Vault_Streaming.docx&amp;action=default&amp;mobileredirect=true" office:target-frame-name="_top" xlink:show="replace"><text:span text:style-name="Hyperlink">here</text:span></text:a><text:span text:style-name="T107">.<text:s/></text:span><text:span text:style-name="T108">While this setup is ok in commercial offering it is not allowed in FedRAMP due to strict network boundary. The recommendation<text:s/></text:span><text:span text:style-name="T109">from<text:s/></text:span><text:span text:style-name="T110">FedRAMP COE (center of excellence team)<text:s/></text:span><text:span text:style-name="T111">is to let customers pull the logs.</text:span><text:span text:style-name="T112"><text:s/>This is how currently other products provide audit logging capability.</text:span></text:p>
      <text:p text:style-name="P113"/>
      <text:p text:style-name="P114"><text:span text:style-name="T115">MSCP has<text:s/></text:span><text:a xlink:href="https://pages.github.ibm.com/ibm-saas-platform/MultiCloud-SaaS-Framework/Onboarding_Dev/phase2_1_fed_tooling/logging/" office:target-frame-name="_top" xlink:show="replace"><text:span text:style-name="Hyperlink">documentation</text:span></text:a><text:span text:style-name="T116"><text:s/>about adopting audit logging but it was later learnt that is primarily for internal audit logs that are sent to QRadar for long term analysis.</text:span><text:span text:style-name="T117"><text:s/>They have setup for<text:s/></text:span><text:a xlink:href="https://github.ibm.com/ibm-saas-platform/external-logging" office:target-frame-name="_top" xlink:show="replace"><text:span text:style-name="Hyperlink">external audit logs</text:span></text:a><text:span text:style-name="T118"><text:s/>but that is not yet supported in FedRAMP environment.</text:span></text:p>
      <text:h text:style-name="P119" text:outline-level="2"><text:span text:style-name="T120">Proposal</text:span></text:h>
      <text:h text:style-name="Heading3" text:outline-level="3">Storage</text:h>
      <text:p text:style-name="P121">Currently we plan to store two pieces of customer data for each cluster: snapshots and audit logs.<text:s/>Both of<text:s/>this information<text:s/>will be stored in separate<text:s/>S3<text:s/>buckets.<text:s/>There will be two buckets per cluster created<text:s/>in Vault AWS account<text:s/>– one for snapshots and one for audit logs:</text:p>
      <text:list text:style-name="LFO10" text:continue-numbering="true">
        <text:list-item>
          <text:p text:style-name="P122">instance-{instance-id}-snapshots</text:p>
        </text:list-item>
        <text:list-item>
          <text:p text:style-name="P123">instance-{instance-id}-audit-logs</text:p>
        </text:list-item>
      </text:list>
      <text:p text:style-name="P124"><text:span text:style-name="T125">These buckets along with any policies associated with them will be created by cluster operator as it is provisioning<text:s/></text:span><text:span text:style-name="T126">the</text:span><text:span text:style-name="T127"><text:s/>cluster.</text:span><text:span text:style-name="T128"><text:s/>The bucket will be tagged with subscription id to allow fetching all logs belonging to a customer.</text:span><text:span text:style-name="T129"><text:s/>The snapshot operator will be updated to store snapshots in these buckets instead of<text:s/></text:span><text:span text:style-name="T130">mcsp-vault-snapshot-{env}</text:span><text:span text:style-name="T131"><text:s/>common bucket</text:span><text:span text:style-name="T132"><text:s/>currently</text:span><text:span text:style-name="T133">.</text:span></text:p>
      <text:p text:style-name="P134"/>
      <text:p text:style-name="P135"><text:span text:style-name="T136">The snapshot bucket will be deleted when the cluster is getting deleted whereas the audit logs bucket will remain</text:span><text:span text:style-name="T137"><text:s/>due to requirement to keep them for 1 year or so (confirm from Sara).<text:s/></text:span><text:span text:style-name="T138">Cleanup of a</text:span><text:span text:style-name="T139">udit log buckets will<text:s/></text:span><text:span text:style-name="T140">require separate automation.</text:span></text:p>
      <text:p text:style-name="P141"/>
      <text:p text:style-name="P142">This was chosen due to following reasons:</text:p>
      <text:list text:style-name="LFO9" text:continue-numbering="true">
        <text:list-item>
          <text:p text:style-name="P143">Audit logs<text:s/>buckets<text:s/>will be accessed by customers<text:s/>whereas snapshots are accessed by service only. Having separate buckets can avoid accidental leakage to customers.</text:p>
        </text:list-item>
        <text:list-item>
          <text:p text:style-name="P144">Audit logs buckets have different storage requirements<text:s/>like<text:s/>object lock<text:s/>and retention period<text:s/>which can be set<text:s/>easily<text:s/>at bucket<text:s/>level. It is possible to set policies with prefixes but the chances of error are higher.</text:p>
        </text:list-item>
        <text:list-item>
          <text:p text:style-name="P145">In future each bucket can be encrypted with customer provided or separate key if needed. This is not possible<text:s/>with<text:s/>shared<text:s/>buckets.</text:p>
        </text:list-item>
        <text:list-item>
          <text:p text:style-name="P146">The isolation is easy to explain to auditors.</text:p>
        </text:list-item>
      </text:list>
      <text:h text:style-name="Heading3" text:outline-level="3">Limits</text:h>
      <text:p text:style-name="P147">AWS’s default limit<text:s/>for number of buckets is 10000 but can be extended to 1 million on request.<text:s/>Even with 10000 there can be 5000 clusters provisioned at the same time which<text:s/>we are not going to reach anytime soon.<text:s/></text:p>
      <text:h text:style-name="P148" text:outline-level="3"><text:span text:style-name="T149">Abandoned Ideas</text:span><text:span text:style-name="T150"><text:s/></text:span></text:h>
      <text:p text:style-name="P151"><text:span text:style-name="T152">There is spectrum of<text:s/></text:span><text:span text:style-name="T153">tenant isolation strategy starting from least isolation to most:</text:span></text:p>
      <text:list text:style-name="LFO7" text:continue-numbering="true">
        <text:list-item>
          <text:p text:style-name="P154">One bucket for all data</text:p>
        </text:list-item>
        <text:list-item>
          <text:p text:style-name="P155">One bucket for snapshots and another for audit logs</text:p>
        </text:list-item>
        <text:list-item>
          <text:p text:style-name="P156">One bucket for snapshots and separate buckets for audit logs</text:p>
        </text:list-item>
        <text:list-item>
          <text:p text:style-name="P157">One bucket per subscription containing both audit logs and snapshots</text:p>
        </text:list-item>
        <text:list-item>
          <text:p text:style-name="P158">One bucket per instance containing both audit logs and snapshots</text:p>
        </text:list-item>
        <text:list-item>
          <text:p text:style-name="P159">One bucket per instance for audit logs and another<text:s/>bucket per instance for snapshots</text:p>
        </text:list-item>
      </text:list>
      <text:p text:style-name="P160"/>
      <text:p text:style-name="P161">It was decided to use the maximum isolation strategy for reasons mentioned above<text:s/>and due to the nature of targeting high compliance with less number of tenants.<text:s/></text:p>
      <text:h text:style-name="P162" text:outline-level="2"><text:span text:style-name="T163">Customer access</text:span></text:h>
      <text:p text:style-name="P164">Customers will be provided direct access to audit logs S3 bucket via cross account role chaining. The process will be as follows<text:s/>for a cluster:</text:p>
      <text:p text:style-name="P165"/>
      <text:p text:style-name="P166"><text:span text:style-name="T167">On audit logging screen</text:span><text:span text:style-name="T168"><text:s/>when the access is disabled</text:span><text:span text:style-name="T169">,<text:s/></text:span><text:span text:style-name="T170">customer<text:s/></text:span><text:span text:style-name="T171">will be<text:s/></text:span><text:span text:style-name="T172">shown<text:s/></text:span><text:span text:style-name="T173">following<text:s/></text:span><text:span text:style-name="T174">information:</text:span></text:p>
      <text:list text:style-name="LFO2" text:continue-numbering="true">
        <text:list-item>
          <text:p text:style-name="P175">Access disabled</text:p>
        </text:list-item>
        <text:list-item>
          <text:p text:style-name="P176"><text:span text:style-name="T177">AWS role</text:span><text:span text:style-name="T178"><text:s/>ARN</text:span><text:span text:style-name="T179"><text:s/>in our account (named<text:s/></text:span><text:span text:style-name="T180">instance-{id}-audit-reader</text:span><text:span text:style-name="T181">) that role in their AWS account will have to assume</text:span></text:p>
        </text:list-item>
        <text:list-item>
          <text:p text:style-name="P182">External ID used when assuming the role</text:p>
        </text:list-item>
        <text:list-item>
          <text:p text:style-name="P183">Instructions on how to create role in their AWS account</text:p>
        </text:list-item>
      </text:list>
      <text:p text:style-name="P184"><text:span text:style-name="T185">The AWS role in our account will be<text:s/></text:span><text:span text:style-name="T186">configured to<text:s/></text:span><text:span text:style-name="T187">be<text:s/></text:span><text:span text:style-name="T188">assume</text:span><text:span text:style-name="T189">d</text:span><text:span text:style-name="T190"><text:s/>by any role and will<text:s/></text:span><text:span text:style-name="T191">not have any permissions.</text:span><text:span text:style-name="T192"><text:s/>Its trust policy will<text:s/></text:span><text:span text:style-name="T193">look</text:span><text:span text:style-name="T194"><text:s/>like this:</text:span></text:p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p text:style-name="P199">{</text:p>
            <text:p text:style-name="P200"><text:s text:c="2"/>"Version": "2012-10-17",</text:p>
            <text:p text:style-name="P201"><text:s text:c="2"/>"Statement": [</text:p>
            <text:p text:style-name="P202"><text:s text:c="4"/>{</text:p>
            <text:p text:style-name="P203"><text:s text:c="6"/>"Sid": "CustomerAssumeRole",</text:p>
            <text:p text:style-name="P204"><text:s text:c="6"/>"Effect": "Allow",</text:p>
            <text:p text:style-name="P205"><text:s text:c="6"/>"Principal": {</text:p>
            <text:p text:style-name="P206"><text:s text:c="8"/>"AWS": "*"</text:p>
            <text:p text:style-name="P207"><text:s text:c="6"/>},</text:p>
            <text:p text:style-name="P208"><text:span text:style-name="T209"><text:s text:c="6"/>"Action": "sts:AssumeRole"</text:span><text:span text:style-name="T210">,</text:span></text:p>
            <text:p text:style-name="P211"><text:span text:style-name="T212"><text:s text:c="12"/>"Condition": {</text:span></text:p>
            <text:p text:style-name="P213"><text:span text:style-name="T214"><text:s text:c="14"/>"StringEquals": {</text:span></text:p>
            <text:p text:style-name="P215"><text:span text:style-name="T216"><text:s text:c="17"/>"sts:ExternalId": "fa6050b4-6e45-4cad-89da-4ac621251f1a"</text:span></text:p>
            <text:p text:style-name="P217"><text:span text:style-name="T218"><text:s text:c="14"/>}</text:span></text:p>
            <text:p text:style-name="P219"><text:span text:style-name="T220"><text:s text:c="12"/>}</text:span></text:p>
            <text:p text:style-name="P221"><text:s text:c="4"/>}</text:p>
            <text:p text:style-name="P222"><text:s text:c="2"/>]</text:p>
            <text:p text:style-name="P223">}</text:p>
          </table:table-cell>
        </table:table-row>
      </table:table>
      <text:p text:style-name="P224"/>
      <text:p text:style-name="P225"><text:span text:style-name="T226">To</text:span><text:span text:style-name="T227"><text:s/>enabl</text:span><text:span text:style-name="T228">e<text:s/></text:span><text:span text:style-name="T229">access, c</text:span><text:span text:style-name="T230">ustomer will be asked to provide a role ARN</text:span><text:span text:style-name="T231"><text:s/>whose trust policy will allow assuming to role</text:span><text:span text:style-name="T232"><text:s/></text:span><text:span text:style-name="T233">instance-{id}-audit-reader</text:span><text:span text:style-name="T234"><text:s/>in our AWS account.</text:span><text:span text:style-name="T235"><text:s/>The ARN will point to a role in their AWS account.</text:span><text:span text:style-name="T236"><text:s/>This is how their<text:s/></text:span><text:span text:style-name="T237">role’s<text:s/></text:span><text:span text:style-name="T238">trust policy will look like:</text:span></text:p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p text:style-name="P243">{</text:p>
            <text:p text:style-name="P244"><text:s text:c="2"/>"Version": "2012-10-17",</text:p>
            <text:p text:style-name="P245"><text:s text:c="2"/>"Statement": [</text:p>
            <text:p text:style-name="P246"><text:s text:c="4"/>{</text:p>
            <text:p text:style-name="P247"><text:s text:c="6"/>"Sid": "AssumeVendorLogReadRole",</text:p>
            <text:p text:style-name="P248"><text:s text:c="6"/>"Effect": "Allow",</text:p>
            <text:p text:style-name="P249"><text:s text:c="6"/>"Principal": {</text:p>
            <text:p text:style-name="P250"><text:s text:c="8"/>"AWS": "arn:aws:iam::&lt;VAULT_ACCOUNT_ID&gt;:role/instance-{id}-audit-reader"</text:p>
            <text:p text:style-name="P251"><text:s text:c="6"/>},</text:p>
            <text:p text:style-name="P252"><text:s text:c="6"/>"Action": "sts:AssumeRole"</text:p>
            <text:p text:style-name="P253"><text:s text:c="4"/>}</text:p>
            <text:p text:style-name="P254"><text:s text:c="2"/>]</text:p>
            <text:p text:style-name="P255">}</text:p>
          </table:table-cell>
        </table:table-row>
      </table:table>
      <text:p text:style-name="P256"><text:span text:style-name="T257">The customer provided role will then be added to our role’s trust policy</text:span><text:span text:style-name="T258"><text:s/>(allowing customer provided role to assume our role)</text:span><text:span text:style-name="T259"><text:s/>and the role’s permission will be updated to provide read access to instance’s bucket objects.</text:span><text:span text:style-name="T260"><text:s/>The screen will now show the following information:</text:span></text:p>
      <text:list text:style-name="LFO1" text:continue-numbering="true">
        <text:list-item>
          <text:p text:style-name="P261">Access is enabled</text:p>
        </text:list-item>
        <text:list-item>
          <text:p text:style-name="P262"><text:span text:style-name="T263">Our role ARN<text:s/></text:span><text:span text:style-name="T264">instance-{id}-audit-reader</text:span><text:span text:style-name="T265"><text:s/>that customer’s role has to assume</text:span></text:p>
        </text:list-item>
        <text:list-item>
          <text:p text:style-name="P266">Customer’s role ARN</text:p>
        </text:list-item>
        <text:list-item>
          <text:p text:style-name="P267">External ID</text:p>
        </text:list-item>
        <text:list-item>
          <text:p text:style-name="P268">Instructions / sample commands to assume roles and get logs from s3 bucket</text:p>
        </text:list-item>
        <text:list-item>
          <text:p text:style-name="P269">TBD<text:s/>/ nice-to-have: Possibly last time the customer’s role was used</text:p>
        </text:list-item>
      </text:list>
      <text:p text:style-name="P270"/>
      <text:p text:style-name="P271"><text:span text:style-name="T272">This is how our role’s trust policy will look like</text:span><text:span text:style-name="T273">. Effectively, the “*” will be replaced by customer role.</text:span></text:p>
      <table:table table:style-name="Table274">
        <table:table-columns>
          <table:table-column table:style-name="TableColumn275"/>
        </table:table-columns>
        <table:table-row table:style-name="TableRow276">
          <table:table-cell table:style-name="TableCell277">
            <text:p text:style-name="P278">{</text:p>
            <text:p text:style-name="P279"><text:s text:c="2"/>"Version": "2012-10-17",</text:p>
            <text:p text:style-name="P280"><text:s text:c="2"/>"Statement": [</text:p>
            <text:p text:style-name="P281"><text:s text:c="4"/>{</text:p>
            <text:p text:style-name="P282"><text:s text:c="6"/>"Sid": "CustomerAssumeRole",</text:p>
            <text:p text:style-name="P283"><text:s text:c="6"/>"Effect": "Allow",</text:p>
            <text:p text:style-name="P284"><text:s text:c="6"/>"Principal": {</text:p>
            <text:p text:style-name="P285"><text:s text:c="8"/>"AWS": "arn:aws:iam::&lt;CUSTOMER_ACCOUNT_ID&gt;:role/&lt;CUSTOMER_CALLER_ROLE&gt;"</text:p>
            <text:p text:style-name="P286"><text:s text:c="6"/>},</text:p>
            <text:p text:style-name="P287"><text:s text:c="6"/>"Action": "sts:AssumeRole",</text:p>
            <text:p text:style-name="P288"><text:s text:c="6"/>"Condition": {</text:p>
            <text:p text:style-name="P289"><text:s text:c="8"/>"StringEquals": {</text:p>
            <text:p text:style-name="P290"><text:s text:c="10"/>"sts:ExternalId": "&lt;earlier provided id&gt;"</text:p>
            <text:p text:style-name="P291"><text:s text:c="8"/>}</text:p>
            <text:p text:style-name="P292"><text:s text:c="6"/>}</text:p>
            <text:p text:style-name="P293"><text:s text:c="4"/>}</text:p>
            <text:p text:style-name="P294"><text:s text:c="2"/>]</text:p>
            <text:p text:style-name="P295">}</text:p>
          </table:table-cell>
        </table:table-row>
      </table:table>
      <text:p text:style-name="P296"/>
      <text:p text:style-name="P297">This is how policy granting access to the bucket will be attached to our role.</text:p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P302">{</text:p>
            <text:p text:style-name="P303"><text:s text:c="2"/>"Version": "2012-10-17",</text:p>
            <text:p text:style-name="P304"><text:s text:c="2"/>"Statement": [</text:p>
            <text:p text:style-name="P305"><text:s text:c="4"/>{</text:p>
            <text:p text:style-name="P306"><text:s text:c="6"/>"Sid": "ListOwnBucket",</text:p>
            <text:p text:style-name="P307"><text:s text:c="6"/>"Effect": "Allow",</text:p>
            <text:p text:style-name="P308"><text:s text:c="6"/>"Action": "s3:ListBucket",</text:p>
            <text:p text:style-name="P309"><text:s text:c="6"/>"Resource": "arn:aws:s3:::instance-{instance-id}-audit-logs"</text:p>
            <text:p text:style-name="P310"><text:s text:c="4"/>},</text:p>
            <text:p text:style-name="P311"><text:s text:c="4"/>{</text:p>
            <text:p text:style-name="P312"><text:s text:c="6"/>"Sid": "ReadOwnObjects",</text:p>
            <text:p text:style-name="P313"><text:s text:c="6"/>"Effect": "Allow",</text:p>
            <text:p text:style-name="P314"><text:s text:c="6"/>"Action": [</text:p>
            <text:p text:style-name="P315"><text:s text:c="8"/>"s3:GetObject",</text:p>
            <text:p text:style-name="P316"><text:s text:c="8"/>"s3:GetObjectVersion"</text:p>
            <text:p text:style-name="P317"><text:s text:c="6"/>],</text:p>
            <text:p text:style-name="P318"><text:s text:c="6"/>"Resource": "<text:s/>arn:aws:s3:::instance-{instance-id}-audit-logs/*"</text:p>
            <text:p text:style-name="P319"><text:s text:c="4"/>}</text:p>
            <text:p text:style-name="P320"><text:s text:c="2"/>]</text:p>
            <text:p text:style-name="P321">}</text:p>
          </table:table-cell>
        </table:table-row>
      </table:table>
      <text:h text:style-name="P322" text:outline-level="3"><text:span text:style-name="T323">Management APIs</text:span></text:h>
      <text:p text:style-name="P324"><text:span text:style-name="T325">To support the above workflow the following APIs will be implemented in management service.</text:span></text:p>
      <text:h text:style-name="Heading4" text:outline-level="4">GetAuditLoggingAccess</text:h>
      <text:p text:style-name="P326"><text:span text:style-name="T327">Response when access is enabled</text:span></text:p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>{</text:p>
            <text:p text:style-name="P333"><text:s text:c="2"/>“enabled”: true,</text:p>
            <text:p text:style-name="P334"><text:s text:c="2"/>“log_reader_role”: “instance-{id}-audit-reader role ARN”,</text:p>
            <text:p text:style-name="P335"><text:s text:c="2"/>“customer_role_arn”: “&lt;customer provided role ARN&gt;”,</text:p>
            <text:p text:style-name="P336"><text:s text:c="2"/>“assume_role_external_id”: “&lt;random string used by customer to assume role&gt;”</text:p>
            <text:p text:style-name="P337">}</text:p>
          </table:table-cell>
        </table:table-row>
      </table:table>
      <text:p text:style-name="P338"/>
      <text:p text:style-name="P339">Response when the access is disabled</text:p>
      <table:table table:style-name="Table340">
        <table:table-columns>
          <table:table-column table:style-name="TableColumn341"/>
        </table:table-columns>
        <table:table-row table:style-name="TableRow342">
          <table:table-cell table:style-name="TableCell343">
            <text:p text:style-name="P344">{</text:p>
            <text:p text:style-name="P345"><text:span text:style-name="T346"><text:s text:c="2"/>“enabled”: false</text:span></text:p>
            <text:p text:style-name="P347"><text:span text:style-name="T348"><text:s text:c="2"/>“log_reader_role”: “instance-{id}-audit-reader role ARN”,</text:span></text:p>
            <text:p text:style-name="P349"><text:s text:c="2"/>“assume_role_external_id”: “&lt;random string used by customer to assume role&gt;”</text:p>
            <text:p text:style-name="P350">}</text:p>
          </table:table-cell>
        </table:table-row>
      </table:table>
      <text:p text:style-name="P351"/>
      <text:h text:style-name="Heading4" text:outline-level="4">EnableAuditLoggingAccess</text:h>
      <text:p text:style-name="Normal">Request:</text:p>
      <table:table table:style-name="Table352">
        <table:table-columns>
          <table:table-column table:style-name="TableColumn353"/>
        </table:table-columns>
        <table:table-row table:style-name="TableRow354">
          <table:table-cell table:style-name="TableCell355">
            <text:p text:style-name="P356">{</text:p>
            <text:p text:style-name="P357"><text:s text:c="2"/>“customer_role_arn”: “&lt;customer provided role ARN&gt;”,</text:p>
            <text:p text:style-name="P358">}</text:p>
          </table:table-cell>
        </table:table-row>
      </table:table>
      <text:p text:style-name="P359"><text:span text:style-name="T360">Response:</text:span></text:p>
      <table:table table:style-name="Table361">
        <table:table-columns>
          <table:table-column table:style-name="TableColumn362"/>
        </table:table-columns>
        <table:table-row table:style-name="TableRow363">
          <table:table-cell table:style-name="TableCell364">
            <text:p text:style-name="P365">{</text:p>
            <text:p text:style-name="P366"><text:s text:c="2"/>“enabled”: true,</text:p>
            <text:p text:style-name="P367"><text:s text:c="2"/>“log_reader_role”: “&lt;system role ARN&gt;”,</text:p>
            <text:p text:style-name="P368"><text:s text:c="2"/>“customer_role_arn”: “&lt;customer provided role ARN&gt;”,</text:p>
            <text:p text:style-name="P369"><text:s text:c="2"/>“assume_role_external_id”: “&lt;random string used by customer to assume role&gt;”</text:p>
            <text:p text:style-name="P370">}</text:p>
          </table:table-cell>
        </table:table-row>
      </table:table>
      <text:p text:style-name="P371"/>
      <text:h text:style-name="Heading4" text:outline-level="4">DisableAuditLoggingAccess</text:h>
      <text:p text:style-name="P372"><text:span text:style-name="T373">Empty request and response</text:span></text:p>
      <text:h text:style-name="P374" text:outline-level="3"><text:span text:style-name="T375">MCSP Role</text:span></text:h>
      <text:p text:style-name="Normal">The IAM action associated with above management APIs will be<text:s/><text:span text:style-name="T376">audit-streams.manage</text:span><text:s/>and the following roles<text:s/>will have this action in it which means customers with<text:s/>these roles can access audit logs:</text:p>
      <text:list text:style-name="LFO3" text:continue-numbering="true">
        <text:list-item>
          <text:p text:style-name="P377">Auditor</text:p>
        </text:list-item>
        <text:list-item>
          <text:p text:style-name="P378">Operator</text:p>
        </text:list-item>
        <text:list-item>
          <text:p text:style-name="P379">Security Engineer</text:p>
        </text:list-item>
        <text:list-item>
          <text:p text:style-name="P380">Administrator</text:p>
        </text:list-item>
      </text:list>
      <text:h text:style-name="P381" text:outline-level="3"><text:span text:style-name="T382">Bucket configuration</text:span></text:h>
      <text:p text:style-name="P383"><text:span text:style-name="T384">TODO: Talk about how vector side car will be configured to send logs to s3</text:span><text:span text:style-name="T38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●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❏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8" style:family="table-column">
      <style:table-column-properties style:column-width="2.1666in" style:use-optimal-column-width="false"/>
    </style:style>
    <style:style style:name="TableColumn9" style:family="table-column">
      <style:table-column-properties style:column-width="2.1666in" style:use-optimal-column-width="false"/>
    </style:style>
    <style:style style:name="TableColumn10" style:family="table-column">
      <style:table-column-properties style:column-width="2.1666in" style:use-optimal-column-width="false"/>
    </style:style>
    <style:style style:name="Table7" style:family="table">
      <style:table-properties style:width="6.5in" fo:margin-left="0in" table:align="left"/>
    </style:style>
    <style:style style:name="TableRow11" style:family="table-row">
      <style:table-row-properties style:min-row-height="0.2083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Header" style:family="paragraph">
      <style:paragraph-properties fo:text-align="center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Header" style:family="paragraph">
      <style:paragraph-properties fo:text-align="end" fo:margin-right="-0.0798in"/>
    </style:style>
    <style:style style:name="TableColumn19" style:family="table-column">
      <style:table-column-properties style:column-width="2.1666in" style:use-optimal-column-width="false"/>
    </style:style>
    <style:style style:name="TableColumn20" style:family="table-column">
      <style:table-column-properties style:column-width="2.1666in" style:use-optimal-column-width="false"/>
    </style:style>
    <style:style style:name="TableColumn21" style:family="table-column">
      <style:table-column-properties style:column-width="2.1666in" style:use-optimal-column-width="false"/>
    </style:style>
    <style:style style:name="Table18" style:family="table">
      <style:table-properties style:width="6.5in" fo:margin-left="0in" table:align="left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Header" style:family="paragraph">
      <style:paragraph-properties fo:text-align="center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/>
            </table:table-cell>
            <table:table-cell table:style-name="TableCell16">
              <text:p text:style-name="P17"/>
            </table:table-cell>
          </table:table-row>
        </table:table>
        <text:p text:style-name="Header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  <table:table-cell table:style-name="TableCell27">
              <text:p text:style-name="P2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SCP Vault fedramp audit logging</dc:title>
    <meta:keyword>FileID: 01XOO7K4L6CRSNGH4ZCRFZONNIFF5SGS3W</meta:keyword>
    <meta:initial-creator>Manish.Tomar3@ibm.com</meta:initial-creator>
    <dc:creator>Manish Tomar</dc:creator>
    <meta:creation-date>2026-07-08T14:13:00Z</meta:creation-date>
    <dc:date>2026-07-08T14:13:00Z</dc:date>
    <meta:template xlink:href="Normal.dotm" xlink:type="simple"/>
    <meta:editing-cycles>1</meta:editing-cycles>
    <meta:editing-duration>PT0S</meta:editing-duration>
    <meta:user-defined meta:name="ContentTypeId">0x010100E202430947DA97418209B636D707CBA0</meta:user-defined>
    <meta:document-statistic meta:page-count="1" meta:paragraph-count="18" meta:word-count="1419" meta:character-count="9490" meta:row-count="67" meta:non-whitespace-character-count="8089"/>
  </office:meta>
</office:document-meta>
</file>