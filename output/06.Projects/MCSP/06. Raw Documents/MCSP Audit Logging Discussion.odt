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stem-ui" svg:font-family="system-ui" style:font-family-generic="roman" svg:panose-1="0 0 0 0 0 0 0 0 0 0"/>
    <style:font-face style:name="BlinkMacSystemFont" svg:font-family="BlinkMacSystemFont" style:font-family-generic="roman" svg:panose-1="0 0 0 0 0 0 0 0 0 0"/>
    <style:font-face style:name="FabricMDL2Icons-6" svg:font-family="FabricMDL2Icons-6" style:font-family-generic="roman" svg:panose-1="0 0 0 0 0 0 0 0 0 0"/>
    <style:font-face style:name="Segoe UI" svg:font-family="Segoe UI" style:font-family-generic="swiss" style:font-pitch="variable" svg:panose-1="2 11 5 2 4 2 4 2 2 3"/>
    <style:font-face style:name="MS Gothic" svg:font-family="MS Gothic" style:font-family-generic="modern" style:font-pitch="fixed" svg:panose-1="2 11 6 9 7 2 5 8 2 4"/>
  </office:font-face-decls>
  <office:automatic-styles>
    <style:style style:name="P1" style:parent-style-name="Normal" style:master-page-name="MP0" style:family="paragraph">
      <style:paragraph-properties fo:break-before="page" fo:text-align="center" fo:margin-bottom="0in" fo:margin-left="0.1041in" fo:margin-right="0.1041in" fo:background-color="#252423">
        <style:tab-stops/>
      </style:paragraph-properties>
    </style:style>
    <style:style style:name="P2" style:parent-style-name="Normal" style:family="paragraph">
      <style:paragraph-properties fo:text-align="center" fo:margin-bottom="0in" fo:margin-left="0.1041in" fo:margin-right="0.1041in" fo:background-color="#252423">
        <style:tab-stops/>
      </style:paragraph-properties>
    </style:style>
    <style:style style:name="T3" style:parent-style-name="DefaultParagraphFont" style:family="text">
      <style:text-properties style:font-name="system-ui" style:font-name-asian="system-ui" style:font-name-complex="system-ui" fo:color="#F3F2F1"/>
    </style:style>
    <style:style style:name="P4" style:parent-style-name="Normal" style:family="paragraph">
      <style:paragraph-properties fo:text-align="center" fo:margin-bottom="0in" fo:margin-left="0.1041in" fo:margin-right="0.1041in" fo:background-color="#252423">
        <style:tab-stops/>
      </style:paragraph-properties>
    </style:style>
    <style:style style:name="T5" style:parent-style-name="DefaultParagraphFont" style:family="text">
      <style:text-properties style:font-name="BlinkMacSystemFont" style:font-name-asian="BlinkMacSystemFont" style:font-name-complex="BlinkMacSystemFont" fo:color="#7F85F5"/>
    </style:style>
    <style:style style:name="P6" style:parent-style-name="Normal" style:family="paragraph">
      <style:paragraph-properties fo:text-align="center" fo:margin-bottom="0in" fo:line-height="125%" fo:margin-right="0.0416in" fo:background-color="#262523"/>
    </style:style>
    <style:style style:name="T7" style:parent-style-name="DefaultParagraphFont" style:family="text">
      <style:text-properties style:font-name="system-ui" style:font-name-asian="system-ui" style:font-name-complex="system-ui" fo:color="#F3F2F1" fo:font-size="10.5pt" style:font-size-asian="10.5pt" style:font-size-complex="10.5pt"/>
    </style:style>
    <style:style style:name="P8" style:parent-style-name="Normal" style:family="paragraph">
      <style:paragraph-properties fo:margin-bottom="0in" fo:margin-right="0.0416in" fo:background-color="#262523"/>
    </style:style>
    <style:style style:name="T9" style:parent-style-name="DefaultParagraphFont" style:family="text">
      <style:text-properties style:font-name="system-ui" style:font-name-asian="system-ui" style:font-name-complex="system-ui" fo:color="#F3F2F1" fo:font-size="10.5pt" style:font-size-asian="10.5pt" style:font-size-complex="10.5pt"/>
    </style:style>
    <style:style style:name="P10" style:parent-style-name="Normal" style:family="paragraph">
      <style:paragraph-properties fo:margin-bottom="0in" fo:line-height="125%" fo:margin-right="0.0416in" fo:background-color="#262523"/>
    </style:style>
    <style:style style:name="T11" style:parent-style-name="DefaultParagraphFont" style:family="text">
      <style:text-properties style:font-name="BlinkMacSystemFont" style:font-name-asian="BlinkMacSystemFont" style:font-name-complex="BlinkMacSystemFont" fo:color="#F8F7F6" fo:font-size="10.5pt" style:font-size-asian="10.5pt" style:font-size-complex="10.5pt"/>
    </style:style>
    <style:style style:name="T12" style:parent-style-name="DefaultParagraphFont" style:family="text">
      <style:text-properties style:font-name="FabricMDL2Icons-6" style:font-name-asian="FabricMDL2Icons-6" style:font-name-complex="FabricMDL2Icons-6" fo:color="#F8F7F6" fo:font-size="10.5pt" style:font-size-asian="10.5pt" style:font-size-complex="10.5pt"/>
    </style:style>
    <style:style style:name="P13" style:parent-style-name="Normal" style:family="paragraph">
      <style:paragraph-properties fo:margin-bottom="0in" fo:line-height="100%" fo:margin-right="0.0416in" fo:background-color="#262523"/>
    </style:style>
    <style:style style:name="T14"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T15"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16" style:parent-style-name="Normal" style:family="paragraph">
      <style:paragraph-properties fo:text-align="center" fo:margin-bottom="0in" fo:margin-right="0.1041in" fo:background-color="#262523"/>
    </style:style>
    <style:style style:name="P17" style:parent-style-name="Normal" style:family="paragraph">
      <style:paragraph-properties fo:margin-bottom="0in" fo:line-height="100%" fo:margin-right="0.0416in" fo:background-color="#262523"/>
    </style:style>
    <style:style style:name="T18"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19" style:parent-style-name="Normal" style:family="paragraph">
      <style:paragraph-properties fo:margin-bottom="0in" fo:line-height="100%" fo:margin-right="0.0416in" fo:background-color="#262523"/>
    </style:style>
    <style:style style:name="T20"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21" style:parent-style-name="Normal" style:family="paragraph">
      <style:paragraph-properties fo:margin-bottom="0in" fo:line-height="125%" fo:margin-right="0.0416in" fo:background-color="#262523"/>
    </style:style>
    <style:style style:name="T2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3" style:parent-style-name="Normal" style:family="paragraph">
      <style:paragraph-properties fo:margin-bottom="0in" fo:line-height="125%" fo:margin-right="0.0416in" fo:background-color="#262523"/>
    </style:style>
    <style:style style:name="T2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5" style:parent-style-name="Normal" style:family="paragraph">
      <style:paragraph-properties fo:margin-bottom="0in" fo:line-height="125%" fo:margin-right="0.0416in" fo:background-color="#262523"/>
    </style:style>
    <style:style style:name="T2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7" style:parent-style-name="Normal" style:family="paragraph">
      <style:paragraph-properties fo:margin-bottom="0in" fo:line-height="125%" fo:margin-right="0.0416in" fo:background-color="#262523"/>
    </style:style>
    <style:style style:name="T28"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9" style:parent-style-name="Normal" style:family="paragraph">
      <style:paragraph-properties fo:margin-bottom="0in" fo:line-height="125%" fo:margin-right="0.0416in" fo:background-color="#262523"/>
    </style:style>
    <style:style style:name="T30"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1" style:parent-style-name="Normal" style:family="paragraph">
      <style:paragraph-properties fo:margin-bottom="0in" fo:line-height="125%" fo:margin-right="0.0416in" fo:background-color="#464442"/>
    </style:style>
    <style:style style:name="T3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3" style:parent-style-name="Normal" style:family="paragraph">
      <style:paragraph-properties fo:margin-bottom="0in" fo:line-height="125%" fo:margin-right="0.0416in" fo:background-color="#262523"/>
    </style:style>
    <style:style style:name="T3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5" style:parent-style-name="Normal" style:family="paragraph">
      <style:paragraph-properties fo:margin-bottom="0in" fo:line-height="125%" fo:margin-right="0.0416in" fo:background-color="#262523"/>
    </style:style>
    <style:style style:name="T3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7" style:parent-style-name="Normal" style:family="paragraph">
      <style:paragraph-properties fo:margin-bottom="0in" fo:line-height="125%" fo:margin-right="0.0416in" fo:background-color="#262523"/>
    </style:style>
    <style:style style:name="T38"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9" style:parent-style-name="Normal" style:family="paragraph">
      <style:paragraph-properties fo:margin-bottom="0in" fo:line-height="125%" fo:margin-right="0.0416in" fo:background-color="#262523"/>
    </style:style>
    <style:style style:name="T40"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1" style:parent-style-name="Normal" style:family="paragraph">
      <style:paragraph-properties fo:margin-bottom="0in" fo:line-height="125%" fo:margin-right="0.0416in" fo:background-color="#262523"/>
    </style:style>
    <style:style style:name="T4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3" style:parent-style-name="Normal" style:family="paragraph">
      <style:paragraph-properties fo:margin-bottom="0in" fo:line-height="125%" fo:margin-right="0.0416in" fo:background-color="#262523"/>
    </style:style>
    <style:style style:name="T4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5" style:parent-style-name="Normal" style:family="paragraph">
      <style:paragraph-properties fo:margin-bottom="0in" fo:line-height="125%" fo:margin-right="0.0416in" fo:background-color="#262523"/>
    </style:style>
    <style:style style:name="T4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7" style:parent-style-name="Normal" style:family="paragraph">
      <style:paragraph-properties fo:margin-bottom="0in" fo:line-height="125%" fo:margin-right="0.0416in" fo:background-color="#262523"/>
    </style:style>
    <style:style style:name="T48"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9" style:parent-style-name="Normal" style:family="paragraph">
      <style:paragraph-properties fo:margin-bottom="0in" fo:line-height="125%" fo:margin-right="0.0416in" fo:background-color="#262523"/>
    </style:style>
    <style:style style:name="T50"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1" style:parent-style-name="Normal" style:family="paragraph">
      <style:paragraph-properties fo:margin-bottom="0in" fo:line-height="125%" fo:margin-right="0.0416in" fo:background-color="#262523"/>
    </style:style>
    <style:style style:name="T5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3" style:parent-style-name="Normal" style:family="paragraph">
      <style:paragraph-properties fo:margin-bottom="0in" fo:line-height="125%" fo:margin-right="0.0416in" fo:background-color="#262523"/>
    </style:style>
    <style:style style:name="T5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5" style:parent-style-name="Normal" style:family="paragraph">
      <style:paragraph-properties fo:margin-bottom="0in" fo:line-height="125%" fo:margin-right="0.0416in" fo:background-color="#262523"/>
    </style:style>
    <style:style style:name="T5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7" style:parent-style-name="Normal" style:family="paragraph">
      <style:paragraph-properties fo:margin-bottom="0in" fo:line-height="125%" fo:margin-right="0.0416in" fo:background-color="#262523"/>
    </style:style>
    <style:style style:name="T58"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9" style:parent-style-name="Normal" style:family="paragraph">
      <style:paragraph-properties fo:margin-bottom="0in" fo:line-height="125%" fo:margin-right="0.0416in" fo:background-color="#262523"/>
    </style:style>
    <style:style style:name="T60"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1" style:parent-style-name="Normal" style:family="paragraph">
      <style:paragraph-properties fo:margin-bottom="0in" fo:line-height="125%" fo:margin-right="0.0416in" fo:background-color="#262523"/>
    </style:style>
    <style:style style:name="T6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3" style:parent-style-name="Normal" style:family="paragraph">
      <style:paragraph-properties fo:margin-bottom="0in" fo:line-height="125%" fo:margin-right="0.0416in" fo:background-color="#262523"/>
    </style:style>
    <style:style style:name="T6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5" style:parent-style-name="Normal" style:family="paragraph">
      <style:paragraph-properties fo:text-align="center" fo:margin-bottom="0in" fo:margin-right="0.1041in" fo:background-color="#262523"/>
    </style:style>
    <style:style style:name="P66" style:parent-style-name="Normal" style:family="paragraph">
      <style:paragraph-properties fo:margin-bottom="0in" fo:line-height="100%" fo:margin-right="0.0416in" fo:background-color="#262523"/>
    </style:style>
    <style:style style:name="T67"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68" style:parent-style-name="Normal" style:family="paragraph">
      <style:paragraph-properties fo:margin-bottom="0in" fo:line-height="100%" fo:margin-right="0.0416in" fo:background-color="#262523"/>
    </style:style>
    <style:style style:name="T69"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70" style:parent-style-name="Normal" style:family="paragraph">
      <style:paragraph-properties fo:margin-bottom="0in" fo:line-height="125%" fo:margin-right="0.0416in" fo:background-color="#262523"/>
    </style:style>
    <style:style style:name="T7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72" style:parent-style-name="Normal" style:family="paragraph">
      <style:paragraph-properties fo:margin-bottom="0in" fo:line-height="125%" fo:margin-right="0.0416in" fo:background-color="#262523"/>
    </style:style>
    <style:style style:name="T7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74" style:parent-style-name="Normal" style:family="paragraph">
      <style:paragraph-properties fo:text-align="center" fo:margin-bottom="0in" fo:margin-right="0.1041in" fo:background-color="#262523"/>
    </style:style>
    <style:style style:name="P75" style:parent-style-name="Normal" style:family="paragraph">
      <style:paragraph-properties fo:margin-bottom="0in" fo:line-height="100%" fo:margin-right="0.0416in" fo:background-color="#262523"/>
    </style:style>
    <style:style style:name="T76"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77" style:parent-style-name="Normal" style:family="paragraph">
      <style:paragraph-properties fo:margin-bottom="0in" fo:line-height="100%" fo:margin-right="0.0416in" fo:background-color="#262523"/>
    </style:style>
    <style:style style:name="T78"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79" style:parent-style-name="Normal" style:family="paragraph">
      <style:paragraph-properties fo:margin-bottom="0in" fo:line-height="125%" fo:margin-right="0.0416in" fo:background-color="#262523"/>
    </style:style>
    <style:style style:name="T80"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81" style:parent-style-name="Normal" style:family="paragraph">
      <style:paragraph-properties fo:margin-bottom="0in" fo:line-height="125%" fo:margin-right="0.0416in" fo:background-color="#262523"/>
    </style:style>
    <style:style style:name="T8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83" style:parent-style-name="Normal" style:family="paragraph">
      <style:paragraph-properties fo:margin-bottom="0in" fo:line-height="125%" fo:margin-right="0.0416in" fo:background-color="#262523"/>
    </style:style>
    <style:style style:name="T8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85" style:parent-style-name="Normal" style:family="paragraph">
      <style:paragraph-properties fo:margin-bottom="0in" fo:line-height="125%" fo:margin-right="0.0416in" fo:background-color="#262523"/>
    </style:style>
    <style:style style:name="T8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87" style:parent-style-name="Normal" style:family="paragraph">
      <style:paragraph-properties fo:text-align="center" fo:margin-bottom="0in" fo:margin-right="0.1041in" fo:background-color="#262523"/>
    </style:style>
    <style:style style:name="P88" style:parent-style-name="Normal" style:family="paragraph">
      <style:paragraph-properties fo:margin-bottom="0in" fo:line-height="100%" fo:margin-right="0.0416in" fo:background-color="#262523"/>
    </style:style>
    <style:style style:name="T89"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90" style:parent-style-name="Normal" style:family="paragraph">
      <style:paragraph-properties fo:margin-bottom="0in" fo:line-height="100%" fo:margin-right="0.0416in" fo:background-color="#262523"/>
    </style:style>
    <style:style style:name="T91"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92" style:parent-style-name="Normal" style:family="paragraph">
      <style:paragraph-properties fo:margin-bottom="0in" fo:line-height="125%" fo:margin-right="0.0416in" fo:background-color="#262523"/>
    </style:style>
    <style:style style:name="T9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94" style:parent-style-name="Normal" style:family="paragraph">
      <style:paragraph-properties fo:margin-bottom="0in" fo:line-height="125%" fo:margin-right="0.0416in" fo:background-color="#262523"/>
    </style:style>
    <style:style style:name="T9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96" style:parent-style-name="Normal" style:family="paragraph">
      <style:paragraph-properties fo:margin-bottom="0in" fo:line-height="125%" fo:margin-right="0.0416in" fo:background-color="#262523"/>
    </style:style>
    <style:style style:name="T9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98" style:parent-style-name="Normal" style:family="paragraph">
      <style:paragraph-properties fo:margin-bottom="0in" fo:line-height="125%" fo:margin-right="0.0416in" fo:background-color="#262523"/>
    </style:style>
    <style:style style:name="T9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00" style:parent-style-name="Normal" style:family="paragraph">
      <style:paragraph-properties fo:text-align="center" fo:margin-bottom="0in" fo:margin-right="0.1041in" fo:background-color="#262523"/>
    </style:style>
    <style:style style:name="P101" style:parent-style-name="Normal" style:family="paragraph">
      <style:paragraph-properties fo:margin-bottom="0in" fo:line-height="100%" fo:margin-right="0.0416in" fo:background-color="#262523"/>
    </style:style>
    <style:style style:name="T102"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103" style:parent-style-name="Normal" style:family="paragraph">
      <style:paragraph-properties fo:margin-bottom="0in" fo:line-height="100%" fo:margin-right="0.0416in" fo:background-color="#262523"/>
    </style:style>
    <style:style style:name="T104"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105" style:parent-style-name="Normal" style:family="paragraph">
      <style:paragraph-properties fo:margin-bottom="0in" fo:line-height="125%" fo:margin-right="0.0416in" fo:background-color="#262523"/>
    </style:style>
    <style:style style:name="T10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07" style:parent-style-name="Normal" style:family="paragraph">
      <style:paragraph-properties fo:margin-bottom="0in" fo:line-height="125%" fo:margin-right="0.0416in" fo:background-color="#262523"/>
    </style:style>
    <style:style style:name="T108"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09" style:parent-style-name="Normal" style:family="paragraph">
      <style:paragraph-properties fo:text-align="center" fo:margin-bottom="0in" fo:margin-right="0.1041in" fo:background-color="#262523"/>
    </style:style>
    <style:style style:name="P110" style:parent-style-name="Normal" style:family="paragraph">
      <style:paragraph-properties fo:margin-bottom="0in" fo:line-height="100%" fo:margin-right="0.0416in" fo:background-color="#262523"/>
    </style:style>
    <style:style style:name="T111"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112" style:parent-style-name="Normal" style:family="paragraph">
      <style:paragraph-properties fo:margin-bottom="0in" fo:line-height="100%" fo:margin-right="0.0416in" fo:background-color="#262523"/>
    </style:style>
    <style:style style:name="T113"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114" style:parent-style-name="Normal" style:family="paragraph">
      <style:paragraph-properties fo:margin-bottom="0in" fo:line-height="125%" fo:margin-right="0.0416in" fo:background-color="#262523"/>
    </style:style>
    <style:style style:name="T11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16" style:parent-style-name="Normal" style:family="paragraph">
      <style:paragraph-properties fo:margin-bottom="0in" fo:line-height="125%" fo:margin-right="0.0416in" fo:background-color="#262523"/>
    </style:style>
    <style:style style:name="T11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18" style:parent-style-name="Normal" style:family="paragraph">
      <style:paragraph-properties fo:margin-bottom="0in" fo:line-height="125%" fo:margin-right="0.0416in" fo:background-color="#262523"/>
    </style:style>
    <style:style style:name="T11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20" style:parent-style-name="Normal" style:family="paragraph">
      <style:paragraph-properties fo:margin-bottom="0in" fo:line-height="125%" fo:margin-right="0.0416in" fo:background-color="#262523"/>
    </style:style>
    <style:style style:name="T12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22" style:parent-style-name="Normal" style:family="paragraph">
      <style:paragraph-properties fo:margin-bottom="0in" fo:line-height="125%" fo:margin-right="0.0416in" fo:background-color="#262523"/>
    </style:style>
    <style:style style:name="T12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24" style:parent-style-name="Normal" style:family="paragraph">
      <style:paragraph-properties fo:margin-bottom="0in" fo:line-height="125%" fo:margin-right="0.0416in" fo:background-color="#262523"/>
    </style:style>
    <style:style style:name="T12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26" style:parent-style-name="Normal" style:family="paragraph">
      <style:paragraph-properties fo:margin-bottom="0in" fo:line-height="125%" fo:margin-right="0.0416in" fo:background-color="#262523"/>
    </style:style>
    <style:style style:name="T12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28" style:parent-style-name="Normal" style:family="paragraph">
      <style:paragraph-properties fo:margin-bottom="0in" fo:line-height="125%" fo:margin-right="0.0416in" fo:background-color="#262523"/>
    </style:style>
    <style:style style:name="T12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30" style:parent-style-name="Normal" style:family="paragraph">
      <style:paragraph-properties fo:margin-bottom="0in" fo:line-height="125%" fo:margin-right="0.0416in" fo:background-color="#262523"/>
    </style:style>
    <style:style style:name="T13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32" style:parent-style-name="Normal" style:family="paragraph">
      <style:paragraph-properties fo:margin-bottom="0in" fo:line-height="125%" fo:margin-right="0.0416in" fo:background-color="#262523"/>
    </style:style>
    <style:style style:name="T13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34" style:parent-style-name="Normal" style:family="paragraph">
      <style:paragraph-properties fo:margin-bottom="0in" fo:line-height="125%" fo:margin-right="0.0416in" fo:background-color="#262523"/>
    </style:style>
    <style:style style:name="T13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36" style:parent-style-name="Normal" style:family="paragraph">
      <style:paragraph-properties fo:margin-bottom="0in" fo:line-height="125%" fo:margin-right="0.0416in" fo:background-color="#262523"/>
    </style:style>
    <style:style style:name="T13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38" style:parent-style-name="Normal" style:family="paragraph">
      <style:paragraph-properties fo:margin-bottom="0in" fo:line-height="125%" fo:margin-right="0.0416in" fo:background-color="#262523"/>
    </style:style>
    <style:style style:name="T13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40" style:parent-style-name="Normal" style:family="paragraph">
      <style:paragraph-properties fo:margin-bottom="0in" fo:line-height="125%" fo:margin-right="0.0416in" fo:background-color="#262523"/>
    </style:style>
    <style:style style:name="T14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42" style:parent-style-name="Normal" style:family="paragraph">
      <style:paragraph-properties fo:margin-bottom="0in" fo:line-height="125%" fo:margin-right="0.0416in" fo:background-color="#262523"/>
    </style:style>
    <style:style style:name="T14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44" style:parent-style-name="Normal" style:family="paragraph">
      <style:paragraph-properties fo:margin-bottom="0in" fo:line-height="125%" fo:margin-right="0.0416in" fo:background-color="#262523"/>
    </style:style>
    <style:style style:name="T14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46" style:parent-style-name="Normal" style:family="paragraph">
      <style:paragraph-properties fo:margin-bottom="0in" fo:line-height="125%" fo:margin-right="0.0416in" fo:background-color="#262523"/>
    </style:style>
    <style:style style:name="T14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48" style:parent-style-name="Normal" style:family="paragraph">
      <style:paragraph-properties fo:margin-bottom="0in" fo:line-height="125%" fo:margin-right="0.0416in" fo:background-color="#262523"/>
    </style:style>
    <style:style style:name="T14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50" style:parent-style-name="Normal" style:family="paragraph">
      <style:paragraph-properties fo:margin-bottom="0in" fo:line-height="125%" fo:margin-right="0.0416in" fo:background-color="#262523"/>
    </style:style>
    <style:style style:name="T15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52" style:parent-style-name="Normal" style:family="paragraph">
      <style:paragraph-properties fo:margin-bottom="0in" fo:line-height="125%" fo:margin-right="0.0416in" fo:background-color="#262523"/>
    </style:style>
    <style:style style:name="T15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54" style:parent-style-name="Normal" style:family="paragraph">
      <style:paragraph-properties fo:margin-bottom="0in" fo:line-height="125%" fo:margin-right="0.0416in" fo:background-color="#262523"/>
    </style:style>
    <style:style style:name="T15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56" style:parent-style-name="Normal" style:family="paragraph">
      <style:paragraph-properties fo:margin-bottom="0in" fo:line-height="125%" fo:margin-right="0.0416in" fo:background-color="#262523"/>
    </style:style>
    <style:style style:name="T15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58" style:parent-style-name="Normal" style:family="paragraph">
      <style:paragraph-properties fo:margin-bottom="0in" fo:line-height="125%" fo:margin-right="0.0416in" fo:background-color="#262523"/>
    </style:style>
    <style:style style:name="T15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60" style:parent-style-name="Normal" style:family="paragraph">
      <style:paragraph-properties fo:margin-bottom="0in" fo:line-height="125%" fo:margin-right="0.0416in" fo:background-color="#262523"/>
    </style:style>
    <style:style style:name="T16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62" style:parent-style-name="Normal" style:family="paragraph">
      <style:paragraph-properties fo:margin-bottom="0in" fo:line-height="125%" fo:margin-right="0.0416in" fo:background-color="#262523"/>
    </style:style>
    <style:style style:name="T16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64" style:parent-style-name="Normal" style:family="paragraph">
      <style:paragraph-properties fo:margin-bottom="0in" fo:line-height="125%" fo:margin-right="0.0416in" fo:background-color="#262523"/>
    </style:style>
    <style:style style:name="T16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66" style:parent-style-name="Normal" style:family="paragraph">
      <style:paragraph-properties fo:margin-bottom="0in" fo:line-height="125%" fo:margin-right="0.0416in" fo:background-color="#262523"/>
    </style:style>
    <style:style style:name="T16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68" style:parent-style-name="Normal" style:family="paragraph">
      <style:paragraph-properties fo:margin-bottom="0in" fo:line-height="125%" fo:margin-right="0.0416in" fo:background-color="#262523"/>
    </style:style>
    <style:style style:name="T16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70" style:parent-style-name="Normal" style:family="paragraph">
      <style:paragraph-properties fo:margin-bottom="0in" fo:line-height="125%" fo:margin-right="0.0416in" fo:background-color="#262523"/>
    </style:style>
    <style:style style:name="T17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72" style:parent-style-name="Normal" style:family="paragraph">
      <style:paragraph-properties fo:margin-bottom="0in" fo:line-height="125%" fo:margin-right="0.0416in" fo:background-color="#262523"/>
    </style:style>
    <style:style style:name="T17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74" style:parent-style-name="Normal" style:family="paragraph">
      <style:paragraph-properties fo:margin-bottom="0in" fo:line-height="125%" fo:margin-right="0.0416in" fo:background-color="#262523"/>
    </style:style>
    <style:style style:name="T17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76" style:parent-style-name="Normal" style:family="paragraph">
      <style:paragraph-properties fo:margin-bottom="0in" fo:line-height="125%" fo:margin-right="0.0416in" fo:background-color="#262523"/>
    </style:style>
    <style:style style:name="T17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78" style:parent-style-name="Normal" style:family="paragraph">
      <style:paragraph-properties fo:margin-bottom="0in" fo:line-height="125%" fo:margin-right="0.0416in" fo:background-color="#262523"/>
    </style:style>
    <style:style style:name="T17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80" style:parent-style-name="Normal" style:family="paragraph">
      <style:paragraph-properties fo:margin-bottom="0in" fo:line-height="125%" fo:margin-right="0.0416in" fo:background-color="#262523"/>
    </style:style>
    <style:style style:name="T18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82" style:parent-style-name="Normal" style:family="paragraph">
      <style:paragraph-properties fo:margin-bottom="0in" fo:line-height="125%" fo:margin-right="0.0416in" fo:background-color="#262523"/>
    </style:style>
    <style:style style:name="T18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84" style:parent-style-name="Normal" style:family="paragraph">
      <style:paragraph-properties fo:margin-bottom="0in" fo:line-height="125%" fo:margin-right="0.0416in" fo:background-color="#262523"/>
    </style:style>
    <style:style style:name="T18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86" style:parent-style-name="Normal" style:family="paragraph">
      <style:paragraph-properties fo:margin-bottom="0in" fo:line-height="125%" fo:margin-right="0.0416in" fo:background-color="#262523"/>
    </style:style>
    <style:style style:name="T18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88" style:parent-style-name="Normal" style:family="paragraph">
      <style:paragraph-properties fo:margin-bottom="0in" fo:line-height="125%" fo:margin-right="0.0416in" fo:background-color="#262523"/>
    </style:style>
    <style:style style:name="T18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90" style:parent-style-name="Normal" style:family="paragraph">
      <style:paragraph-properties fo:margin-bottom="0in" fo:line-height="125%" fo:margin-right="0.0416in" fo:background-color="#262523"/>
    </style:style>
    <style:style style:name="T19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92" style:parent-style-name="Normal" style:family="paragraph">
      <style:paragraph-properties fo:margin-bottom="0in" fo:line-height="125%" fo:margin-right="0.0416in" fo:background-color="#262523"/>
    </style:style>
    <style:style style:name="T19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94" style:parent-style-name="Normal" style:family="paragraph">
      <style:paragraph-properties fo:margin-bottom="0in" fo:line-height="125%" fo:margin-right="0.0416in" fo:background-color="#262523"/>
    </style:style>
    <style:style style:name="T19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96" style:parent-style-name="Normal" style:family="paragraph">
      <style:paragraph-properties fo:margin-bottom="0in" fo:line-height="125%" fo:margin-right="0.0416in" fo:background-color="#262523"/>
    </style:style>
    <style:style style:name="T19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198" style:parent-style-name="Normal" style:family="paragraph">
      <style:paragraph-properties fo:margin-bottom="0in" fo:line-height="125%" fo:margin-right="0.0416in" fo:background-color="#262523"/>
    </style:style>
    <style:style style:name="T19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00" style:parent-style-name="Normal" style:family="paragraph">
      <style:paragraph-properties fo:margin-bottom="0in" fo:line-height="125%" fo:margin-right="0.0416in" fo:background-color="#262523"/>
    </style:style>
    <style:style style:name="T20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02" style:parent-style-name="Normal" style:family="paragraph">
      <style:paragraph-properties fo:margin-bottom="0in" fo:line-height="125%" fo:margin-right="0.0416in" fo:background-color="#262523"/>
    </style:style>
    <style:style style:name="T20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04" style:parent-style-name="Normal" style:family="paragraph">
      <style:paragraph-properties fo:margin-bottom="0in" fo:line-height="125%" fo:margin-right="0.0416in" fo:background-color="#262523"/>
    </style:style>
    <style:style style:name="T20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06" style:parent-style-name="Normal" style:family="paragraph">
      <style:paragraph-properties fo:margin-bottom="0in" fo:line-height="125%" fo:margin-right="0.0416in" fo:background-color="#262523"/>
    </style:style>
    <style:style style:name="T20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08" style:parent-style-name="Normal" style:family="paragraph">
      <style:paragraph-properties fo:margin-bottom="0in" fo:line-height="125%" fo:margin-right="0.0416in" fo:background-color="#262523"/>
    </style:style>
    <style:style style:name="T20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10" style:parent-style-name="Normal" style:family="paragraph">
      <style:paragraph-properties fo:margin-bottom="0in" fo:line-height="125%" fo:margin-right="0.0416in" fo:background-color="#262523"/>
    </style:style>
    <style:style style:name="T21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12" style:parent-style-name="Normal" style:family="paragraph">
      <style:paragraph-properties fo:margin-bottom="0in" fo:line-height="125%" fo:margin-right="0.0416in" fo:background-color="#262523"/>
    </style:style>
    <style:style style:name="T21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14" style:parent-style-name="Normal" style:family="paragraph">
      <style:paragraph-properties fo:margin-bottom="0in" fo:line-height="125%" fo:margin-right="0.0416in" fo:background-color="#262523"/>
    </style:style>
    <style:style style:name="T21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16" style:parent-style-name="Normal" style:family="paragraph">
      <style:paragraph-properties fo:margin-bottom="0in" fo:line-height="125%" fo:margin-right="0.0416in" fo:background-color="#262523"/>
    </style:style>
    <style:style style:name="T21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18" style:parent-style-name="Normal" style:family="paragraph">
      <style:paragraph-properties fo:margin-bottom="0in" fo:line-height="125%" fo:margin-right="0.0416in" fo:background-color="#262523"/>
    </style:style>
    <style:style style:name="T21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20" style:parent-style-name="Normal" style:family="paragraph">
      <style:paragraph-properties fo:margin-bottom="0in" fo:line-height="125%" fo:margin-right="0.0416in" fo:background-color="#262523"/>
    </style:style>
    <style:style style:name="T22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22" style:parent-style-name="Normal" style:family="paragraph">
      <style:paragraph-properties fo:margin-bottom="0in" fo:line-height="125%" fo:margin-right="0.0416in" fo:background-color="#262523"/>
    </style:style>
    <style:style style:name="T22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24" style:parent-style-name="Normal" style:family="paragraph">
      <style:paragraph-properties fo:margin-bottom="0in" fo:line-height="125%" fo:margin-right="0.0416in" fo:background-color="#262523"/>
    </style:style>
    <style:style style:name="T22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26" style:parent-style-name="Normal" style:family="paragraph">
      <style:paragraph-properties fo:margin-bottom="0in" fo:line-height="125%" fo:margin-right="0.0416in" fo:background-color="#262523"/>
    </style:style>
    <style:style style:name="T22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28" style:parent-style-name="Normal" style:family="paragraph">
      <style:paragraph-properties fo:margin-bottom="0in" fo:line-height="125%" fo:margin-right="0.0416in" fo:background-color="#262523"/>
    </style:style>
    <style:style style:name="T22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30" style:parent-style-name="Normal" style:family="paragraph">
      <style:paragraph-properties fo:margin-bottom="0in" fo:line-height="125%" fo:margin-right="0.0416in" fo:background-color="#262523"/>
    </style:style>
    <style:style style:name="T23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32" style:parent-style-name="Normal" style:family="paragraph">
      <style:paragraph-properties fo:margin-bottom="0in" fo:line-height="125%" fo:margin-right="0.0416in" fo:background-color="#262523"/>
    </style:style>
    <style:style style:name="T23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34" style:parent-style-name="Normal" style:family="paragraph">
      <style:paragraph-properties fo:margin-bottom="0in" fo:line-height="125%" fo:margin-right="0.0416in" fo:background-color="#262523"/>
    </style:style>
    <style:style style:name="T23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36" style:parent-style-name="Normal" style:family="paragraph">
      <style:paragraph-properties fo:margin-bottom="0in" fo:line-height="125%" fo:margin-right="0.0416in" fo:background-color="#262523"/>
    </style:style>
    <style:style style:name="T23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38" style:parent-style-name="Normal" style:family="paragraph">
      <style:paragraph-properties fo:margin-bottom="0in" fo:line-height="125%" fo:margin-right="0.0416in" fo:background-color="#262523"/>
    </style:style>
    <style:style style:name="T23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40" style:parent-style-name="Normal" style:family="paragraph">
      <style:paragraph-properties fo:margin-bottom="0in" fo:line-height="125%" fo:margin-right="0.0416in" fo:background-color="#262523"/>
    </style:style>
    <style:style style:name="T24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42" style:parent-style-name="Normal" style:family="paragraph">
      <style:paragraph-properties fo:margin-bottom="0in" fo:line-height="125%" fo:margin-right="0.0416in" fo:background-color="#262523"/>
    </style:style>
    <style:style style:name="T24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44" style:parent-style-name="Normal" style:family="paragraph">
      <style:paragraph-properties fo:margin-bottom="0in" fo:line-height="125%" fo:margin-right="0.0416in" fo:background-color="#262523"/>
    </style:style>
    <style:style style:name="T24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46" style:parent-style-name="Normal" style:family="paragraph">
      <style:paragraph-properties fo:margin-bottom="0in" fo:line-height="125%" fo:margin-right="0.0416in" fo:background-color="#262523"/>
    </style:style>
    <style:style style:name="T24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48" style:parent-style-name="Normal" style:family="paragraph">
      <style:paragraph-properties fo:margin-bottom="0in" fo:line-height="125%" fo:margin-right="0.0416in" fo:background-color="#262523"/>
    </style:style>
    <style:style style:name="T24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50" style:parent-style-name="Normal" style:family="paragraph">
      <style:paragraph-properties fo:margin-bottom="0in" fo:line-height="125%" fo:margin-right="0.0416in" fo:background-color="#262523"/>
    </style:style>
    <style:style style:name="T25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52" style:parent-style-name="Normal" style:family="paragraph">
      <style:paragraph-properties fo:margin-bottom="0in" fo:line-height="125%" fo:margin-right="0.0416in" fo:background-color="#262523"/>
    </style:style>
    <style:style style:name="T25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54" style:parent-style-name="Normal" style:family="paragraph">
      <style:paragraph-properties fo:margin-bottom="0in" fo:line-height="125%" fo:margin-right="0.0416in" fo:background-color="#262523"/>
    </style:style>
    <style:style style:name="T25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56" style:parent-style-name="Normal" style:family="paragraph">
      <style:paragraph-properties fo:margin-bottom="0in" fo:line-height="125%" fo:margin-right="0.0416in" fo:background-color="#262523"/>
    </style:style>
    <style:style style:name="T25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58" style:parent-style-name="Normal" style:family="paragraph">
      <style:paragraph-properties fo:text-align="center" fo:margin-bottom="0in" fo:margin-right="0.1041in" fo:background-color="#262523"/>
    </style:style>
    <style:style style:name="P259" style:parent-style-name="Normal" style:family="paragraph">
      <style:paragraph-properties fo:margin-bottom="0in" fo:line-height="100%" fo:margin-right="0.0416in" fo:background-color="#262523"/>
    </style:style>
    <style:style style:name="T260"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261" style:parent-style-name="Normal" style:family="paragraph">
      <style:paragraph-properties fo:margin-bottom="0in" fo:line-height="100%" fo:margin-right="0.0416in" fo:background-color="#262523"/>
    </style:style>
    <style:style style:name="T262"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263" style:parent-style-name="Normal" style:family="paragraph">
      <style:paragraph-properties fo:margin-bottom="0in" fo:line-height="125%" fo:margin-right="0.0416in" fo:background-color="#262523"/>
    </style:style>
    <style:style style:name="T26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65" style:parent-style-name="Normal" style:family="paragraph">
      <style:paragraph-properties fo:margin-bottom="0in" fo:line-height="125%" fo:margin-right="0.0416in" fo:background-color="#262523"/>
    </style:style>
    <style:style style:name="T26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67" style:parent-style-name="Normal" style:family="paragraph">
      <style:paragraph-properties fo:margin-bottom="0in" fo:line-height="125%" fo:margin-right="0.0416in" fo:background-color="#262523"/>
    </style:style>
    <style:style style:name="T268"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69" style:parent-style-name="Normal" style:family="paragraph">
      <style:paragraph-properties fo:margin-bottom="0in" fo:line-height="125%" fo:margin-right="0.0416in" fo:background-color="#262523"/>
    </style:style>
    <style:style style:name="T270"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71" style:parent-style-name="Normal" style:family="paragraph">
      <style:paragraph-properties fo:text-align="center" fo:margin-bottom="0in" fo:margin-right="0.1041in" fo:background-color="#262523"/>
    </style:style>
    <style:style style:name="P272" style:parent-style-name="Normal" style:family="paragraph">
      <style:paragraph-properties fo:margin-bottom="0in" fo:line-height="100%" fo:margin-right="0.0416in" fo:background-color="#262523"/>
    </style:style>
    <style:style style:name="T273"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274" style:parent-style-name="Normal" style:family="paragraph">
      <style:paragraph-properties fo:margin-bottom="0in" fo:line-height="100%" fo:margin-right="0.0416in" fo:background-color="#262523"/>
    </style:style>
    <style:style style:name="T275"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276" style:parent-style-name="Normal" style:family="paragraph">
      <style:paragraph-properties fo:margin-bottom="0in" fo:line-height="125%" fo:margin-right="0.0416in" fo:background-color="#262523"/>
    </style:style>
    <style:style style:name="T27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78" style:parent-style-name="Normal" style:family="paragraph">
      <style:paragraph-properties fo:margin-bottom="0in" fo:line-height="125%" fo:margin-right="0.0416in" fo:background-color="#262523"/>
    </style:style>
    <style:style style:name="T27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80" style:parent-style-name="Normal" style:family="paragraph">
      <style:paragraph-properties fo:text-align="center" fo:margin-bottom="0in" fo:margin-right="0.1041in" fo:background-color="#262523"/>
    </style:style>
    <style:style style:name="P281" style:parent-style-name="Normal" style:family="paragraph">
      <style:paragraph-properties fo:margin-bottom="0in" fo:line-height="100%" fo:margin-right="0.0416in" fo:background-color="#262523"/>
    </style:style>
    <style:style style:name="T282"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283" style:parent-style-name="Normal" style:family="paragraph">
      <style:paragraph-properties fo:margin-bottom="0in" fo:line-height="100%" fo:margin-right="0.0416in" fo:background-color="#262523"/>
    </style:style>
    <style:style style:name="T284"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285" style:parent-style-name="Normal" style:family="paragraph">
      <style:paragraph-properties fo:margin-bottom="0in" fo:line-height="125%" fo:margin-right="0.0416in" fo:background-color="#262523"/>
    </style:style>
    <style:style style:name="T28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87" style:parent-style-name="Normal" style:family="paragraph">
      <style:paragraph-properties fo:margin-bottom="0in" fo:line-height="125%" fo:margin-right="0.0416in" fo:background-color="#262523"/>
    </style:style>
    <style:style style:name="T288"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89" style:parent-style-name="Normal" style:family="paragraph">
      <style:paragraph-properties fo:margin-bottom="0in" fo:line-height="125%" fo:margin-right="0.0416in" fo:background-color="#262523"/>
    </style:style>
    <style:style style:name="T290"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91" style:parent-style-name="Normal" style:family="paragraph">
      <style:paragraph-properties fo:margin-bottom="0in" fo:line-height="125%" fo:margin-right="0.0416in" fo:background-color="#262523"/>
    </style:style>
    <style:style style:name="T29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293" style:parent-style-name="Normal" style:family="paragraph">
      <style:paragraph-properties fo:text-align="center" fo:margin-bottom="0in" fo:margin-right="0.1041in" fo:background-color="#262523"/>
    </style:style>
    <style:style style:name="P294" style:parent-style-name="Normal" style:family="paragraph">
      <style:paragraph-properties fo:margin-bottom="0in" fo:line-height="100%" fo:margin-right="0.0416in" fo:background-color="#262523"/>
    </style:style>
    <style:style style:name="T295"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296" style:parent-style-name="Normal" style:family="paragraph">
      <style:paragraph-properties fo:margin-bottom="0in" fo:line-height="100%" fo:margin-right="0.0416in" fo:background-color="#262523"/>
    </style:style>
    <style:style style:name="T297"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298" style:parent-style-name="Normal" style:family="paragraph">
      <style:paragraph-properties fo:margin-bottom="0in" fo:line-height="125%" fo:margin-right="0.0416in" fo:background-color="#262523"/>
    </style:style>
    <style:style style:name="T29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00" style:parent-style-name="Normal" style:family="paragraph">
      <style:paragraph-properties fo:margin-bottom="0in" fo:line-height="125%" fo:margin-right="0.0416in" fo:background-color="#262523"/>
    </style:style>
    <style:style style:name="T30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02" style:parent-style-name="Normal" style:family="paragraph">
      <style:paragraph-properties fo:text-align="center" fo:margin-bottom="0in" fo:margin-right="0.1041in" fo:background-color="#262523"/>
    </style:style>
    <style:style style:name="P303" style:parent-style-name="Normal" style:family="paragraph">
      <style:paragraph-properties fo:margin-bottom="0in" fo:line-height="100%" fo:margin-right="0.0416in" fo:background-color="#262523"/>
    </style:style>
    <style:style style:name="T304"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305" style:parent-style-name="Normal" style:family="paragraph">
      <style:paragraph-properties fo:margin-bottom="0in" fo:line-height="100%" fo:margin-right="0.0416in" fo:background-color="#262523"/>
    </style:style>
    <style:style style:name="T306"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307" style:parent-style-name="Normal" style:family="paragraph">
      <style:paragraph-properties fo:margin-bottom="0in" fo:line-height="125%" fo:margin-right="0.0416in" fo:background-color="#262523"/>
    </style:style>
    <style:style style:name="T308"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09" style:parent-style-name="Normal" style:family="paragraph">
      <style:paragraph-properties fo:margin-bottom="0in" fo:line-height="125%" fo:margin-right="0.0416in" fo:background-color="#262523"/>
    </style:style>
    <style:style style:name="T310"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11" style:parent-style-name="Normal" style:family="paragraph">
      <style:paragraph-properties fo:text-align="center" fo:margin-bottom="0in" fo:margin-right="0.1041in" fo:background-color="#262523"/>
    </style:style>
    <style:style style:name="P312" style:parent-style-name="Normal" style:family="paragraph">
      <style:paragraph-properties fo:margin-bottom="0in" fo:line-height="100%" fo:margin-right="0.0416in" fo:background-color="#262523"/>
    </style:style>
    <style:style style:name="T313"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314" style:parent-style-name="Normal" style:family="paragraph">
      <style:paragraph-properties fo:margin-bottom="0in" fo:line-height="100%" fo:margin-right="0.0416in" fo:background-color="#262523"/>
    </style:style>
    <style:style style:name="T315"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316" style:parent-style-name="Normal" style:family="paragraph">
      <style:paragraph-properties fo:margin-bottom="0in" fo:line-height="125%" fo:margin-right="0.0416in" fo:background-color="#262523"/>
    </style:style>
    <style:style style:name="T31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18" style:parent-style-name="Normal" style:family="paragraph">
      <style:paragraph-properties fo:margin-bottom="0in" fo:line-height="125%" fo:margin-right="0.0416in" fo:background-color="#262523"/>
    </style:style>
    <style:style style:name="T31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20" style:parent-style-name="Normal" style:family="paragraph">
      <style:paragraph-properties fo:margin-bottom="0in" fo:line-height="125%" fo:margin-right="0.0416in" fo:background-color="#262523"/>
    </style:style>
    <style:style style:name="T32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22" style:parent-style-name="Normal" style:family="paragraph">
      <style:paragraph-properties fo:margin-bottom="0in" fo:line-height="125%" fo:margin-right="0.0416in" fo:background-color="#262523"/>
    </style:style>
    <style:style style:name="T32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24" style:parent-style-name="Normal" style:family="paragraph">
      <style:paragraph-properties fo:margin-bottom="0in" fo:line-height="125%" fo:margin-right="0.0416in" fo:background-color="#262523"/>
    </style:style>
    <style:style style:name="T32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26" style:parent-style-name="Normal" style:family="paragraph">
      <style:paragraph-properties fo:margin-bottom="0in" fo:line-height="125%" fo:margin-right="0.0416in" fo:background-color="#262523"/>
    </style:style>
    <style:style style:name="T32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28" style:parent-style-name="Normal" style:family="paragraph">
      <style:paragraph-properties fo:margin-bottom="0in" fo:line-height="125%" fo:margin-right="0.0416in" fo:background-color="#262523"/>
    </style:style>
    <style:style style:name="T32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30" style:parent-style-name="Normal" style:family="paragraph">
      <style:paragraph-properties fo:margin-bottom="0in" fo:line-height="125%" fo:margin-right="0.0416in" fo:background-color="#262523"/>
    </style:style>
    <style:style style:name="T33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32" style:parent-style-name="Normal" style:family="paragraph">
      <style:paragraph-properties fo:margin-bottom="0in" fo:line-height="125%" fo:margin-right="0.0416in" fo:background-color="#262523"/>
    </style:style>
    <style:style style:name="T33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34" style:parent-style-name="Normal" style:family="paragraph">
      <style:paragraph-properties fo:margin-bottom="0in" fo:line-height="125%" fo:margin-right="0.0416in" fo:background-color="#262523"/>
    </style:style>
    <style:style style:name="T33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36" style:parent-style-name="Normal" style:family="paragraph">
      <style:paragraph-properties fo:margin-bottom="0in" fo:line-height="125%" fo:margin-right="0.0416in" fo:background-color="#262523"/>
    </style:style>
    <style:style style:name="T33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38" style:parent-style-name="Normal" style:family="paragraph">
      <style:paragraph-properties fo:margin-bottom="0in" fo:line-height="125%" fo:margin-right="0.0416in" fo:background-color="#262523"/>
    </style:style>
    <style:style style:name="T33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40" style:parent-style-name="Normal" style:family="paragraph">
      <style:paragraph-properties fo:text-align="center" fo:margin-bottom="0in" fo:margin-right="0.1041in" fo:background-color="#262523"/>
    </style:style>
    <style:style style:name="P341" style:parent-style-name="Normal" style:family="paragraph">
      <style:paragraph-properties fo:margin-bottom="0in" fo:line-height="100%" fo:margin-right="0.0416in" fo:background-color="#262523"/>
    </style:style>
    <style:style style:name="T342"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343" style:parent-style-name="Normal" style:family="paragraph">
      <style:paragraph-properties fo:margin-bottom="0in" fo:line-height="100%" fo:margin-right="0.0416in" fo:background-color="#262523"/>
    </style:style>
    <style:style style:name="T344"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345" style:parent-style-name="Normal" style:family="paragraph">
      <style:paragraph-properties fo:margin-bottom="0in" fo:line-height="125%" fo:margin-right="0.0416in" fo:background-color="#262523"/>
    </style:style>
    <style:style style:name="T34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47" style:parent-style-name="Normal" style:family="paragraph">
      <style:paragraph-properties fo:margin-bottom="0in" fo:line-height="125%" fo:margin-right="0.0416in" fo:background-color="#262523"/>
    </style:style>
    <style:style style:name="T348"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49" style:parent-style-name="Normal" style:family="paragraph">
      <style:paragraph-properties fo:text-align="center" fo:margin-bottom="0in" fo:margin-right="0.1041in" fo:background-color="#262523"/>
    </style:style>
    <style:style style:name="P350" style:parent-style-name="Normal" style:family="paragraph">
      <style:paragraph-properties fo:margin-bottom="0in" fo:line-height="100%" fo:margin-right="0.0416in" fo:background-color="#262523"/>
    </style:style>
    <style:style style:name="T351"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352" style:parent-style-name="Normal" style:family="paragraph">
      <style:paragraph-properties fo:margin-bottom="0in" fo:line-height="100%" fo:margin-right="0.0416in" fo:background-color="#262523"/>
    </style:style>
    <style:style style:name="T353"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354" style:parent-style-name="Normal" style:family="paragraph">
      <style:paragraph-properties fo:margin-bottom="0in" fo:line-height="125%" fo:margin-right="0.0416in" fo:background-color="#262523"/>
    </style:style>
    <style:style style:name="T35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56" style:parent-style-name="Normal" style:family="paragraph">
      <style:paragraph-properties fo:margin-bottom="0in" fo:line-height="125%" fo:margin-right="0.0416in" fo:background-color="#262523"/>
    </style:style>
    <style:style style:name="T35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58" style:parent-style-name="Normal" style:family="paragraph">
      <style:paragraph-properties fo:text-align="center" fo:margin-bottom="0in" fo:margin-right="0.1041in" fo:background-color="#262523"/>
    </style:style>
    <style:style style:name="P359" style:parent-style-name="Normal" style:family="paragraph">
      <style:paragraph-properties fo:margin-bottom="0in" fo:line-height="100%" fo:margin-right="0.0416in" fo:background-color="#262523"/>
    </style:style>
    <style:style style:name="T360"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361" style:parent-style-name="Normal" style:family="paragraph">
      <style:paragraph-properties fo:margin-bottom="0in" fo:line-height="100%" fo:margin-right="0.0416in" fo:background-color="#262523"/>
    </style:style>
    <style:style style:name="T362"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363" style:parent-style-name="Normal" style:family="paragraph">
      <style:paragraph-properties fo:margin-bottom="0in" fo:line-height="125%" fo:margin-right="0.0416in" fo:background-color="#262523"/>
    </style:style>
    <style:style style:name="T36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65" style:parent-style-name="Normal" style:family="paragraph">
      <style:paragraph-properties fo:margin-bottom="0in" fo:line-height="125%" fo:margin-right="0.0416in" fo:background-color="#262523"/>
    </style:style>
    <style:style style:name="T36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67" style:parent-style-name="Normal" style:family="paragraph">
      <style:paragraph-properties fo:text-align="center" fo:margin-bottom="0in" fo:margin-right="0.1041in" fo:background-color="#262523"/>
    </style:style>
    <style:style style:name="P368" style:parent-style-name="Normal" style:family="paragraph">
      <style:paragraph-properties fo:margin-bottom="0in" fo:line-height="100%" fo:margin-right="0.0416in" fo:background-color="#262523"/>
    </style:style>
    <style:style style:name="T369"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370" style:parent-style-name="Normal" style:family="paragraph">
      <style:paragraph-properties fo:margin-bottom="0in" fo:line-height="100%" fo:margin-right="0.0416in" fo:background-color="#262523"/>
    </style:style>
    <style:style style:name="T371"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372" style:parent-style-name="Normal" style:family="paragraph">
      <style:paragraph-properties fo:margin-bottom="0in" fo:line-height="125%" fo:margin-right="0.0416in" fo:background-color="#262523"/>
    </style:style>
    <style:style style:name="T37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74" style:parent-style-name="Normal" style:family="paragraph">
      <style:paragraph-properties fo:margin-bottom="0in" fo:line-height="125%" fo:margin-right="0.0416in" fo:background-color="#262523"/>
    </style:style>
    <style:style style:name="T37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76" style:parent-style-name="Normal" style:family="paragraph">
      <style:paragraph-properties fo:margin-bottom="0in" fo:line-height="125%" fo:margin-right="0.0416in" fo:background-color="#262523"/>
    </style:style>
    <style:style style:name="T37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78" style:parent-style-name="Normal" style:family="paragraph">
      <style:paragraph-properties fo:margin-bottom="0in" fo:line-height="125%" fo:margin-right="0.0416in" fo:background-color="#262523"/>
    </style:style>
    <style:style style:name="T37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80" style:parent-style-name="Normal" style:family="paragraph">
      <style:paragraph-properties fo:margin-bottom="0in" fo:line-height="125%" fo:margin-right="0.0416in" fo:background-color="#262523"/>
    </style:style>
    <style:style style:name="T38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82" style:parent-style-name="Normal" style:family="paragraph">
      <style:paragraph-properties fo:margin-bottom="0in" fo:line-height="125%" fo:margin-right="0.0416in" fo:background-color="#262523"/>
    </style:style>
    <style:style style:name="T38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84" style:parent-style-name="Normal" style:family="paragraph">
      <style:paragraph-properties fo:margin-bottom="0in" fo:line-height="125%" fo:margin-right="0.0416in" fo:background-color="#262523"/>
    </style:style>
    <style:style style:name="T38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86" style:parent-style-name="Normal" style:family="paragraph">
      <style:paragraph-properties fo:margin-bottom="0in" fo:line-height="125%" fo:margin-right="0.0416in" fo:background-color="#262523"/>
    </style:style>
    <style:style style:name="T38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88" style:parent-style-name="Normal" style:family="paragraph">
      <style:paragraph-properties fo:margin-bottom="0in" fo:line-height="125%" fo:margin-right="0.0416in" fo:background-color="#262523"/>
    </style:style>
    <style:style style:name="T38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90" style:parent-style-name="Normal" style:family="paragraph">
      <style:paragraph-properties fo:margin-bottom="0in" fo:line-height="125%" fo:margin-right="0.0416in" fo:background-color="#262523"/>
    </style:style>
    <style:style style:name="T39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92" style:parent-style-name="Normal" style:family="paragraph">
      <style:paragraph-properties fo:margin-bottom="0in" fo:line-height="125%" fo:margin-right="0.0416in" fo:background-color="#262523"/>
    </style:style>
    <style:style style:name="T39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94" style:parent-style-name="Normal" style:family="paragraph">
      <style:paragraph-properties fo:margin-bottom="0in" fo:line-height="125%" fo:margin-right="0.0416in" fo:background-color="#262523"/>
    </style:style>
    <style:style style:name="T39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396" style:parent-style-name="Normal" style:family="paragraph">
      <style:paragraph-properties fo:text-align="center" fo:margin-bottom="0in" fo:margin-right="0.1041in" fo:background-color="#262523"/>
    </style:style>
    <style:style style:name="P397" style:parent-style-name="Normal" style:family="paragraph">
      <style:paragraph-properties fo:margin-bottom="0in" fo:line-height="100%" fo:margin-right="0.0416in" fo:background-color="#262523"/>
    </style:style>
    <style:style style:name="T398"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399" style:parent-style-name="Normal" style:family="paragraph">
      <style:paragraph-properties fo:margin-bottom="0in" fo:line-height="100%" fo:margin-right="0.0416in" fo:background-color="#262523"/>
    </style:style>
    <style:style style:name="T400"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401" style:parent-style-name="Normal" style:family="paragraph">
      <style:paragraph-properties fo:margin-bottom="0in" fo:line-height="125%" fo:margin-right="0.0416in" fo:background-color="#262523"/>
    </style:style>
    <style:style style:name="T40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03" style:parent-style-name="Normal" style:family="paragraph">
      <style:paragraph-properties fo:margin-bottom="0in" fo:line-height="125%" fo:margin-right="0.0416in" fo:background-color="#262523"/>
    </style:style>
    <style:style style:name="T40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05" style:parent-style-name="Normal" style:family="paragraph">
      <style:paragraph-properties fo:text-align="center" fo:margin-bottom="0in" fo:margin-right="0.1041in" fo:background-color="#262523"/>
    </style:style>
    <style:style style:name="P406" style:parent-style-name="Normal" style:family="paragraph">
      <style:paragraph-properties fo:margin-bottom="0in" fo:line-height="100%" fo:margin-right="0.0416in" fo:background-color="#262523"/>
    </style:style>
    <style:style style:name="T407"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408" style:parent-style-name="Normal" style:family="paragraph">
      <style:paragraph-properties fo:margin-bottom="0in" fo:line-height="100%" fo:margin-right="0.0416in" fo:background-color="#262523"/>
    </style:style>
    <style:style style:name="T409"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410" style:parent-style-name="Normal" style:family="paragraph">
      <style:paragraph-properties fo:margin-bottom="0in" fo:line-height="125%" fo:margin-right="0.0416in" fo:background-color="#262523"/>
    </style:style>
    <style:style style:name="T41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12" style:parent-style-name="Normal" style:family="paragraph">
      <style:paragraph-properties fo:margin-bottom="0in" fo:line-height="125%" fo:margin-right="0.0416in" fo:background-color="#262523"/>
    </style:style>
    <style:style style:name="T41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14" style:parent-style-name="Normal" style:family="paragraph">
      <style:paragraph-properties fo:text-align="center" fo:margin-bottom="0in" fo:margin-right="0.1041in" fo:background-color="#262523"/>
    </style:style>
    <style:style style:name="P415" style:parent-style-name="Normal" style:family="paragraph">
      <style:paragraph-properties fo:margin-bottom="0in" fo:line-height="100%" fo:margin-right="0.0416in" fo:background-color="#262523"/>
    </style:style>
    <style:style style:name="T416"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417" style:parent-style-name="Normal" style:family="paragraph">
      <style:paragraph-properties fo:margin-bottom="0in" fo:line-height="100%" fo:margin-right="0.0416in" fo:background-color="#262523"/>
    </style:style>
    <style:style style:name="T418"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419" style:parent-style-name="Normal" style:family="paragraph">
      <style:paragraph-properties fo:margin-bottom="0in" fo:line-height="125%" fo:margin-right="0.0416in" fo:background-color="#262523"/>
    </style:style>
    <style:style style:name="T420"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21" style:parent-style-name="Normal" style:family="paragraph">
      <style:paragraph-properties fo:margin-bottom="0in" fo:line-height="125%" fo:margin-right="0.0416in" fo:background-color="#262523"/>
    </style:style>
    <style:style style:name="T42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23" style:parent-style-name="Normal" style:family="paragraph">
      <style:paragraph-properties fo:margin-bottom="0in" fo:line-height="125%" fo:margin-right="0.0416in" fo:background-color="#262523"/>
    </style:style>
    <style:style style:name="T42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25" style:parent-style-name="Normal" style:family="paragraph">
      <style:paragraph-properties fo:margin-bottom="0in" fo:line-height="125%" fo:margin-right="0.0416in" fo:background-color="#262523"/>
    </style:style>
    <style:style style:name="T42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27" style:parent-style-name="Normal" style:family="paragraph">
      <style:paragraph-properties fo:text-align="center" fo:margin-bottom="0in" fo:margin-right="0.1041in" fo:background-color="#262523"/>
    </style:style>
    <style:style style:name="P428" style:parent-style-name="Normal" style:family="paragraph">
      <style:paragraph-properties fo:margin-bottom="0in" fo:line-height="100%" fo:margin-right="0.0416in" fo:background-color="#262523"/>
    </style:style>
    <style:style style:name="T429"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430" style:parent-style-name="Normal" style:family="paragraph">
      <style:paragraph-properties fo:margin-bottom="0in" fo:line-height="100%" fo:margin-right="0.0416in" fo:background-color="#262523"/>
    </style:style>
    <style:style style:name="T431"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432" style:parent-style-name="Normal" style:family="paragraph">
      <style:paragraph-properties fo:margin-bottom="0in" fo:line-height="125%" fo:margin-right="0.0416in" fo:background-color="#262523"/>
    </style:style>
    <style:style style:name="T43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34" style:parent-style-name="Normal" style:family="paragraph">
      <style:paragraph-properties fo:margin-bottom="0in" fo:line-height="125%" fo:margin-right="0.0416in" fo:background-color="#262523"/>
    </style:style>
    <style:style style:name="T43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36" style:parent-style-name="Normal" style:family="paragraph">
      <style:paragraph-properties fo:text-align="center" fo:margin-bottom="0in" fo:margin-right="0.1041in" fo:background-color="#262523"/>
    </style:style>
    <style:style style:name="P437" style:parent-style-name="Normal" style:family="paragraph">
      <style:paragraph-properties fo:margin-bottom="0in" fo:line-height="100%" fo:margin-right="0.0416in" fo:background-color="#262523"/>
    </style:style>
    <style:style style:name="T438"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439" style:parent-style-name="Normal" style:family="paragraph">
      <style:paragraph-properties fo:margin-bottom="0in" fo:line-height="100%" fo:margin-right="0.0416in" fo:background-color="#262523"/>
    </style:style>
    <style:style style:name="T440"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441" style:parent-style-name="Normal" style:family="paragraph">
      <style:paragraph-properties fo:margin-bottom="0in" fo:line-height="125%" fo:margin-right="0.0416in" fo:background-color="#262523"/>
    </style:style>
    <style:style style:name="T44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43" style:parent-style-name="Normal" style:family="paragraph">
      <style:paragraph-properties fo:margin-bottom="0in" fo:line-height="125%" fo:margin-right="0.0416in" fo:background-color="#262523"/>
    </style:style>
    <style:style style:name="T44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45" style:parent-style-name="Normal" style:family="paragraph">
      <style:paragraph-properties fo:text-align="center" fo:margin-bottom="0in" fo:margin-right="0.1041in" fo:background-color="#262523"/>
    </style:style>
    <style:style style:name="P446" style:parent-style-name="Normal" style:family="paragraph">
      <style:paragraph-properties fo:margin-bottom="0in" fo:line-height="100%" fo:margin-right="0.0416in" fo:background-color="#262523"/>
    </style:style>
    <style:style style:name="T447"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448" style:parent-style-name="Normal" style:family="paragraph">
      <style:paragraph-properties fo:margin-bottom="0in" fo:line-height="100%" fo:margin-right="0.0416in" fo:background-color="#262523"/>
    </style:style>
    <style:style style:name="T449"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450" style:parent-style-name="Normal" style:family="paragraph">
      <style:paragraph-properties fo:margin-bottom="0in" fo:line-height="125%" fo:margin-right="0.0416in" fo:background-color="#262523"/>
    </style:style>
    <style:style style:name="T45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52" style:parent-style-name="Normal" style:family="paragraph">
      <style:paragraph-properties fo:margin-bottom="0in" fo:line-height="125%" fo:margin-right="0.0416in" fo:background-color="#262523"/>
    </style:style>
    <style:style style:name="T45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54" style:parent-style-name="Normal" style:family="paragraph">
      <style:paragraph-properties fo:text-align="center" fo:margin-bottom="0in" fo:margin-right="0.1041in" fo:background-color="#262523"/>
    </style:style>
    <style:style style:name="P455" style:parent-style-name="Normal" style:family="paragraph">
      <style:paragraph-properties fo:margin-bottom="0in" fo:line-height="100%" fo:margin-right="0.0416in" fo:background-color="#262523"/>
    </style:style>
    <style:style style:name="T456"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457" style:parent-style-name="Normal" style:family="paragraph">
      <style:paragraph-properties fo:margin-bottom="0in" fo:line-height="100%" fo:margin-right="0.0416in" fo:background-color="#262523"/>
    </style:style>
    <style:style style:name="T458"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459" style:parent-style-name="Normal" style:family="paragraph">
      <style:paragraph-properties fo:margin-bottom="0in" fo:line-height="125%" fo:margin-right="0.0416in" fo:background-color="#262523"/>
    </style:style>
    <style:style style:name="T460"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61" style:parent-style-name="Normal" style:family="paragraph">
      <style:paragraph-properties fo:margin-bottom="0in" fo:line-height="125%" fo:margin-right="0.0416in" fo:background-color="#262523"/>
    </style:style>
    <style:style style:name="T46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63" style:parent-style-name="Normal" style:family="paragraph">
      <style:paragraph-properties fo:margin-bottom="0in" fo:line-height="125%" fo:margin-right="0.0416in" fo:background-color="#262523"/>
    </style:style>
    <style:style style:name="T46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65" style:parent-style-name="Normal" style:family="paragraph">
      <style:paragraph-properties fo:margin-bottom="0in" fo:line-height="125%" fo:margin-right="0.0416in" fo:background-color="#262523"/>
    </style:style>
    <style:style style:name="T46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67" style:parent-style-name="Normal" style:family="paragraph">
      <style:paragraph-properties fo:text-align="center" fo:margin-bottom="0in" fo:margin-right="0.1041in" fo:background-color="#262523"/>
    </style:style>
    <style:style style:name="P468" style:parent-style-name="Normal" style:family="paragraph">
      <style:paragraph-properties fo:margin-bottom="0in" fo:line-height="100%" fo:margin-right="0.0416in" fo:background-color="#262523"/>
    </style:style>
    <style:style style:name="T469"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470" style:parent-style-name="Normal" style:family="paragraph">
      <style:paragraph-properties fo:margin-bottom="0in" fo:line-height="100%" fo:margin-right="0.0416in" fo:background-color="#262523"/>
    </style:style>
    <style:style style:name="T471"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472" style:parent-style-name="Normal" style:family="paragraph">
      <style:paragraph-properties fo:margin-bottom="0in" fo:line-height="125%" fo:margin-right="0.0416in" fo:background-color="#262523"/>
    </style:style>
    <style:style style:name="T47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74" style:parent-style-name="Normal" style:family="paragraph">
      <style:paragraph-properties fo:margin-bottom="0in" fo:line-height="125%" fo:margin-right="0.0416in" fo:background-color="#262523"/>
    </style:style>
    <style:style style:name="T47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76" style:parent-style-name="Normal" style:family="paragraph">
      <style:paragraph-properties fo:text-align="center" fo:margin-bottom="0in" fo:margin-right="0.1041in" fo:background-color="#262523"/>
    </style:style>
    <style:style style:name="P477" style:parent-style-name="Normal" style:family="paragraph">
      <style:paragraph-properties fo:margin-bottom="0in" fo:line-height="100%" fo:margin-right="0.0416in" fo:background-color="#262523"/>
    </style:style>
    <style:style style:name="T478"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479" style:parent-style-name="Normal" style:family="paragraph">
      <style:paragraph-properties fo:margin-bottom="0in" fo:line-height="100%" fo:margin-right="0.0416in" fo:background-color="#262523"/>
    </style:style>
    <style:style style:name="T480"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481" style:parent-style-name="Normal" style:family="paragraph">
      <style:paragraph-properties fo:margin-bottom="0in" fo:line-height="125%" fo:margin-right="0.0416in" fo:background-color="#262523"/>
    </style:style>
    <style:style style:name="T48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83" style:parent-style-name="Normal" style:family="paragraph">
      <style:paragraph-properties fo:margin-bottom="0in" fo:line-height="125%" fo:margin-right="0.0416in" fo:background-color="#262523"/>
    </style:style>
    <style:style style:name="T48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85" style:parent-style-name="Normal" style:family="paragraph">
      <style:paragraph-properties fo:margin-bottom="0in" fo:line-height="125%" fo:margin-right="0.0416in" fo:background-color="#262523"/>
    </style:style>
    <style:style style:name="T48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87" style:parent-style-name="Normal" style:family="paragraph">
      <style:paragraph-properties fo:margin-bottom="0in" fo:line-height="125%" fo:margin-right="0.0416in" fo:background-color="#262523"/>
    </style:style>
    <style:style style:name="T488"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89" style:parent-style-name="Normal" style:family="paragraph">
      <style:paragraph-properties fo:text-align="center" fo:margin-bottom="0in" fo:margin-right="0.1041in" fo:background-color="#262523"/>
    </style:style>
    <style:style style:name="P490" style:parent-style-name="Normal" style:family="paragraph">
      <style:paragraph-properties fo:margin-bottom="0in" fo:line-height="100%" fo:margin-right="0.0416in" fo:background-color="#262523"/>
    </style:style>
    <style:style style:name="T491"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492" style:parent-style-name="Normal" style:family="paragraph">
      <style:paragraph-properties fo:margin-bottom="0in" fo:line-height="100%" fo:margin-right="0.0416in" fo:background-color="#262523"/>
    </style:style>
    <style:style style:name="T493"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494" style:parent-style-name="Normal" style:family="paragraph">
      <style:paragraph-properties fo:margin-bottom="0in" fo:line-height="125%" fo:margin-right="0.0416in" fo:background-color="#262523"/>
    </style:style>
    <style:style style:name="T49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96" style:parent-style-name="Normal" style:family="paragraph">
      <style:paragraph-properties fo:margin-bottom="0in" fo:line-height="125%" fo:margin-right="0.0416in" fo:background-color="#262523"/>
    </style:style>
    <style:style style:name="T49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498" style:parent-style-name="Normal" style:family="paragraph">
      <style:paragraph-properties fo:text-align="center" fo:margin-bottom="0in" fo:margin-right="0.1041in" fo:background-color="#262523"/>
    </style:style>
    <style:style style:name="P499" style:parent-style-name="Normal" style:family="paragraph">
      <style:paragraph-properties fo:margin-bottom="0in" fo:line-height="100%" fo:margin-right="0.0416in" fo:background-color="#262523"/>
    </style:style>
    <style:style style:name="T500"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501" style:parent-style-name="Normal" style:family="paragraph">
      <style:paragraph-properties fo:margin-bottom="0in" fo:line-height="100%" fo:margin-right="0.0416in" fo:background-color="#262523"/>
    </style:style>
    <style:style style:name="T502"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503" style:parent-style-name="Normal" style:family="paragraph">
      <style:paragraph-properties fo:margin-bottom="0in" fo:line-height="125%" fo:margin-right="0.0416in" fo:background-color="#262523"/>
    </style:style>
    <style:style style:name="T50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05" style:parent-style-name="Normal" style:family="paragraph">
      <style:paragraph-properties fo:margin-bottom="0in" fo:line-height="125%" fo:margin-right="0.0416in" fo:background-color="#262523"/>
    </style:style>
    <style:style style:name="T50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07" style:parent-style-name="Normal" style:family="paragraph">
      <style:paragraph-properties fo:text-align="center" fo:margin-bottom="0in" fo:margin-right="0.1041in" fo:background-color="#262523"/>
    </style:style>
    <style:style style:name="P508" style:parent-style-name="Normal" style:family="paragraph">
      <style:paragraph-properties fo:margin-bottom="0in" fo:line-height="100%" fo:margin-right="0.0416in" fo:background-color="#262523"/>
    </style:style>
    <style:style style:name="T509"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510" style:parent-style-name="Normal" style:family="paragraph">
      <style:paragraph-properties fo:margin-bottom="0in" fo:line-height="100%" fo:margin-right="0.0416in" fo:background-color="#262523"/>
    </style:style>
    <style:style style:name="T511"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512" style:parent-style-name="Normal" style:family="paragraph">
      <style:paragraph-properties fo:margin-bottom="0in" fo:line-height="125%" fo:margin-right="0.0416in" fo:background-color="#262523"/>
    </style:style>
    <style:style style:name="T51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14" style:parent-style-name="Normal" style:family="paragraph">
      <style:paragraph-properties fo:margin-bottom="0in" fo:line-height="125%" fo:margin-right="0.0416in" fo:background-color="#262523"/>
    </style:style>
    <style:style style:name="T51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16" style:parent-style-name="Normal" style:family="paragraph">
      <style:paragraph-properties fo:text-align="center" fo:margin-bottom="0in" fo:margin-right="0.1041in" fo:background-color="#262523"/>
    </style:style>
    <style:style style:name="P517" style:parent-style-name="Normal" style:family="paragraph">
      <style:paragraph-properties fo:margin-bottom="0in" fo:line-height="100%" fo:margin-right="0.0416in" fo:background-color="#262523"/>
    </style:style>
    <style:style style:name="T518"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519" style:parent-style-name="Normal" style:family="paragraph">
      <style:paragraph-properties fo:margin-bottom="0in" fo:line-height="100%" fo:margin-right="0.0416in" fo:background-color="#262523"/>
    </style:style>
    <style:style style:name="T520"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521" style:parent-style-name="Normal" style:family="paragraph">
      <style:paragraph-properties fo:margin-bottom="0in" fo:line-height="125%" fo:margin-right="0.0416in" fo:background-color="#262523"/>
    </style:style>
    <style:style style:name="T52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23" style:parent-style-name="Normal" style:family="paragraph">
      <style:paragraph-properties fo:margin-bottom="0in" fo:line-height="125%" fo:margin-right="0.0416in" fo:background-color="#262523"/>
    </style:style>
    <style:style style:name="T52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25" style:parent-style-name="Normal" style:family="paragraph">
      <style:paragraph-properties fo:text-align="center" fo:margin-bottom="0in" fo:margin-right="0.1041in" fo:background-color="#262523"/>
    </style:style>
    <style:style style:name="P526" style:parent-style-name="Normal" style:family="paragraph">
      <style:paragraph-properties fo:margin-bottom="0in" fo:line-height="100%" fo:margin-right="0.0416in" fo:background-color="#262523"/>
    </style:style>
    <style:style style:name="T527"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528" style:parent-style-name="Normal" style:family="paragraph">
      <style:paragraph-properties fo:margin-bottom="0in" fo:line-height="100%" fo:margin-right="0.0416in" fo:background-color="#262523"/>
    </style:style>
    <style:style style:name="T529"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530" style:parent-style-name="Normal" style:family="paragraph">
      <style:paragraph-properties fo:margin-bottom="0in" fo:line-height="125%" fo:margin-right="0.0416in" fo:background-color="#262523"/>
    </style:style>
    <style:style style:name="T53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32" style:parent-style-name="Normal" style:family="paragraph">
      <style:paragraph-properties fo:margin-bottom="0in" fo:line-height="125%" fo:margin-right="0.0416in" fo:background-color="#262523"/>
    </style:style>
    <style:style style:name="T53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34" style:parent-style-name="Normal" style:family="paragraph">
      <style:paragraph-properties fo:margin-bottom="0in" fo:line-height="125%" fo:margin-right="0.0416in" fo:background-color="#262523"/>
    </style:style>
    <style:style style:name="T53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36" style:parent-style-name="Normal" style:family="paragraph">
      <style:paragraph-properties fo:margin-bottom="0in" fo:line-height="125%" fo:margin-right="0.0416in" fo:background-color="#262523"/>
    </style:style>
    <style:style style:name="T53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38" style:parent-style-name="Normal" style:family="paragraph">
      <style:paragraph-properties fo:margin-bottom="0in" fo:line-height="125%" fo:margin-right="0.0416in" fo:background-color="#262523"/>
    </style:style>
    <style:style style:name="T53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40" style:parent-style-name="Normal" style:family="paragraph">
      <style:paragraph-properties fo:margin-bottom="0in" fo:line-height="125%" fo:margin-right="0.0416in" fo:background-color="#262523"/>
    </style:style>
    <style:style style:name="T54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42" style:parent-style-name="Normal" style:family="paragraph">
      <style:paragraph-properties fo:margin-bottom="0in" fo:line-height="125%" fo:margin-right="0.0416in" fo:background-color="#262523"/>
    </style:style>
    <style:style style:name="T54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44" style:parent-style-name="Normal" style:family="paragraph">
      <style:paragraph-properties fo:margin-bottom="0in" fo:line-height="125%" fo:margin-right="0.0416in" fo:background-color="#262523"/>
    </style:style>
    <style:style style:name="T54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46" style:parent-style-name="Normal" style:family="paragraph">
      <style:paragraph-properties fo:text-align="center" fo:margin-bottom="0in" fo:line-height="200%" fo:margin-right="0.0416in" fo:background-color="#881798"/>
    </style:style>
    <style:style style:name="T547" style:parent-style-name="DefaultParagraphFont" style:family="text">
      <style:text-properties style:font-name="Segoe UI" style:font-name-asian="Segoe UI" style:font-name-complex="Segoe UI" fo:font-weight="bold" style:font-weight-asian="bold" style:font-weight-complex="bold" fo:color="#FFFFFF" fo:font-size="10.5pt" style:font-size-asian="10.5pt" style:font-size-complex="10.5pt"/>
    </style:style>
    <style:style style:name="P548" style:parent-style-name="Normal" style:family="paragraph">
      <style:paragraph-properties fo:margin-bottom="0in" fo:line-height="100%" fo:margin-right="0.0416in" fo:background-color="#262523"/>
    </style:style>
    <style:style style:name="T549"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550" style:parent-style-name="Normal" style:family="paragraph">
      <style:paragraph-properties fo:margin-bottom="0in" fo:line-height="100%" fo:margin-right="0.0416in" fo:background-color="#262523"/>
    </style:style>
    <style:style style:name="T551"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552" style:parent-style-name="Normal" style:family="paragraph">
      <style:paragraph-properties fo:margin-bottom="0in" fo:line-height="125%" fo:margin-right="0.0416in" fo:background-color="#262523"/>
    </style:style>
    <style:style style:name="T55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54" style:parent-style-name="Normal" style:family="paragraph">
      <style:paragraph-properties fo:margin-bottom="0in" fo:line-height="125%" fo:margin-right="0.0416in" fo:background-color="#262523"/>
    </style:style>
    <style:style style:name="T55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56" style:parent-style-name="Normal" style:family="paragraph">
      <style:paragraph-properties fo:text-align="center" fo:margin-bottom="0in" fo:margin-right="0.1041in" fo:background-color="#262523"/>
    </style:style>
    <style:style style:name="P557" style:parent-style-name="Normal" style:family="paragraph">
      <style:paragraph-properties fo:margin-bottom="0in" fo:line-height="100%" fo:margin-right="0.0416in" fo:background-color="#262523"/>
    </style:style>
    <style:style style:name="T558"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559" style:parent-style-name="Normal" style:family="paragraph">
      <style:paragraph-properties fo:margin-bottom="0in" fo:line-height="100%" fo:margin-right="0.0416in" fo:background-color="#262523"/>
    </style:style>
    <style:style style:name="T560"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561" style:parent-style-name="Normal" style:family="paragraph">
      <style:paragraph-properties fo:margin-bottom="0in" fo:line-height="125%" fo:margin-right="0.0416in" fo:background-color="#262523"/>
    </style:style>
    <style:style style:name="T56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63" style:parent-style-name="Normal" style:family="paragraph">
      <style:paragraph-properties fo:margin-bottom="0in" fo:line-height="125%" fo:margin-right="0.0416in" fo:background-color="#262523"/>
    </style:style>
    <style:style style:name="T56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65" style:parent-style-name="Normal" style:family="paragraph">
      <style:paragraph-properties fo:text-align="center" fo:margin-bottom="0in" fo:line-height="200%" fo:margin-right="0.0416in" fo:background-color="#881798"/>
    </style:style>
    <style:style style:name="T566" style:parent-style-name="DefaultParagraphFont" style:family="text">
      <style:text-properties style:font-name="Segoe UI" style:font-name-asian="Segoe UI" style:font-name-complex="Segoe UI" fo:font-weight="bold" style:font-weight-asian="bold" style:font-weight-complex="bold" fo:color="#FFFFFF" fo:font-size="10.5pt" style:font-size-asian="10.5pt" style:font-size-complex="10.5pt"/>
    </style:style>
    <style:style style:name="P567" style:parent-style-name="Normal" style:family="paragraph">
      <style:paragraph-properties fo:margin-bottom="0in" fo:line-height="100%" fo:margin-right="0.0416in" fo:background-color="#262523"/>
    </style:style>
    <style:style style:name="T568"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569" style:parent-style-name="Normal" style:family="paragraph">
      <style:paragraph-properties fo:margin-bottom="0in" fo:line-height="100%" fo:margin-right="0.0416in" fo:background-color="#262523"/>
    </style:style>
    <style:style style:name="T570"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571" style:parent-style-name="Normal" style:family="paragraph">
      <style:paragraph-properties fo:margin-bottom="0in" fo:line-height="125%" fo:margin-right="0.0416in" fo:background-color="#262523"/>
    </style:style>
    <style:style style:name="T57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73" style:parent-style-name="Normal" style:family="paragraph">
      <style:paragraph-properties fo:margin-bottom="0in" fo:line-height="125%" fo:margin-right="0.0416in" fo:background-color="#262523"/>
    </style:style>
    <style:style style:name="T57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75" style:parent-style-name="Normal" style:family="paragraph">
      <style:paragraph-properties fo:margin-bottom="0in" fo:line-height="125%" fo:margin-right="0.0416in" fo:background-color="#262523"/>
    </style:style>
    <style:style style:name="T57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77" style:parent-style-name="Normal" style:family="paragraph">
      <style:paragraph-properties fo:margin-bottom="0in" fo:line-height="125%" fo:margin-right="0.0416in" fo:background-color="#262523"/>
    </style:style>
    <style:style style:name="T578"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79" style:parent-style-name="Normal" style:family="paragraph">
      <style:paragraph-properties fo:text-align="center" fo:margin-bottom="0in" fo:margin-right="0.1041in" fo:background-color="#262523"/>
    </style:style>
    <style:style style:name="P580" style:parent-style-name="Normal" style:family="paragraph">
      <style:paragraph-properties fo:margin-bottom="0in" fo:line-height="100%" fo:margin-right="0.0416in" fo:background-color="#262523"/>
    </style:style>
    <style:style style:name="T581"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582" style:parent-style-name="Normal" style:family="paragraph">
      <style:paragraph-properties fo:margin-bottom="0in" fo:line-height="100%" fo:margin-right="0.0416in" fo:background-color="#262523"/>
    </style:style>
    <style:style style:name="T583"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584" style:parent-style-name="Normal" style:family="paragraph">
      <style:paragraph-properties fo:margin-bottom="0in" fo:line-height="125%" fo:margin-right="0.0416in" fo:background-color="#262523"/>
    </style:style>
    <style:style style:name="T58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86" style:parent-style-name="Normal" style:family="paragraph">
      <style:paragraph-properties fo:margin-bottom="0in" fo:line-height="125%" fo:margin-right="0.0416in" fo:background-color="#262523"/>
    </style:style>
    <style:style style:name="T58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88" style:parent-style-name="Normal" style:family="paragraph">
      <style:paragraph-properties fo:margin-bottom="0in" fo:line-height="125%" fo:margin-right="0.0416in" fo:background-color="#262523"/>
    </style:style>
    <style:style style:name="T58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90" style:parent-style-name="Normal" style:family="paragraph">
      <style:paragraph-properties fo:margin-bottom="0in" fo:line-height="125%" fo:margin-right="0.0416in" fo:background-color="#262523"/>
    </style:style>
    <style:style style:name="T59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92" style:parent-style-name="Normal" style:family="paragraph">
      <style:paragraph-properties fo:margin-bottom="0in" fo:line-height="125%" fo:margin-right="0.0416in" fo:background-color="#262523"/>
    </style:style>
    <style:style style:name="T59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94" style:parent-style-name="Normal" style:family="paragraph">
      <style:paragraph-properties fo:margin-bottom="0in" fo:line-height="125%" fo:margin-right="0.0416in" fo:background-color="#262523"/>
    </style:style>
    <style:style style:name="T59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596" style:parent-style-name="Normal" style:family="paragraph">
      <style:paragraph-properties fo:text-align="center" fo:margin-bottom="0in" fo:line-height="200%" fo:margin-right="0.0416in" fo:background-color="#881798"/>
    </style:style>
    <style:style style:name="T597" style:parent-style-name="DefaultParagraphFont" style:family="text">
      <style:text-properties style:font-name="Segoe UI" style:font-name-asian="Segoe UI" style:font-name-complex="Segoe UI" fo:font-weight="bold" style:font-weight-asian="bold" style:font-weight-complex="bold" fo:color="#FFFFFF" fo:font-size="10.5pt" style:font-size-asian="10.5pt" style:font-size-complex="10.5pt"/>
    </style:style>
    <style:style style:name="P598" style:parent-style-name="Normal" style:family="paragraph">
      <style:paragraph-properties fo:margin-bottom="0in" fo:line-height="100%" fo:margin-right="0.0416in" fo:background-color="#262523"/>
    </style:style>
    <style:style style:name="T599"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600" style:parent-style-name="Normal" style:family="paragraph">
      <style:paragraph-properties fo:margin-bottom="0in" fo:line-height="100%" fo:margin-right="0.0416in" fo:background-color="#262523"/>
    </style:style>
    <style:style style:name="T601"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602" style:parent-style-name="Normal" style:family="paragraph">
      <style:paragraph-properties fo:margin-bottom="0in" fo:line-height="125%" fo:margin-right="0.0416in" fo:background-color="#262523"/>
    </style:style>
    <style:style style:name="T603"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04" style:parent-style-name="Normal" style:family="paragraph">
      <style:paragraph-properties fo:margin-bottom="0in" fo:line-height="125%" fo:margin-right="0.0416in" fo:background-color="#262523"/>
    </style:style>
    <style:style style:name="T60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06" style:parent-style-name="Normal" style:family="paragraph">
      <style:paragraph-properties fo:text-align="center" fo:margin-bottom="0in" fo:margin-right="0.1041in" fo:background-color="#262523"/>
    </style:style>
    <style:style style:name="P607" style:parent-style-name="Normal" style:family="paragraph">
      <style:paragraph-properties fo:margin-bottom="0in" fo:line-height="100%" fo:margin-right="0.0416in" fo:background-color="#262523"/>
    </style:style>
    <style:style style:name="T608"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609" style:parent-style-name="Normal" style:family="paragraph">
      <style:paragraph-properties fo:margin-bottom="0in" fo:line-height="100%" fo:margin-right="0.0416in" fo:background-color="#262523"/>
    </style:style>
    <style:style style:name="T610"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611" style:parent-style-name="Normal" style:family="paragraph">
      <style:paragraph-properties fo:margin-bottom="0in" fo:line-height="125%" fo:margin-right="0.0416in" fo:background-color="#262523"/>
    </style:style>
    <style:style style:name="T61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13" style:parent-style-name="Normal" style:family="paragraph">
      <style:paragraph-properties fo:margin-bottom="0in" fo:line-height="125%" fo:margin-right="0.0416in" fo:background-color="#262523"/>
    </style:style>
    <style:style style:name="T61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15" style:parent-style-name="Normal" style:family="paragraph">
      <style:paragraph-properties fo:margin-bottom="0in" fo:line-height="125%" fo:margin-right="0.0416in" fo:background-color="#262523"/>
    </style:style>
    <style:style style:name="T61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17" style:parent-style-name="Normal" style:family="paragraph">
      <style:paragraph-properties fo:margin-bottom="0in" fo:line-height="125%" fo:margin-right="0.0416in" fo:background-color="#262523"/>
    </style:style>
    <style:style style:name="T618"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19" style:parent-style-name="Normal" style:family="paragraph">
      <style:paragraph-properties fo:margin-bottom="0in" fo:line-height="125%" fo:margin-right="0.0416in" fo:background-color="#262523"/>
    </style:style>
    <style:style style:name="T620"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21" style:parent-style-name="Normal" style:family="paragraph">
      <style:paragraph-properties fo:margin-bottom="0in" fo:line-height="125%" fo:margin-right="0.0416in" fo:background-color="#262523"/>
    </style:style>
    <style:style style:name="T62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23" style:parent-style-name="Normal" style:family="paragraph">
      <style:paragraph-properties fo:text-align="center" fo:margin-bottom="0in" fo:line-height="200%" fo:margin-right="0.0416in" fo:background-color="#881798"/>
    </style:style>
    <style:style style:name="T624" style:parent-style-name="DefaultParagraphFont" style:family="text">
      <style:text-properties style:font-name="Segoe UI" style:font-name-asian="Segoe UI" style:font-name-complex="Segoe UI" fo:font-weight="bold" style:font-weight-asian="bold" style:font-weight-complex="bold" fo:color="#FFFFFF" fo:font-size="10.5pt" style:font-size-asian="10.5pt" style:font-size-complex="10.5pt"/>
    </style:style>
    <style:style style:name="P625" style:parent-style-name="Normal" style:family="paragraph">
      <style:paragraph-properties fo:margin-bottom="0in" fo:line-height="100%" fo:margin-right="0.0416in" fo:background-color="#262523"/>
    </style:style>
    <style:style style:name="T626"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627" style:parent-style-name="Normal" style:family="paragraph">
      <style:paragraph-properties fo:margin-bottom="0in" fo:line-height="100%" fo:margin-right="0.0416in" fo:background-color="#262523"/>
    </style:style>
    <style:style style:name="T628"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629" style:parent-style-name="Normal" style:family="paragraph">
      <style:paragraph-properties fo:margin-bottom="0in" fo:line-height="125%" fo:margin-right="0.0416in" fo:background-color="#262523"/>
    </style:style>
    <style:style style:name="T630"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31" style:parent-style-name="Normal" style:family="paragraph">
      <style:paragraph-properties fo:margin-bottom="0in" fo:line-height="125%" fo:margin-right="0.0416in" fo:background-color="#262523"/>
    </style:style>
    <style:style style:name="T63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33" style:parent-style-name="Normal" style:family="paragraph">
      <style:paragraph-properties fo:text-align="center" fo:margin-bottom="0in" fo:margin-right="0.1041in" fo:background-color="#262523"/>
    </style:style>
    <style:style style:name="P634" style:parent-style-name="Normal" style:family="paragraph">
      <style:paragraph-properties fo:margin-bottom="0in" fo:line-height="100%" fo:margin-right="0.0416in" fo:background-color="#262523"/>
    </style:style>
    <style:style style:name="T635"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636" style:parent-style-name="Normal" style:family="paragraph">
      <style:paragraph-properties fo:margin-bottom="0in" fo:line-height="100%" fo:margin-right="0.0416in" fo:background-color="#262523"/>
    </style:style>
    <style:style style:name="T637"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638" style:parent-style-name="Normal" style:family="paragraph">
      <style:paragraph-properties fo:margin-bottom="0in" fo:line-height="125%" fo:margin-right="0.0416in" fo:background-color="#262523"/>
    </style:style>
    <style:style style:name="T63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40" style:parent-style-name="Normal" style:family="paragraph">
      <style:paragraph-properties fo:margin-bottom="0in" fo:line-height="125%" fo:margin-right="0.0416in" fo:background-color="#262523"/>
    </style:style>
    <style:style style:name="T64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42" style:parent-style-name="Normal" style:family="paragraph">
      <style:paragraph-properties fo:text-align="center" fo:margin-bottom="0in" fo:line-height="200%" fo:margin-right="0.0416in" fo:background-color="#881798"/>
    </style:style>
    <style:style style:name="T643" style:parent-style-name="DefaultParagraphFont" style:family="text">
      <style:text-properties style:font-name="Segoe UI" style:font-name-asian="Segoe UI" style:font-name-complex="Segoe UI" fo:font-weight="bold" style:font-weight-asian="bold" style:font-weight-complex="bold" fo:color="#FFFFFF" fo:font-size="10.5pt" style:font-size-asian="10.5pt" style:font-size-complex="10.5pt"/>
    </style:style>
    <style:style style:name="P644" style:parent-style-name="Normal" style:family="paragraph">
      <style:paragraph-properties fo:margin-bottom="0in" fo:line-height="100%" fo:margin-right="0.0416in" fo:background-color="#262523"/>
    </style:style>
    <style:style style:name="T645"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646" style:parent-style-name="Normal" style:family="paragraph">
      <style:paragraph-properties fo:margin-bottom="0in" fo:line-height="100%" fo:margin-right="0.0416in" fo:background-color="#262523"/>
    </style:style>
    <style:style style:name="T647"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648" style:parent-style-name="Normal" style:family="paragraph">
      <style:paragraph-properties fo:margin-bottom="0in" fo:line-height="125%" fo:margin-right="0.0416in" fo:background-color="#262523"/>
    </style:style>
    <style:style style:name="T64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50" style:parent-style-name="Normal" style:family="paragraph">
      <style:paragraph-properties fo:margin-bottom="0in" fo:line-height="125%" fo:margin-right="0.0416in" fo:background-color="#262523"/>
    </style:style>
    <style:style style:name="T651"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52" style:parent-style-name="Normal" style:family="paragraph">
      <style:paragraph-properties fo:text-align="center" fo:margin-bottom="0in" fo:margin-right="0.1041in" fo:background-color="#262523"/>
    </style:style>
    <style:style style:name="P653" style:parent-style-name="Normal" style:family="paragraph">
      <style:paragraph-properties fo:margin-bottom="0in" fo:line-height="100%" fo:margin-right="0.0416in" fo:background-color="#262523"/>
    </style:style>
    <style:style style:name="T654"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655" style:parent-style-name="Normal" style:family="paragraph">
      <style:paragraph-properties fo:margin-bottom="0in" fo:line-height="100%" fo:margin-right="0.0416in" fo:background-color="#262523"/>
    </style:style>
    <style:style style:name="T656"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657" style:parent-style-name="Normal" style:family="paragraph">
      <style:paragraph-properties fo:margin-bottom="0in" fo:line-height="125%" fo:margin-right="0.0416in" fo:background-color="#262523"/>
    </style:style>
    <style:style style:name="T658"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59" style:parent-style-name="Normal" style:family="paragraph">
      <style:paragraph-properties fo:margin-bottom="0in" fo:line-height="125%" fo:margin-right="0.0416in" fo:background-color="#262523"/>
    </style:style>
    <style:style style:name="T660"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61" style:parent-style-name="Normal" style:family="paragraph">
      <style:paragraph-properties fo:text-align="center" fo:margin-bottom="0in" fo:margin-right="0.1041in" fo:background-color="#262523"/>
    </style:style>
    <style:style style:name="P662" style:parent-style-name="Normal" style:family="paragraph">
      <style:paragraph-properties fo:margin-bottom="0in" fo:line-height="100%" fo:margin-right="0.0416in" fo:background-color="#262523"/>
    </style:style>
    <style:style style:name="T663"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664" style:parent-style-name="Normal" style:family="paragraph">
      <style:paragraph-properties fo:margin-bottom="0in" fo:line-height="100%" fo:margin-right="0.0416in" fo:background-color="#262523"/>
    </style:style>
    <style:style style:name="T665"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666" style:parent-style-name="Normal" style:family="paragraph">
      <style:paragraph-properties fo:margin-bottom="0in" fo:line-height="125%" fo:margin-right="0.0416in" fo:background-color="#262523"/>
    </style:style>
    <style:style style:name="T66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68" style:parent-style-name="Normal" style:family="paragraph">
      <style:paragraph-properties fo:margin-bottom="0in" fo:line-height="125%" fo:margin-right="0.0416in" fo:background-color="#262523"/>
    </style:style>
    <style:style style:name="T669"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70" style:parent-style-name="Normal" style:family="paragraph">
      <style:paragraph-properties fo:text-align="center" fo:margin-bottom="0in" fo:margin-right="0.1041in" fo:background-color="#262523"/>
    </style:style>
    <style:style style:name="P671" style:parent-style-name="Normal" style:family="paragraph">
      <style:paragraph-properties fo:margin-bottom="0in" fo:line-height="100%" fo:margin-right="0.0416in" fo:background-color="#262523"/>
    </style:style>
    <style:style style:name="T672"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673" style:parent-style-name="Normal" style:family="paragraph">
      <style:paragraph-properties fo:margin-bottom="0in" fo:line-height="100%" fo:margin-right="0.0416in" fo:background-color="#262523"/>
    </style:style>
    <style:style style:name="T674"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675" style:parent-style-name="Normal" style:family="paragraph">
      <style:paragraph-properties fo:margin-bottom="0in" fo:line-height="125%" fo:margin-right="0.0416in" fo:background-color="#262523"/>
    </style:style>
    <style:style style:name="T67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77" style:parent-style-name="Normal" style:family="paragraph">
      <style:paragraph-properties fo:margin-bottom="0in" fo:line-height="125%" fo:margin-right="0.0416in" fo:background-color="#262523"/>
    </style:style>
    <style:style style:name="T678"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79" style:parent-style-name="Normal" style:family="paragraph">
      <style:paragraph-properties fo:margin-bottom="0in" fo:line-height="125%" fo:margin-right="0.0416in" fo:background-color="#262523"/>
    </style:style>
    <style:style style:name="T680"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81" style:parent-style-name="Normal" style:family="paragraph">
      <style:paragraph-properties fo:margin-bottom="0in" fo:line-height="125%" fo:margin-right="0.0416in" fo:background-color="#262523"/>
    </style:style>
    <style:style style:name="T68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83" style:parent-style-name="Normal" style:family="paragraph">
      <style:paragraph-properties fo:margin-bottom="0in" fo:line-height="125%" fo:margin-right="0.0416in" fo:background-color="#262523"/>
    </style:style>
    <style:style style:name="T68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85" style:parent-style-name="Normal" style:family="paragraph">
      <style:paragraph-properties fo:margin-bottom="0in" fo:line-height="125%" fo:margin-right="0.0416in" fo:background-color="#262523"/>
    </style:style>
    <style:style style:name="T68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87" style:parent-style-name="Normal" style:family="paragraph">
      <style:paragraph-properties fo:margin-bottom="0in" fo:line-height="125%" fo:margin-right="0.0416in" fo:background-color="#262523"/>
    </style:style>
    <style:style style:name="T688"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89" style:parent-style-name="Normal" style:family="paragraph">
      <style:paragraph-properties fo:margin-bottom="0in" fo:line-height="125%" fo:margin-right="0.0416in" fo:background-color="#262523"/>
    </style:style>
    <style:style style:name="T690"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91" style:parent-style-name="Normal" style:family="paragraph">
      <style:paragraph-properties fo:margin-bottom="0in" fo:line-height="125%" fo:margin-right="0.0416in" fo:background-color="#262523"/>
    </style:style>
    <style:style style:name="T692"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93" style:parent-style-name="Normal" style:family="paragraph">
      <style:paragraph-properties fo:margin-bottom="0in" fo:line-height="125%" fo:margin-right="0.0416in" fo:background-color="#262523"/>
    </style:style>
    <style:style style:name="T69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95" style:parent-style-name="Normal" style:family="paragraph">
      <style:paragraph-properties fo:margin-bottom="0in" fo:line-height="125%" fo:margin-right="0.0416in" fo:background-color="#262523"/>
    </style:style>
    <style:style style:name="T69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97" style:parent-style-name="Normal" style:family="paragraph">
      <style:paragraph-properties fo:margin-bottom="0in" fo:line-height="125%" fo:margin-right="0.0416in" fo:background-color="#262523"/>
    </style:style>
    <style:style style:name="T698"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699" style:parent-style-name="Normal" style:family="paragraph">
      <style:paragraph-properties fo:text-align="center" fo:margin-bottom="0in" fo:margin-right="0.1041in" fo:background-color="#262523"/>
    </style:style>
    <style:style style:name="P700" style:parent-style-name="Normal" style:family="paragraph">
      <style:paragraph-properties fo:margin-bottom="0in" fo:line-height="100%" fo:margin-right="0.0416in" fo:background-color="#262523"/>
    </style:style>
    <style:style style:name="T701"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702" style:parent-style-name="Normal" style:family="paragraph">
      <style:paragraph-properties fo:margin-bottom="0in" fo:line-height="100%" fo:margin-right="0.0416in" fo:background-color="#262523"/>
    </style:style>
    <style:style style:name="T703"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704" style:parent-style-name="Normal" style:family="paragraph">
      <style:paragraph-properties fo:margin-bottom="0in" fo:line-height="125%" fo:margin-right="0.0416in" fo:background-color="#262523"/>
    </style:style>
    <style:style style:name="T705"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706" style:parent-style-name="Normal" style:family="paragraph">
      <style:paragraph-properties fo:margin-bottom="0in" fo:line-height="125%" fo:margin-right="0.0416in" fo:background-color="#262523"/>
    </style:style>
    <style:style style:name="T707"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708" style:parent-style-name="Normal" style:family="paragraph">
      <style:paragraph-properties fo:text-align="center" fo:margin-bottom="0in" fo:margin-right="0.1041in" fo:background-color="#262523"/>
    </style:style>
    <style:style style:name="P709" style:parent-style-name="Normal" style:family="paragraph">
      <style:paragraph-properties fo:margin-bottom="0in" fo:line-height="100%" fo:margin-right="0.0416in" fo:background-color="#262523"/>
    </style:style>
    <style:style style:name="T710"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711" style:parent-style-name="Normal" style:family="paragraph">
      <style:paragraph-properties fo:margin-bottom="0in" fo:line-height="100%" fo:margin-right="0.0416in" fo:background-color="#262523"/>
    </style:style>
    <style:style style:name="T712"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713" style:parent-style-name="Normal" style:family="paragraph">
      <style:paragraph-properties fo:margin-bottom="0in" fo:line-height="125%" fo:margin-right="0.0416in" fo:background-color="#262523"/>
    </style:style>
    <style:style style:name="T71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715" style:parent-style-name="Normal" style:family="paragraph">
      <style:paragraph-properties fo:margin-bottom="0in" fo:line-height="125%" fo:margin-right="0.0416in" fo:background-color="#262523"/>
    </style:style>
    <style:style style:name="T71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717" style:parent-style-name="Normal" style:family="paragraph">
      <style:paragraph-properties fo:text-align="center" fo:margin-bottom="0in" fo:line-height="200%" fo:margin-right="0.0416in" fo:background-color="#881798"/>
    </style:style>
    <style:style style:name="T718" style:parent-style-name="DefaultParagraphFont" style:family="text">
      <style:text-properties style:font-name="Segoe UI" style:font-name-asian="Segoe UI" style:font-name-complex="Segoe UI" fo:font-weight="bold" style:font-weight-asian="bold" style:font-weight-complex="bold" fo:color="#FFFFFF" fo:font-size="10.5pt" style:font-size-asian="10.5pt" style:font-size-complex="10.5pt"/>
    </style:style>
    <style:style style:name="P719" style:parent-style-name="Normal" style:family="paragraph">
      <style:paragraph-properties fo:margin-bottom="0in" fo:line-height="100%" fo:margin-right="0.0416in" fo:background-color="#262523"/>
    </style:style>
    <style:style style:name="T720" style:parent-style-name="DefaultParagraphFont" style:family="text">
      <style:text-properties style:font-name="BlinkMacSystemFont" style:font-name-asian="BlinkMacSystemFont" style:font-name-complex="BlinkMacSystemFont" fo:font-weight="bold" style:font-weight-asian="bold" style:font-weight-complex="bold" fo:color="#F8F7F6" fo:font-size="9pt" style:font-size-asian="9pt" style:font-size-complex="9pt"/>
    </style:style>
    <style:style style:name="P721" style:parent-style-name="Normal" style:family="paragraph">
      <style:paragraph-properties fo:margin-bottom="0in" fo:line-height="100%" fo:margin-right="0.0416in" fo:background-color="#262523"/>
    </style:style>
    <style:style style:name="T722" style:parent-style-name="DefaultParagraphFont" style:family="text">
      <style:text-properties style:font-name="BlinkMacSystemFont" style:font-name-asian="BlinkMacSystemFont" style:font-name-complex="BlinkMacSystemFont" fo:color="#F8F7F6" fo:font-size="9pt" style:font-size-asian="9pt" style:font-size-complex="9pt"/>
    </style:style>
    <style:style style:name="P723" style:parent-style-name="Normal" style:family="paragraph">
      <style:paragraph-properties fo:margin-bottom="0in" fo:line-height="125%" fo:margin-right="0.0416in" fo:background-color="#262523"/>
    </style:style>
    <style:style style:name="T724"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name="P725" style:parent-style-name="Normal" style:family="paragraph">
      <style:paragraph-properties fo:margin-bottom="0in" fo:line-height="125%" fo:margin-right="0.0416in" fo:background-color="#262523"/>
    </style:style>
    <style:style style:name="T726" style:parent-style-name="DefaultParagraphFont" style:family="text">
      <style:text-properties style:font-name="BlinkMacSystemFont" style:font-name-asian="BlinkMacSystemFont" style:font-name-complex="BlinkMacSystemFont" fo:color="#F3F2F1" fo:font-size="10.5pt" style:font-size-asian="10.5pt" style:font-size-complex="10.5p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
      <text:p text:style-name="P2"><text:span text:style-name="T3"></text:span></text:p>
      <text:p text:style-name="P4"><text:span text:style-name="T5"></text:span></text:p>
      <text:p text:style-name="P6"><text:span text:style-name="T7"></text:span></text:p>
      <text:p text:style-name="P8"><text:span text:style-name="T9">AI-generated content may be incorrect</text:span></text:p>
      <text:p text:style-name="P10"><text:span text:style-name="T11"></text:span><text:span text:style-name="T12"></text:span></text:p>
      <text:p text:style-name="P13"><text:span text:style-name="T14">Manish Tomar</text:span><text:span text:style-name="T15"><text:s/>started transcription</text:span></text:p>
      <text:p text:style-name="P16"><draw:frame draw:style-name="a0" draw:name="drawing" text:anchor-type="as-char" svg:x="0in" svg:y="0in" svg:width="0.375in" svg:height="0.375in" style:rel-width="scale" style:rel-height="scale"><draw:image xlink:href="media/image1.png" xlink:type="simple" xlink:show="embed" xlink:actuate="onLoad"/><svg:title/><svg:desc>F,{2746cc49-284a-40ca-923c-fb3909d8f20e}{64},0.6458333,0.6458333</svg:desc></draw:frame></text:p>
      <text:p text:style-name="P17"><text:span text:style-name="T18">Manish Tomar</text:span></text:p>
      <text:p text:style-name="P19"><text:span text:style-name="T20">0 minutes 15 seconds0:15</text:span></text:p>
      <text:p text:style-name="P21"><text:span text:style-name="T22">Manish Tomar 0 minutes 15 seconds</text:span></text:p>
      <text:p text:style-name="P23"><text:span text:style-name="T24">OK, so, as I mentioned, each, so the way, sorry, the way we are going to, ohh, let me share my screen.</text:span></text:p>
      <text:p text:style-name="P25"><text:span text:style-name="T26">Manish Tomar 0 minutes 31 seconds</text:span></text:p>
      <text:p text:style-name="P27"><text:span text:style-name="T28">Kao.</text:span></text:p>
      <text:p text:style-name="P29"><text:span text:style-name="T30">Manish Tomar 0 minutes 34 seconds</text:span></text:p>
      <text:p text:style-name="P31"><text:span text:style-name="T32">So we're going to be having each cluster will get its own bucket. We'll probably name it like this instance followed by the ID and then snapshots. It'll get 2 buckets basically and then instance, instance ID, audit logs. So as you can see for the particular cluster.</text:span></text:p>
      <text:p text:style-name="P33"><text:span text:style-name="T34">Manish Tomar 0 minutes 53 seconds</text:span></text:p>
      <text:p text:style-name="P35"><text:span text:style-name="T36">Logs are going to go in this bucket.</text:span></text:p>
      <text:p text:style-name="P37"><text:span text:style-name="T38">Manish Tomar 0 minutes 56 seconds</text:span></text:p>
      <text:p text:style-name="P39"><text:span text:style-name="T40">and snapshots are going to go into this bucket.</text:span></text:p>
      <text:p text:style-name="P41"><text:span text:style-name="T42">Manish Tomar 1 minute 1 second</text:span></text:p>
      <text:p text:style-name="P43"><text:span text:style-name="T44">So.</text:span></text:p>
      <text:p text:style-name="P45"><text:span text:style-name="T46">Manish Tomar 1 minute 3 seconds</text:span></text:p>
      <text:p text:style-name="P47"><text:span text:style-name="T48">The reasons I have described it here, you are welcome to read it. It basically gives out maximum isolation, which is kind of, it helps in getting federal compliance. We could store it in one bucket, but then the way you, because we are giving direct access to the...</text:span></text:p>
      <text:p text:style-name="P49"><text:span text:style-name="T50">Manish Tomar 1 minute 23 seconds</text:span></text:p>
      <text:p text:style-name="P51"><text:span text:style-name="T52">S3 bucket, it's probably better to have a separate bucket per cluster. So we're going to be doing that. And the way the, and so here's the important.</text:span></text:p>
      <text:p text:style-name="P53"><text:span text:style-name="T54">Manish Tomar 1 minute 33 seconds</text:span></text:p>
      <text:p text:style-name="P55"><text:span text:style-name="T56">Fit for user experience, so the way the workflow or the...</text:span></text:p>
      <text:p text:style-name="P57"><text:span text:style-name="T58">Manish Tomar 1 minute 42 seconds</text:span></text:p>
      <text:p text:style-name="P59"><text:span text:style-name="T60">Yeah, the process that's going to be followed is basically we have some screen where the user can configure audit logging, so I'm just assuming this is the same screen.</text:span></text:p>
      <text:p text:style-name="P61"><text:span text:style-name="T62">Benjamin Howard 7 minutes 46 seconds</text:span></text:p>
      <text:p text:style-name="P63"><text:span text:style-name="T64">Yeah.</text:span></text:p>
      <text:p text:style-name="P65"><draw:frame draw:style-name="a1" draw:name="drawing" text:anchor-type="as-char" svg:x="0in" svg:y="0in" svg:width="0.375in" svg:height="0.375in" style:rel-width="scale" style:rel-height="scale"><draw:image xlink:href="media/image1.png" xlink:type="simple" xlink:show="embed" xlink:actuate="onLoad"/><svg:title/><svg:desc>F,{634bdd81-fe8a-45f8-a3e3-acd7ad72edb0}{60},0.6458333,0.6458333</svg:desc></draw:frame></text:p>
      <text:p text:style-name="P66"><text:span text:style-name="T67">Manish Tomar</text:span></text:p>
      <text:p text:style-name="P68"><text:span text:style-name="T69">7 minutes 49 seconds7:49</text:span></text:p>
      <text:p text:style-name="P70"><text:span text:style-name="T71">Manish Tomar 7 minutes 49 seconds</text:span></text:p>
      <text:p text:style-name="P72"><text:span text:style-name="T73">And there should be some button somewhere saying, okay, enable access, provide the role we are in, and then they can enter that. Yeah.</text:span></text:p>
      <text:p text:style-name="P74"><draw:frame draw:style-name="a2" draw:name="drawing" text:anchor-type="as-char" svg:x="0in" svg:y="0in" svg:width="0.375in" svg:height="0.375in" style:rel-width="scale" style:rel-height="scale"><draw:image xlink:href="media/image1.png" xlink:type="simple" xlink:show="embed" xlink:actuate="onLoad"/><svg:title/><svg:desc>F,{634bdd81-fe8a-45f8-a3e3-acd7ad72edb0}{110},0.6458333,0.6458333</svg:desc></draw:frame></text:p>
      <text:p text:style-name="P75"><text:span text:style-name="T76">Benjamin Howard</text:span></text:p>
      <text:p text:style-name="P77"><text:span text:style-name="T78">7 minutes 53 seconds7:53</text:span></text:p>
      <text:p text:style-name="P79"><text:span text:style-name="T80">Benjamin Howard 7 minutes 53 seconds</text:span></text:p>
      <text:p text:style-name="P81"><text:span text:style-name="T82">Yep.</text:span></text:p>
      <text:p text:style-name="P83"><text:span text:style-name="T84">Benjamin Howard 7 minutes 55 seconds</text:span></text:p>
      <text:p text:style-name="P85"><text:span text:style-name="T86">Yeah, perfect. Thank you.</text:span></text:p>
      <text:p text:style-name="P87"><draw:frame draw:style-name="a3" draw:name="drawing" text:anchor-type="as-char" svg:x="0in" svg:y="0in" svg:width="0.375in" svg:height="0.375in" style:rel-width="scale" style:rel-height="scale"><draw:image xlink:href="media/image1.png" xlink:type="simple" xlink:show="embed" xlink:actuate="onLoad"/><svg:title/><svg:desc>F,{634bdd81-fe8a-45f8-a3e3-acd7ad72edb0}{180},0.6458333,0.6458333</svg:desc></draw:frame></text:p>
      <text:p text:style-name="P88"><text:span text:style-name="T89">Manish Tomar</text:span></text:p>
      <text:p text:style-name="P90"><text:span text:style-name="T91">7 minutes 58 seconds7:58</text:span></text:p>
      <text:p text:style-name="P92"><text:span text:style-name="T93">Manish Tomar 7 minutes 58 seconds</text:span></text:p>
      <text:p text:style-name="P94"><text:span text:style-name="T95">Yeah, and once they click on enable and they provide the role they are in, then the screen will change to saying, okay, access is enabled. And here are the two, and some extra pieces of information where it says our role name, it gives the customers role name, it gives the external ID, and then it gives some probably instructions as to how to access the S3 bucket. Like a sample AWS CLI.</text:span></text:p>
      <text:p text:style-name="P96"><text:span text:style-name="T97">Manish Tomar 8 minutes 20 seconds</text:span></text:p>
      <text:p text:style-name="P98"><text:span text:style-name="T99">commands that they can use to access the S3 bucket.</text:span></text:p>
      <text:p text:style-name="P100"><draw:frame draw:style-name="a4" draw:name="drawing" text:anchor-type="as-char" svg:x="0in" svg:y="0in" svg:width="0.375in" svg:height="0.375in" style:rel-width="scale" style:rel-height="scale"><draw:image xlink:href="media/image1.png" xlink:type="simple" xlink:show="embed" xlink:actuate="onLoad"/><svg:title/><svg:desc>F,{634bdd81-fe8a-45f8-a3e3-acd7ad72edb0}{250},0.6458333,0.6458333</svg:desc></draw:frame></text:p>
      <text:p text:style-name="P101"><text:span text:style-name="T102">Benjamin Howard</text:span></text:p>
      <text:p text:style-name="P103"><text:span text:style-name="T104">8 minutes 22 seconds8:22</text:span></text:p>
      <text:p text:style-name="P105"><text:span text:style-name="T106">Benjamin Howard 8 minutes 22 seconds</text:span></text:p>
      <text:p text:style-name="P107"><text:span text:style-name="T108">Yep, perfect.</text:span></text:p>
      <text:p text:style-name="P109"><draw:frame draw:style-name="a5" draw:name="drawing" text:anchor-type="as-char" svg:x="0in" svg:y="0in" svg:width="0.375in" svg:height="0.375in" style:rel-width="scale" style:rel-height="scale"><draw:image xlink:href="media/image1.png" xlink:type="simple" xlink:show="embed" xlink:actuate="onLoad"/><svg:title/><svg:desc>F,{a0669de8-7e75-44b8-bd33-b911b165891c}{45},0.6458333,0.6458333</svg:desc></draw:frame></text:p>
      <text:p text:style-name="P110"><text:span text:style-name="T111">Manish Tomar</text:span></text:p>
      <text:p text:style-name="P112"><text:span text:style-name="T113">8 minutes 23 seconds8:23</text:span></text:p>
      <text:p text:style-name="P114"><text:span text:style-name="T115">Manish Tomar 8 minutes 23 seconds</text:span></text:p>
      <text:p text:style-name="P116"><text:span text:style-name="T117">Yeah.</text:span></text:p>
      <text:p text:style-name="P118"><text:span text:style-name="T119">Manish Tomar 8 minutes 26 seconds</text:span></text:p>
      <text:p text:style-name="P120"><text:span text:style-name="T121">Yeah, and yeah, that's pretty much it from the UI, from the user experience. Once customers' role setup is done, they should be able to, you know, they should be able to use their roles chaining and be able to access the AWS API.</text:span></text:p>
      <text:p text:style-name="P122"><text:span text:style-name="T123">Manish Tomar 8 minutes 45 seconds</text:span></text:p>
      <text:p text:style-name="P124"><text:span text:style-name="T125">able to access the S3 bucket.</text:span></text:p>
      <text:p text:style-name="P126"><text:span text:style-name="T127">Manish Tomar 8 minutes 49 seconds</text:span></text:p>
      <text:p text:style-name="P128"><text:span text:style-name="T129">I think in terms of...</text:span></text:p>
      <text:p text:style-name="P130"><text:span text:style-name="T131">Manish Tomar 8 minutes 53 seconds</text:span></text:p>
      <text:p text:style-name="P132"><text:span text:style-name="T133">Uh, what do you call?</text:span></text:p>
      <text:p text:style-name="P134"><text:span text:style-name="T135">Manish Tomar 8 minutes 57 seconds</text:span></text:p>
      <text:p text:style-name="P136"><text:span text:style-name="T137">debugability of the system, like if things are not working, that's something you'll have to think about, like.</text:span></text:p>
      <text:p text:style-name="P138"><text:span text:style-name="T139">Manish Tomar 9 minutes 6 seconds</text:span></text:p>
      <text:p text:style-name="P140"><text:span text:style-name="T141">If the system can help in any way to see if...</text:span></text:p>
      <text:p text:style-name="P142"><text:span text:style-name="T143">Manish Tomar 9 minutes 10 seconds</text:span></text:p>
      <text:p text:style-name="P144"><text:span text:style-name="T145">It's all set up properly. The best I think the system can do is, this is what I put here. I think here, let me say instructions.</text:span></text:p>
      <text:p text:style-name="P146"><text:span text:style-name="T147">Manish Tomar 9 minutes 21 seconds</text:span></text:p>
      <text:p text:style-name="P148"><text:span text:style-name="T149">To.</text:span></text:p>
      <text:p text:style-name="P150"><text:span text:style-name="T151">Manish Tomar 9 minutes 24 seconds</text:span></text:p>
      <text:p text:style-name="P152"><text:span text:style-name="T153">Assume.</text:span></text:p>
      <text:p text:style-name="P154"><text:span text:style-name="T155">Manish Tomar 9 minutes 27 seconds</text:span></text:p>
      <text:p text:style-name="P156"><text:span text:style-name="T157">Or sample commands to.</text:span></text:p>
      <text:p text:style-name="P158"><text:span text:style-name="T159">Manish Tomar 9 minutes 31 seconds</text:span></text:p>
      <text:p text:style-name="P160"><text:span text:style-name="T161">Assume.</text:span></text:p>
      <text:p text:style-name="P162"><text:span text:style-name="T163">Manish Tomar 9 minutes 33 seconds</text:span></text:p>
      <text:p text:style-name="P164"><text:span text:style-name="T165">Rules.</text:span></text:p>
      <text:p text:style-name="P166"><text:span text:style-name="T167">Manish Tomar 9 minutes 37 seconds</text:span></text:p>
      <text:p text:style-name="P168"><text:span text:style-name="T169">And that is.</text:span></text:p>
      <text:p text:style-name="P170"><text:span text:style-name="T171">Manish Tomar 9 minutes 44 seconds</text:span></text:p>
      <text:p text:style-name="P172"><text:span text:style-name="T173">It.</text:span></text:p>
      <text:p text:style-name="P174"><text:span text:style-name="T175">Manish Tomar 9 minutes 46 seconds</text:span></text:p>
      <text:p text:style-name="P176"><text:span text:style-name="T177">Connie.</text:span></text:p>
      <text:p text:style-name="P178"><text:span text:style-name="T179">Manish Tomar 9 minutes 50 seconds</text:span></text:p>
      <text:p text:style-name="P180"><text:span text:style-name="T181">Ohh.</text:span></text:p>
      <text:p text:style-name="P182"><text:span text:style-name="T183">Manish Tomar 9 minutes 52 seconds</text:span></text:p>
      <text:p text:style-name="P184"><text:span text:style-name="T185">Not gonna sleep.</text:span></text:p>
      <text:p text:style-name="P186"><text:span text:style-name="T187">Manish Tomar 9 minutes 55 seconds</text:span></text:p>
      <text:p text:style-name="P188"><text:span text:style-name="T189">And then I think...</text:span></text:p>
      <text:p text:style-name="P190"><text:span text:style-name="T191">Manish Tomar 9 minutes 58 seconds</text:span></text:p>
      <text:p text:style-name="P192"><text:span text:style-name="T193">So, ideally, like...</text:span></text:p>
      <text:p text:style-name="P194"><text:span text:style-name="T195">Manish Tomar 10 minutes 1 second</text:span></text:p>
      <text:p text:style-name="P196"><text:span text:style-name="T197">Will be sample AWS commands that they can just copy paste and put it in their shell and run it and see if they can access the, you know, if their access to get the bucket is working, if it is not working.</text:span></text:p>
      <text:p text:style-name="P198"><text:span text:style-name="T199">Manish Tomar 10 minutes 14 seconds</text:span></text:p>
      <text:p text:style-name="P200"><text:span text:style-name="T201">Yeah, I think the best thing is for them to reach out through support. There's nothing much we can do beyond that. I think we could probably what we could do is...</text:span></text:p>
      <text:p text:style-name="P202"><text:span text:style-name="T203">Manish Tomar 10 minutes 24 seconds</text:span></text:p>
      <text:p text:style-name="P204"><text:span text:style-name="T205">Once they access it and it is working, we can say that, okay, this is the last time the role was assumed.</text:span></text:p>
      <text:p text:style-name="P206"><text:span text:style-name="T207">Manish Tomar 10 minutes 32 seconds</text:span></text:p>
      <text:p text:style-name="P208"><text:span text:style-name="T209">That's the best we can detect from our side. But if they have not set up the roles properly, they're not assuming well or their shell is broken. There's nothing much we can do beyond that.</text:span></text:p>
      <text:p text:style-name="P210"><text:span text:style-name="T211">Manish Tomar 10 minutes 43 seconds</text:span></text:p>
      <text:p text:style-name="P212"><text:span text:style-name="T213">Yeah, but this is I think this is like a to be to be done or probably nice to have.</text:span></text:p>
      <text:p text:style-name="P214"><text:span text:style-name="T215">Manish Tomar 10 minutes 52 seconds</text:span></text:p>
      <text:p text:style-name="P216"><text:span text:style-name="T217">You know, I'm just keeping it as like a something future thing. Assume it's not going to be there now, but maybe something that if customers ask or if product or if design thinks it's important.</text:span></text:p>
      <text:p text:style-name="P218"><text:span text:style-name="T219">Manish Tomar 11 minutes 7 seconds</text:span></text:p>
      <text:p text:style-name="P220"><text:span text:style-name="T221">So yeah, this is pretty much the user experience. And to power this experience on the UI, there's going to be 4 APIs.</text:span></text:p>
      <text:p text:style-name="P222"><text:span text:style-name="T223">Manish Tomar 11 minutes 18 seconds</text:span></text:p>
      <text:p text:style-name="P224"><text:span text:style-name="T225">The first one is get audit logging access, which will power the screen when you go there, and it will basically give you this four pieces of information, whether it is enabled, what was the role in our system that the user has to assume.</text:span></text:p>
      <text:p text:style-name="P226"><text:span text:style-name="T227">Manish Tomar 11 minutes 37 seconds</text:span></text:p>
      <text:p text:style-name="P228"><text:span text:style-name="T229">what is the customer role, and then the external ID.</text:span></text:p>
      <text:p text:style-name="P230"><text:span text:style-name="T231">Manish Tomar 11 minutes 42 seconds</text:span></text:p>
      <text:p text:style-name="P232"><text:span text:style-name="T233">The instructions are kind of like static. I think they can just be on, there's nothing needs to be coming from the API that can just be on the page.</text:span></text:p>
      <text:p text:style-name="P234"><text:span text:style-name="T235">Manish Tomar 11 minutes 51 seconds</text:span></text:p>
      <text:p text:style-name="P236"><text:span text:style-name="T237">And similarly, for the same API, if the response, if the access is disabled, it'll just say enable false and then the same like the our role that the user has to assume and the external ID.</text:span></text:p>
      <text:p text:style-name="P238"><text:span text:style-name="T239">Manish Tomar 12 minutes 8 seconds</text:span></text:p>
      <text:p text:style-name="P240"><text:span text:style-name="T241">And so when they have to enable access, they basically say, enable audit logging access and they provide their URL. Sorry, they provide their role. And then once we enable it, we return the same pieces of information audio. And if they want to disable access, yeah.</text:span></text:p>
      <text:p text:style-name="P242"><text:span text:style-name="T243">Manish Tomar 12 minutes 26 seconds</text:span></text:p>
      <text:p text:style-name="P244"><text:span text:style-name="T245">So once they access enabled, they can keep taking this thing, but they can also then disable access.</text:span></text:p>
      <text:p text:style-name="P246"><text:span text:style-name="T247">Manish Tomar 12 minutes 32 seconds</text:span></text:p>
      <text:p text:style-name="P248"><text:span text:style-name="T249">So we will then once they disable.</text:span></text:p>
      <text:p text:style-name="P250"><text:span text:style-name="T251">Manish Tomar 12 minutes 36 seconds</text:span></text:p>
      <text:p text:style-name="P252"><text:span text:style-name="T253">We will remove access to their role, and this is how the and then the same disabled access will come back, so.</text:span></text:p>
      <text:p text:style-name="P254"><text:span text:style-name="T255">Manish Tomar 12 minutes 47 seconds</text:span></text:p>
      <text:p text:style-name="P256"><text:span text:style-name="T257">Yeah, that's...</text:span></text:p>
      <text:p text:style-name="P258"><draw:frame draw:style-name="a6" draw:name="drawing" text:anchor-type="as-char" svg:x="0in" svg:y="0in" svg:width="0.375in" svg:height="0.375in" style:rel-width="scale" style:rel-height="scale"><draw:image xlink:href="media/image1.png" xlink:type="simple" xlink:show="embed" xlink:actuate="onLoad"/><svg:title/><svg:desc>F,{def8f6a8-608a-4d39-b279-b9edcd3181bc}{30},0.6458333,0.6458333</svg:desc></draw:frame></text:p>
      <text:p text:style-name="P259"><text:span text:style-name="T260">Benjamin Howard</text:span></text:p>
      <text:p text:style-name="P261"><text:span text:style-name="T262">12 minutes 47 seconds12:47</text:span></text:p>
      <text:p text:style-name="P263"><text:span text:style-name="T264">Benjamin Howard 12 minutes 47 seconds</text:span></text:p>
      <text:p text:style-name="P265"><text:span text:style-name="T266">And do we have do we have the consequences of that action? So if we put if we're putting that within the UI where they're seeing that information and we can have a button that says like disable access, there should be essentially A modal that pops up and then provides the information of what.</text:span></text:p>
      <text:p text:style-name="P267"><text:span text:style-name="T268">Benjamin Howard 13 minutes 7 seconds</text:span></text:p>
      <text:p text:style-name="P269"><text:span text:style-name="T270">that state means? Is that information within this document here?</text:span></text:p>
      <text:p text:style-name="P271"><draw:frame draw:style-name="a7" draw:name="drawing" text:anchor-type="as-char" svg:x="0in" svg:y="0in" svg:width="0.375in" svg:height="0.375in" style:rel-width="scale" style:rel-height="scale"><draw:image xlink:href="media/image1.png" xlink:type="simple" xlink:show="embed" xlink:actuate="onLoad"/><svg:title/><svg:desc>F,{def8f6a8-608a-4d39-b279-b9edcd3181bc}{100},0.6458333,0.6458333</svg:desc></draw:frame></text:p>
      <text:p text:style-name="P272"><text:span text:style-name="T273">Manish Tomar</text:span></text:p>
      <text:p text:style-name="P274"><text:span text:style-name="T275">13 minutes 18 seconds13:18</text:span></text:p>
      <text:p text:style-name="P276"><text:span text:style-name="T277">Manish Tomar 13 minutes 18 seconds</text:span></text:p>
      <text:p text:style-name="P278"><text:span text:style-name="T279">I didn't follow. Can you repeat the question?</text:span></text:p>
      <text:p text:style-name="P280"><draw:frame draw:style-name="a8" draw:name="drawing" text:anchor-type="as-char" svg:x="0in" svg:y="0in" svg:width="0.375in" svg:height="0.375in" style:rel-width="scale" style:rel-height="scale"><draw:image xlink:href="media/image1.png" xlink:type="simple" xlink:show="embed" xlink:actuate="onLoad"/><svg:title/><svg:desc>F,{def8f6a8-608a-4d39-b279-b9edcd3181bc}{150},0.6458333,0.6458333</svg:desc></draw:frame></text:p>
      <text:p text:style-name="P281"><text:span text:style-name="T282">Benjamin Howard</text:span></text:p>
      <text:p text:style-name="P283"><text:span text:style-name="T284">13 minutes 20 seconds13:20</text:span></text:p>
      <text:p text:style-name="P285"><text:span text:style-name="T286">Benjamin Howard 13 minutes 20 seconds</text:span></text:p>
      <text:p text:style-name="P287"><text:span text:style-name="T288">Yeah, so if they disable the access, so the same way in which they can enable the access, I would imagine then on that screen that shows their AWS number, the index number, all of that, those key four pieces of information, there should be an option to disable access on that same page.</text:span></text:p>
      <text:p text:style-name="P289"><text:span text:style-name="T290">Benjamin Howard 13 minutes 41 seconds</text:span></text:p>
      <text:p text:style-name="P291"><text:span text:style-name="T292">So once they press that disable action button, there should be a modal that pops up that confirms that they would like to take this action. But after writing the information of the modal, what information, what copy should be put in that explains to them the consequence of the action that they're about to take.</text:span></text:p>
      <text:p text:style-name="P293"><draw:frame draw:style-name="a9" draw:name="drawing" text:anchor-type="as-char" svg:x="0in" svg:y="0in" svg:width="0.375in" svg:height="0.375in" style:rel-width="scale" style:rel-height="scale"><draw:image xlink:href="media/image1.png" xlink:type="simple" xlink:show="embed" xlink:actuate="onLoad"/><svg:title/><svg:desc>F,{def8f6a8-608a-4d39-b279-b9edcd3181bc}{220},0.6458333,0.6458333</svg:desc></draw:frame></text:p>
      <text:p text:style-name="P294"><text:span text:style-name="T295">Manish Tomar</text:span></text:p>
      <text:p text:style-name="P296"><text:span text:style-name="T297">13 minutes 50 seconds13:50</text:span></text:p>
      <text:p text:style-name="P298"><text:span text:style-name="T299">Manish Tomar 13 minutes 50 seconds</text:span></text:p>
      <text:p text:style-name="P300"><text:span text:style-name="T301">Mm.</text:span></text:p>
      <text:p text:style-name="P302"><draw:frame draw:style-name="a10" draw:name="drawing" text:anchor-type="as-char" svg:x="0in" svg:y="0in" svg:width="0.375in" svg:height="0.375in" style:rel-width="scale" style:rel-height="scale"><draw:image xlink:href="media/image1.png" xlink:type="simple" xlink:show="embed" xlink:actuate="onLoad"/><svg:title/><svg:desc>F,{ae57f79e-bde3-48d9-a971-34874f066581}{15},0.6458333,0.6458333</svg:desc></draw:frame></text:p>
      <text:p text:style-name="P303"><text:span text:style-name="T304">Benjamin Howard</text:span></text:p>
      <text:p text:style-name="P305"><text:span text:style-name="T306">14 minutes 2 seconds14:02</text:span></text:p>
      <text:p text:style-name="P307"><text:span text:style-name="T308">Benjamin Howard 14 minutes 2 seconds</text:span></text:p>
      <text:p text:style-name="P309"><text:span text:style-name="T310">So it like bullet points saying, hey, if you do this, it does A, B, C, D, E, F, G.</text:span></text:p>
      <text:p text:style-name="P311"><draw:frame draw:style-name="a11" draw:name="drawing" text:anchor-type="as-char" svg:x="0in" svg:y="0in" svg:width="0.375in" svg:height="0.375in" style:rel-width="scale" style:rel-height="scale"><draw:image xlink:href="media/image1.png" xlink:type="simple" xlink:show="embed" xlink:actuate="onLoad"/><svg:title/><svg:desc>F,{ae57f79e-bde3-48d9-a971-34874f066581}{65},0.6458333,0.6458333</svg:desc></draw:frame></text:p>
      <text:p text:style-name="P312"><text:span text:style-name="T313">Manish Tomar</text:span></text:p>
      <text:p text:style-name="P314"><text:span text:style-name="T315">14 minutes 10 seconds14:10</text:span></text:p>
      <text:p text:style-name="P316"><text:span text:style-name="T317">Manish Tomar 14 minutes 10 seconds</text:span></text:p>
      <text:p text:style-name="P318"><text:span text:style-name="T319">I think the only piece of information that needs to be displayed is that after disabling access, the role...</text:span></text:p>
      <text:p text:style-name="P320"><text:span text:style-name="T321">Manish Tomar 14 minutes 20 seconds</text:span></text:p>
      <text:p text:style-name="P322"><text:span text:style-name="T323">Is not.</text:span></text:p>
      <text:p text:style-name="P324"><text:span text:style-name="T325">Manish Tomar 14 minutes 23 seconds</text:span></text:p>
      <text:p text:style-name="P326"><text:span text:style-name="T327">Provided the, I think.</text:span></text:p>
      <text:p text:style-name="P328"><text:span text:style-name="T329">Manish Tomar 14 minutes 27 seconds</text:span></text:p>
      <text:p text:style-name="P330"><text:span text:style-name="T331">Customer provided role, so let's say they do.</text:span></text:p>
      <text:p text:style-name="P332"><text:span text:style-name="T333">Manish Tomar 14 minutes 31 seconds</text:span></text:p>
      <text:p text:style-name="P334"><text:span text:style-name="T335">You know.</text:span></text:p>
      <text:p text:style-name="P336"><text:span text:style-name="T337">Manish Tomar 14 minutes 34 seconds</text:span></text:p>
      <text:p text:style-name="P338"><text:span text:style-name="T339">A log reader, that's the name of that's the role that they they provided to us, so we can just explicitly say that like role *** log reader will not be able to access logs anymore.</text:span></text:p>
      <text:p text:style-name="P340"><draw:frame draw:style-name="a12" draw:name="drawing" text:anchor-type="as-char" svg:x="0in" svg:y="0in" svg:width="0.375in" svg:height="0.375in" style:rel-width="scale" style:rel-height="scale"><draw:image xlink:href="media/image1.png" xlink:type="simple" xlink:show="embed" xlink:actuate="onLoad"/><svg:title/><svg:desc>F,{ae57f79e-bde3-48d9-a971-34874f066581}{215},0.6458333,0.6458333</svg:desc></draw:frame></text:p>
      <text:p text:style-name="P341"><text:span text:style-name="T342">Benjamin Howard</text:span></text:p>
      <text:p text:style-name="P343"><text:span text:style-name="T344">14 minutes 48 seconds14:48</text:span></text:p>
      <text:p text:style-name="P345"><text:span text:style-name="T346">Benjamin Howard 14 minutes 48 seconds</text:span></text:p>
      <text:p text:style-name="P347"><text:span text:style-name="T348">Yeah.</text:span></text:p>
      <text:p text:style-name="P349"><draw:frame draw:style-name="a13" draw:name="drawing" text:anchor-type="as-char" svg:x="0in" svg:y="0in" svg:width="0.375in" svg:height="0.375in" style:rel-width="scale" style:rel-height="scale"><draw:image xlink:href="media/image1.png" xlink:type="simple" xlink:show="embed" xlink:actuate="onLoad"/><svg:title/><svg:desc>F,{da23580a-5824-4687-b0b0-1e79a4ed2768}{10},0.6458333,0.6458333</svg:desc></draw:frame></text:p>
      <text:p text:style-name="P350"><text:span text:style-name="T351">Manish Tomar</text:span></text:p>
      <text:p text:style-name="P352"><text:span text:style-name="T353">14 minutes 49 seconds14:49</text:span></text:p>
      <text:p text:style-name="P354"><text:span text:style-name="T355">Manish Tomar 14 minutes 49 seconds</text:span></text:p>
      <text:p text:style-name="P356"><text:span text:style-name="T357">Yeah, are you sure you want to continue? And then, yes, and then it goes away.</text:span></text:p>
      <text:p text:style-name="P358"><draw:frame draw:style-name="a14" draw:name="drawing" text:anchor-type="as-char" svg:x="0in" svg:y="0in" svg:width="0.375in" svg:height="0.375in" style:rel-width="scale" style:rel-height="scale"><draw:image xlink:href="media/image1.png" xlink:type="simple" xlink:show="embed" xlink:actuate="onLoad"/><svg:title/><svg:desc>F,{da23580a-5824-4687-b0b0-1e79a4ed2768}{60},0.6458333,0.6458333</svg:desc></draw:frame></text:p>
      <text:p text:style-name="P359"><text:span text:style-name="T360">Benjamin Howard</text:span></text:p>
      <text:p text:style-name="P361"><text:span text:style-name="T362">14 minutes 56 seconds14:56</text:span></text:p>
      <text:p text:style-name="P363"><text:span text:style-name="T364">Benjamin Howard 14 minutes 56 seconds</text:span></text:p>
      <text:p text:style-name="P365"><text:span text:style-name="T366">Okay, perfect.</text:span></text:p>
      <text:p text:style-name="P367"><draw:frame draw:style-name="a15" draw:name="drawing" text:anchor-type="as-char" svg:x="0in" svg:y="0in" svg:width="0.375in" svg:height="0.375in" style:rel-width="scale" style:rel-height="scale"><draw:image xlink:href="media/image1.png" xlink:type="simple" xlink:show="embed" xlink:actuate="onLoad"/><svg:title/><svg:desc>F,{da23580a-5824-4687-b0b0-1e79a4ed2768}{110},0.6458333,0.6458333</svg:desc></draw:frame></text:p>
      <text:p text:style-name="P368"><text:span text:style-name="T369">Manish Tomar</text:span></text:p>
      <text:p text:style-name="P370"><text:span text:style-name="T371">14 minutes 57 seconds14:57</text:span></text:p>
      <text:p text:style-name="P372"><text:span text:style-name="T373">Manish Tomar 14 minutes 57 seconds</text:span></text:p>
      <text:p text:style-name="P374"><text:span text:style-name="T375">Yeah, so that's the thing. So one important of the distinction, one important caveat of the experience.</text:span></text:p>
      <text:p text:style-name="P376"><text:span text:style-name="T377">Manish Tomar 15 minutes 7 seconds</text:span></text:p>
      <text:p text:style-name="P378"><text:span text:style-name="T379">Is.</text:span></text:p>
      <text:p text:style-name="P380"><text:span text:style-name="T381">Manish Tomar 15 minutes 11 seconds</text:span></text:p>
      <text:p text:style-name="P382"><text:span text:style-name="T383">Audit logging is never disabled.</text:span></text:p>
      <text:p text:style-name="P384"><text:span text:style-name="T385">Manish Tomar 15 minutes 15 seconds</text:span></text:p>
      <text:p text:style-name="P386"><text:span text:style-name="T387">Right, it's just the access to it is enabled or disabled. So I think that terminology has to be clear. So users should not think that, oh, I don't have, their audit logs are lost. That's not the case. They're always stored. It's just how to enable access to them. So, you know, they could, like, they can provision a cluster today. Two days later, they can enable access. They can get all the data.</text:span></text:p>
      <text:p text:style-name="P388"><text:span text:style-name="T389">Manish Tomar 15 minutes 37 seconds</text:span></text:p>
      <text:p text:style-name="P390"><text:span text:style-name="T391">That has happened in the last two days, and then one week later they disable access, and then a week later they enable it again, they will still be able to see everything that has happened from the beginning of time, from the beginning of the cluster.</text:span></text:p>
      <text:p text:style-name="P392"><text:span text:style-name="T393">Manish Tomar 15 minutes 53 seconds</text:span></text:p>
      <text:p text:style-name="P394"><text:span text:style-name="T395">Ohh.</text:span></text:p>
      <text:p text:style-name="P396"><draw:frame draw:style-name="a16" draw:name="drawing" text:anchor-type="as-char" svg:x="0in" svg:y="0in" svg:width="0.375in" svg:height="0.375in" style:rel-width="scale" style:rel-height="scale"><draw:image xlink:href="media/image1.png" xlink:type="simple" xlink:show="embed" xlink:actuate="onLoad"/><svg:title/><svg:desc>F,{85b08f77-a046-472b-ada3-45695d68150b}{5},0.6458333,0.6458333</svg:desc></draw:frame></text:p>
      <text:p text:style-name="P397"><text:span text:style-name="T398">Benjamin Howard</text:span></text:p>
      <text:p text:style-name="P399"><text:span text:style-name="T400">15 minutes 54 seconds15:54</text:span></text:p>
      <text:p text:style-name="P401"><text:span text:style-name="T402">Benjamin Howard 15 minutes 54 seconds</text:span></text:p>
      <text:p text:style-name="P403"><text:span text:style-name="T404">Okay, yeah, so that makes sense. So I think that that's what the modal should essentially say if they're disabling that the access, it'll say something like it within that text box, it'll tell them, yeah, if you exactly what you said, basically, if they do this, it'll disable it.</text:span></text:p>
      <text:p text:style-name="P405"><draw:frame draw:style-name="a17" draw:name="drawing" text:anchor-type="as-char" svg:x="0in" svg:y="0in" svg:width="0.375in" svg:height="0.375in" style:rel-width="scale" style:rel-height="scale"><draw:image xlink:href="media/image1.png" xlink:type="simple" xlink:show="embed" xlink:actuate="onLoad"/><svg:title/><svg:desc>F,{85b08f77-a046-472b-ada3-45695d68150b}{55},0.6458333,0.6458333</svg:desc></draw:frame></text:p>
      <text:p text:style-name="P406"><text:span text:style-name="T407">Manish Tomar</text:span></text:p>
      <text:p text:style-name="P408"><text:span text:style-name="T409">16 minutes16:00</text:span></text:p>
      <text:p text:style-name="P410"><text:span text:style-name="T411">Manish Tomar 16 minutes</text:span></text:p>
      <text:p text:style-name="P412"><text:span text:style-name="T413">Yeah.</text:span></text:p>
      <text:p text:style-name="P414"><draw:frame draw:style-name="a18" draw:name="drawing" text:anchor-type="as-char" svg:x="0in" svg:y="0in" svg:width="0.375in" svg:height="0.375in" style:rel-width="scale" style:rel-height="scale"><draw:image xlink:href="media/image1.png" xlink:type="simple" xlink:show="embed" xlink:actuate="onLoad"/><svg:title/><svg:desc>F,{85b08f77-a046-472b-ada3-45695d68150b}{105},0.6458333,0.6458333</svg:desc></draw:frame></text:p>
      <text:p text:style-name="P415"><text:span text:style-name="T416">Benjamin Howard</text:span></text:p>
      <text:p text:style-name="P417"><text:span text:style-name="T418">16 minutes 12 seconds16:12</text:span></text:p>
      <text:p text:style-name="P419"><text:span text:style-name="T420">Benjamin Howard 16 minutes 12 seconds</text:span></text:p>
      <text:p text:style-name="P421"><text:span text:style-name="T422">they will be able to see it.</text:span></text:p>
      <text:p text:style-name="P423"><text:span text:style-name="T424">Benjamin Howard 16 minutes 16 seconds</text:span></text:p>
      <text:p text:style-name="P425"><text:span text:style-name="T426">you know, if they decide to go to another store like a couple of days later and enable it. And so what I envision is being able to link out to that from that page as well. And then they could go and then see that information. Is that something we have access in the system?</text:span></text:p>
      <text:p text:style-name="P427"><draw:frame draw:style-name="a19" draw:name="drawing" text:anchor-type="as-char" svg:x="0in" svg:y="0in" svg:width="0.375in" svg:height="0.375in" style:rel-width="scale" style:rel-height="scale"><draw:image xlink:href="media/image1.png" xlink:type="simple" xlink:show="embed" xlink:actuate="onLoad"/><svg:title/><svg:desc>F,{85b08f77-a046-472b-ada3-45695d68150b}{175},0.6458333,0.6458333</svg:desc></draw:frame></text:p>
      <text:p text:style-name="P428"><text:span text:style-name="T429">Manish Tomar</text:span></text:p>
      <text:p text:style-name="P430"><text:span text:style-name="T431">16 minutes 35 seconds16:35</text:span></text:p>
      <text:p text:style-name="P432"><text:span text:style-name="T433">Manish Tomar 16 minutes 35 seconds</text:span></text:p>
      <text:p text:style-name="P434"><text:span text:style-name="T435">Link out to which page?</text:span></text:p>
      <text:p text:style-name="P436"><draw:frame draw:style-name="a20" draw:name="drawing" text:anchor-type="as-char" svg:x="0in" svg:y="0in" svg:width="0.375in" svg:height="0.375in" style:rel-width="scale" style:rel-height="scale"><draw:image xlink:href="media/image1.png" xlink:type="simple" xlink:show="embed" xlink:actuate="onLoad"/><svg:title/><svg:desc>F,{85b08f77-a046-472b-ada3-45695d68150b}{225},0.6458333,0.6458333</svg:desc></draw:frame></text:p>
      <text:p text:style-name="P437"><text:span text:style-name="T438">Benjamin Howard</text:span></text:p>
      <text:p text:style-name="P439"><text:span text:style-name="T440">16 minutes 36 seconds16:36</text:span></text:p>
      <text:p text:style-name="P441"><text:span text:style-name="T442">Benjamin Howard 16 minutes 36 seconds</text:span></text:p>
      <text:p text:style-name="P443"><text:span text:style-name="T444">To see to see the audit logs.</text:span></text:p>
      <text:p text:style-name="P445"><draw:frame draw:style-name="a21" draw:name="drawing" text:anchor-type="as-char" svg:x="0in" svg:y="0in" svg:width="0.375in" svg:height="0.375in" style:rel-width="scale" style:rel-height="scale"><draw:image xlink:href="media/image1.png" xlink:type="simple" xlink:show="embed" xlink:actuate="onLoad"/><svg:title/><svg:desc>F,{2b255a03-a445-48b1-a94f-a1dc734736f8}{20},0.6458333,0.6458333</svg:desc></draw:frame></text:p>
      <text:p text:style-name="P446"><text:span text:style-name="T447">Manish Tomar</text:span></text:p>
      <text:p text:style-name="P448"><text:span text:style-name="T449">16 minutes 39 seconds16:39</text:span></text:p>
      <text:p text:style-name="P450"><text:span text:style-name="T451">Manish Tomar 16 minutes 39 seconds</text:span></text:p>
      <text:p text:style-name="P452"><text:span text:style-name="T453">No, they can't. That's the whole, like this is the way they see the auto logs.</text:span></text:p>
      <text:p text:style-name="P454"><draw:frame draw:style-name="a22" draw:name="drawing" text:anchor-type="as-char" svg:x="0in" svg:y="0in" svg:width="0.375in" svg:height="0.375in" style:rel-width="scale" style:rel-height="scale"><draw:image xlink:href="media/image1.png" xlink:type="simple" xlink:show="embed" xlink:actuate="onLoad"/><svg:title/><svg:desc>F,{2b255a03-a445-48b1-a94f-a1dc734736f8}{70},0.6458333,0.6458333</svg:desc></draw:frame></text:p>
      <text:p text:style-name="P455"><text:span text:style-name="T456">Benjamin Howard</text:span></text:p>
      <text:p text:style-name="P457"><text:span text:style-name="T458">16 minutes 41 seconds16:41</text:span></text:p>
      <text:p text:style-name="P459"><text:span text:style-name="T460">Benjamin Howard 16 minutes 41 seconds</text:span></text:p>
      <text:p text:style-name="P461"><text:span text:style-name="T462">No, no, if...</text:span></text:p>
      <text:p text:style-name="P463"><text:span text:style-name="T464">Benjamin Howard 16 minutes 43 seconds</text:span></text:p>
      <text:p text:style-name="P465"><text:span text:style-name="T466">No, no, if it is enabled.</text:span></text:p>
      <text:p text:style-name="P467"><draw:frame draw:style-name="a23" draw:name="drawing" text:anchor-type="as-char" svg:x="0in" svg:y="0in" svg:width="0.375in" svg:height="0.375in" style:rel-width="scale" style:rel-height="scale"><draw:image xlink:href="media/image1.png" xlink:type="simple" xlink:show="embed" xlink:actuate="onLoad"/><svg:title/><svg:desc>F,{2b255a03-a445-48b1-a94f-a1dc734736f8}{140},0.6458333,0.6458333</svg:desc></draw:frame></text:p>
      <text:p text:style-name="P468"><text:span text:style-name="T469">Manish Tomar</text:span></text:p>
      <text:p text:style-name="P470"><text:span text:style-name="T471">16 minutes 46 seconds16:46</text:span></text:p>
      <text:p text:style-name="P472"><text:span text:style-name="T473">Manish Tomar 16 minutes 46 seconds</text:span></text:p>
      <text:p text:style-name="P474"><text:span text:style-name="T475">No, there is no, they have to, that's the thing, we are leaving it within AWS to do that. So yeah, so we are not providing, we are not building any experience, nothing to show the audit logs. That's all directly within, we are leaving it to customer and AWS. So AWS is the experience that they are getting the audit log access from.</text:span></text:p>
      <text:p text:style-name="P476"><draw:frame draw:style-name="a24" draw:name="drawing" text:anchor-type="as-char" svg:x="0in" svg:y="0in" svg:width="0.375in" svg:height="0.375in" style:rel-width="scale" style:rel-height="scale"><draw:image xlink:href="media/image1.png" xlink:type="simple" xlink:show="embed" xlink:actuate="onLoad"/><svg:title/><svg:desc>F,{2b255a03-a445-48b1-a94f-a1dc734736f8}{190},0.6458333,0.6458333</svg:desc></draw:frame></text:p>
      <text:p text:style-name="P477"><text:span text:style-name="T478">Benjamin Howard</text:span></text:p>
      <text:p text:style-name="P479"><text:span text:style-name="T480">16 minutes 51 seconds16:51</text:span></text:p>
      <text:p text:style-name="P481"><text:span text:style-name="T482">Benjamin Howard 16 minutes 51 seconds</text:span></text:p>
      <text:p text:style-name="P483"><text:span text:style-name="T484">Got you, okay.</text:span></text:p>
      <text:p text:style-name="P485"><text:span text:style-name="T486">Benjamin Howard 17 minutes 6 seconds</text:span></text:p>
      <text:p text:style-name="P487"><text:span text:style-name="T488">Got you, OK.</text:span></text:p>
      <text:p text:style-name="P489"><draw:frame draw:style-name="a25" draw:name="drawing" text:anchor-type="as-char" svg:x="0in" svg:y="0in" svg:width="0.375in" svg:height="0.375in" style:rel-width="scale" style:rel-height="scale"><draw:image xlink:href="media/image1.png" xlink:type="simple" xlink:show="embed" xlink:actuate="onLoad"/><svg:title/><svg:desc>F,{3af2b828-5cce-47c1-9338-3a0eafd63d6d}{5},0.6458333,0.6458333</svg:desc></draw:frame></text:p>
      <text:p text:style-name="P490"><text:span text:style-name="T491">Manish Tomar</text:span></text:p>
      <text:p text:style-name="P492"><text:span text:style-name="T493">17 minutes 7 seconds17:07</text:span></text:p>
      <text:p text:style-name="P494"><text:span text:style-name="T495">Manish Tomar 17 minutes 7 seconds</text:span></text:p>
      <text:p text:style-name="P496"><text:span text:style-name="T497">Yeah, so our experience is just enabling access directly to the S3 bucket and from then on, it's just that's how they read the logs, how they fetch it, is just totally, it's inside in the AWS world, outside our this thing.</text:span></text:p>
      <text:p text:style-name="P498"><draw:frame draw:style-name="a26" draw:name="drawing" text:anchor-type="as-char" svg:x="0in" svg:y="0in" svg:width="0.375in" svg:height="0.375in" style:rel-width="scale" style:rel-height="scale"><draw:image xlink:href="media/image1.png" xlink:type="simple" xlink:show="embed" xlink:actuate="onLoad"/><svg:title/><svg:desc>F,{3af2b828-5cce-47c1-9338-3a0eafd63d6d}{55},0.6458333,0.6458333</svg:desc></draw:frame></text:p>
      <text:p text:style-name="P499"><text:span text:style-name="T500">Benjamin Howard</text:span></text:p>
      <text:p text:style-name="P501"><text:span text:style-name="T502">17 minutes 21 seconds17:21</text:span></text:p>
      <text:p text:style-name="P503"><text:span text:style-name="T504">Benjamin Howard 17 minutes 21 seconds</text:span></text:p>
      <text:p text:style-name="P505"><text:span text:style-name="T506">Okay.</text:span></text:p>
      <text:p text:style-name="P507"><draw:frame draw:style-name="a27" draw:name="drawing" text:anchor-type="as-char" svg:x="0in" svg:y="0in" svg:width="0.375in" svg:height="0.375in" style:rel-width="scale" style:rel-height="scale"><draw:image xlink:href="media/image1.png" xlink:type="simple" xlink:show="embed" xlink:actuate="onLoad"/><svg:title/><svg:desc>F,{3af2b828-5cce-47c1-9338-3a0eafd63d6d}{105},0.6458333,0.6458333</svg:desc></draw:frame></text:p>
      <text:p text:style-name="P508"><text:span text:style-name="T509">Manish Tomar</text:span></text:p>
      <text:p text:style-name="P510"><text:span text:style-name="T511">17 minutes 27 seconds17:27</text:span></text:p>
      <text:p text:style-name="P512"><text:span text:style-name="T513">Manish Tomar 17 minutes 27 seconds</text:span></text:p>
      <text:p text:style-name="P514"><text:span text:style-name="T515">Divya, Erika, questions.</text:span></text:p>
      <text:p text:style-name="P516"><draw:frame draw:style-name="a28" draw:name="drawing" text:anchor-type="as-char" svg:x="0in" svg:y="0in" svg:width="0.375in" svg:height="0.375in" style:rel-width="scale" style:rel-height="scale"><draw:image xlink:href="media/image1.png" xlink:type="simple" xlink:show="embed" xlink:actuate="onLoad"/><svg:title/><svg:desc>F,{3af2b828-5cce-47c1-9338-3a0eafd63d6d}{155},0.6458333,0.6458333</svg:desc></draw:frame></text:p>
      <text:p text:style-name="P517"><text:span text:style-name="T518">Erika Pierre</text:span></text:p>
      <text:p text:style-name="P519"><text:span text:style-name="T520">17 minutes 42 seconds17:42</text:span></text:p>
      <text:p text:style-name="P521"><text:span text:style-name="T522">Erika Pierre 17 minutes 42 seconds</text:span></text:p>
      <text:p text:style-name="P523"><text:span text:style-name="T524">Would you mind sharing a link to this document just so that I can? Thank you.</text:span></text:p>
      <text:p text:style-name="P525"><draw:frame draw:style-name="a29" draw:name="drawing" text:anchor-type="as-char" svg:x="0in" svg:y="0in" svg:width="0.375in" svg:height="0.375in" style:rel-width="scale" style:rel-height="scale"><draw:image xlink:href="media/image1.png" xlink:type="simple" xlink:show="embed" xlink:actuate="onLoad"/><svg:title/><svg:desc>F,{3af2b828-5cce-47c1-9338-3a0eafd63d6d}{205},0.6458333,0.6458333</svg:desc></draw:frame></text:p>
      <text:p text:style-name="P526"><text:span text:style-name="T527">Manish Tomar</text:span></text:p>
      <text:p text:style-name="P528"><text:span text:style-name="T529">17 minutes 45 seconds17:45</text:span></text:p>
      <text:p text:style-name="P530"><text:span text:style-name="T531">Manish Tomar 17 minutes 45 seconds</text:span></text:p>
      <text:p text:style-name="P532"><text:span text:style-name="T533">Yeah, sure.</text:span></text:p>
      <text:p text:style-name="P534"><text:span text:style-name="T535">Manish Tomar 18 minutes 1 second</text:span></text:p>
      <text:p text:style-name="P536"><text:span text:style-name="T537">Um, so...</text:span></text:p>
      <text:p text:style-name="P538"><text:span text:style-name="T539">Manish Tomar 18 minutes 4 seconds</text:span></text:p>
      <text:p text:style-name="P540"><text:span text:style-name="T541">In terms of implementation, I think Divya.</text:span></text:p>
      <text:p text:style-name="P542"><text:span text:style-name="T543">Manish Tomar 18 minutes 10 seconds</text:span></text:p>
      <text:p text:style-name="P544"><text:span text:style-name="T545">Uh, Divya, are you there? Just to clarify.</text:span></text:p>
      <text:p text:style-name="P546"><text:span text:style-name="T547">DP</text:span></text:p>
      <text:p text:style-name="P548"><text:span text:style-name="T549">Divya Pola</text:span></text:p>
      <text:p text:style-name="P550"><text:span text:style-name="T551">18 minutes 15 seconds18:15</text:span></text:p>
      <text:p text:style-name="P552"><text:span text:style-name="T553">Divya Pola 18 minutes 15 seconds</text:span></text:p>
      <text:p text:style-name="P554"><text:span text:style-name="T555">Hey, can you hear me?</text:span></text:p>
      <text:p text:style-name="P556"><draw:frame draw:style-name="a30" draw:name="drawing" text:anchor-type="as-char" svg:x="0in" svg:y="0in" svg:width="0.375in" svg:height="0.375in" style:rel-width="scale" style:rel-height="scale"><draw:image xlink:href="media/image1.png" xlink:type="simple" xlink:show="embed" xlink:actuate="onLoad"/><svg:title/><svg:desc>F,{42fb45cf-0c02-49ec-ba01-b498f26542e4}{110},0.6458333,0.6458333</svg:desc></draw:frame></text:p>
      <text:p text:style-name="P557"><text:span text:style-name="T558">Manish Tomar</text:span></text:p>
      <text:p text:style-name="P559"><text:span text:style-name="T560">18 minutes 17 seconds18:17</text:span></text:p>
      <text:p text:style-name="P561"><text:span text:style-name="T562">Manish Tomar 18 minutes 17 seconds</text:span></text:p>
      <text:p text:style-name="P563"><text:span text:style-name="T564">Yeah, I can hear you now.</text:span></text:p>
      <text:p text:style-name="P565"><text:span text:style-name="T566">DP</text:span></text:p>
      <text:p text:style-name="P567"><text:span text:style-name="T568">Divya Pola</text:span></text:p>
      <text:p text:style-name="P569"><text:span text:style-name="T570">18 minutes 18 seconds18:18</text:span></text:p>
      <text:p text:style-name="P571"><text:span text:style-name="T572">Divya Pola 18 minutes 18 seconds</text:span></text:p>
      <text:p text:style-name="P573"><text:span text:style-name="T574">Okay, maybe my airports are not working. So I was going to say I'm good with the UX stuff, what we have been through so far. Like the implementation wise, I still need to catch up. I read the RFC for sure. I mean, I have basic idea of what needs to be done, but I probably need to chat more with you on.</text:span></text:p>
      <text:p text:style-name="P575"><text:span text:style-name="T576">Divya Pola 18 minutes 38 seconds</text:span></text:p>
      <text:p text:style-name="P577"><text:span text:style-name="T578">how we need to distribute and how to get started.</text:span></text:p>
      <text:p text:style-name="P579"><draw:frame draw:style-name="a31" draw:name="drawing" text:anchor-type="as-char" svg:x="0in" svg:y="0in" svg:width="0.375in" svg:height="0.375in" style:rel-width="scale" style:rel-height="scale"><draw:image xlink:href="media/image1.png" xlink:type="simple" xlink:show="embed" xlink:actuate="onLoad"/><svg:title/><svg:desc>F,{42fb45cf-0c02-49ec-ba01-b498f26542e4}{230},0.6458333,0.6458333</svg:desc></draw:frame></text:p>
      <text:p text:style-name="P580"><text:span text:style-name="T581">Manish Tomar</text:span></text:p>
      <text:p text:style-name="P582"><text:span text:style-name="T583">18 minutes 41 seconds18:41</text:span></text:p>
      <text:p text:style-name="P584"><text:span text:style-name="T585">Manish Tomar 18 minutes 41 seconds</text:span></text:p>
      <text:p text:style-name="P586"><text:span text:style-name="T587">Yeah, yeah. So I think on a broad scale, I think I see two parallel streams of work on the backend side, apart from the front end and the design can happen parallelly. So I see like 3 streams of work, I would say. I think Brandon can go and start designing the work.</text:span></text:p>
      <text:p text:style-name="P588"><text:span text:style-name="T589">Manish Tomar 19 minutes</text:span></text:p>
      <text:p text:style-name="P590"><text:span text:style-name="T591">Probably discuss with Erika. You can ask me any questions and on the backend side, I think 2 broad streams of work is all the API implementations and then enabling the S3 bucket provisioning and sending all the logs to S3.</text:span></text:p>
      <text:p text:style-name="P592"><text:span text:style-name="T593">Manish Tomar 19 minutes 18 seconds</text:span></text:p>
      <text:p text:style-name="P594"><text:span text:style-name="T595">two pieces of chunk of information. So I was thinking, Divya, you can take care of the API implementation, all the management APIs, and I can take care of the storing it in S3.</text:span></text:p>
      <text:p text:style-name="P596"><text:span text:style-name="T597">DP</text:span></text:p>
      <text:p text:style-name="P598"><text:span text:style-name="T599">Divya Pola</text:span></text:p>
      <text:p text:style-name="P600"><text:span text:style-name="T601">19 minutes 33 seconds19:33</text:span></text:p>
      <text:p text:style-name="P602"><text:span text:style-name="T603">Divya Pola 19 minutes 33 seconds</text:span></text:p>
      <text:p text:style-name="P604"><text:span text:style-name="T605">OK, sounds good.</text:span></text:p>
      <text:p text:style-name="P606"><draw:frame draw:style-name="a32" draw:name="drawing" text:anchor-type="as-char" svg:x="0in" svg:y="0in" svg:width="0.375in" svg:height="0.375in" style:rel-width="scale" style:rel-height="scale"><draw:image xlink:href="media/image1.png" xlink:type="simple" xlink:show="embed" xlink:actuate="onLoad"/><svg:title/><svg:desc>F,{aacb9135-f589-4fd3-bf0c-d5c777fd8c2b}{115},0.6458333,0.6458333</svg:desc></draw:frame></text:p>
      <text:p text:style-name="P607"><text:span text:style-name="T608">Manish Tomar</text:span></text:p>
      <text:p text:style-name="P609"><text:span text:style-name="T610">19 minutes 33 seconds19:33</text:span></text:p>
      <text:p text:style-name="P611"><text:span text:style-name="T612">Manish Tomar 19 minutes 33 seconds</text:span></text:p>
      <text:p text:style-name="P613"><text:span text:style-name="T614">Um...</text:span></text:p>
      <text:p text:style-name="P615"><text:span text:style-name="T616">Manish Tomar 19 minutes 35 seconds</text:span></text:p>
      <text:p text:style-name="P617"><text:span text:style-name="T618">Yeah, so continue reading the RFC and let me know, because I think to implement the APIs, so APIs, so the implementation of the APIs for Divya, I think it's going to be completely powered by AWS. There's no state anywhere else, so that's the...</text:span></text:p>
      <text:p text:style-name="P619"><text:span text:style-name="T620">Manish Tomar 19 minutes 54 seconds</text:span></text:p>
      <text:p text:style-name="P621"><text:span text:style-name="T622">It is easy in that way, in that sense. It's just funging things from AWS policy and then tweaking it and explore and giving it out that way. So I think that way it becomes, it's not that complicated.</text:span></text:p>
      <text:p text:style-name="P623"><text:span text:style-name="T624">DP</text:span></text:p>
      <text:p text:style-name="P625"><text:span text:style-name="T626">Divya Pola</text:span></text:p>
      <text:p text:style-name="P627"><text:span text:style-name="T628">19 minutes 58 seconds19:58</text:span></text:p>
      <text:p text:style-name="P629"><text:span text:style-name="T630">Divya Pola 19 minutes 58 seconds</text:span></text:p>
      <text:p text:style-name="P631"><text:span text:style-name="T632">Got it.</text:span></text:p>
      <text:p text:style-name="P633"><draw:frame draw:style-name="a33" draw:name="drawing" text:anchor-type="as-char" svg:x="0in" svg:y="0in" svg:width="0.375in" svg:height="0.375in" style:rel-width="scale" style:rel-height="scale"><draw:image xlink:href="media/image1.png" xlink:type="simple" xlink:show="embed" xlink:actuate="onLoad"/><svg:title/><svg:desc>F,{aacb9135-f589-4fd3-bf0c-d5c777fd8c2b}{255},0.6458333,0.6458333</svg:desc></draw:frame></text:p>
      <text:p text:style-name="P634"><text:span text:style-name="T635">Manish Tomar</text:span></text:p>
      <text:p text:style-name="P636"><text:span text:style-name="T637">20 minutes 18 seconds20:18</text:span></text:p>
      <text:p text:style-name="P638"><text:span text:style-name="T639">Manish Tomar 20 minutes 18 seconds</text:span></text:p>
      <text:p text:style-name="P640"><text:span text:style-name="T641">Mm.</text:span></text:p>
      <text:p text:style-name="P642"><text:span text:style-name="T643">DP</text:span></text:p>
      <text:p text:style-name="P644"><text:span text:style-name="T645">Divya Pola</text:span></text:p>
      <text:p text:style-name="P646"><text:span text:style-name="T647">20 minutes 19 seconds20:19</text:span></text:p>
      <text:p text:style-name="P648"><text:span text:style-name="T649">Divya Pola 20 minutes 19 seconds</text:span></text:p>
      <text:p text:style-name="P650"><text:span text:style-name="T651">Yeah, I'll start with that, yeah.</text:span></text:p>
      <text:p text:style-name="P652"><draw:frame draw:style-name="a34" draw:name="drawing" text:anchor-type="as-char" svg:x="0in" svg:y="0in" svg:width="0.375in" svg:height="0.375in" style:rel-width="scale" style:rel-height="scale"><draw:image xlink:href="media/image1.png" xlink:type="simple" xlink:show="embed" xlink:actuate="onLoad"/><svg:title/><svg:desc>F,{1bdae8a0-186a-42be-a75b-87eb5cf65d96}{100},0.6458333,0.6458333</svg:desc></draw:frame></text:p>
      <text:p text:style-name="P653"><text:span text:style-name="T654">Manish Tomar</text:span></text:p>
      <text:p text:style-name="P655"><text:span text:style-name="T656">22 minutes 8 seconds22:08</text:span></text:p>
      <text:p text:style-name="P657"><text:span text:style-name="T658">Manish Tomar 22 minutes 8 seconds</text:span></text:p>
      <text:p text:style-name="P659"><text:span text:style-name="T660">Yeah, sure.</text:span></text:p>
      <text:p text:style-name="P661"><draw:frame draw:style-name="a35" draw:name="drawing" text:anchor-type="as-char" svg:x="0in" svg:y="0in" svg:width="0.375in" svg:height="0.375in" style:rel-width="scale" style:rel-height="scale"><draw:image xlink:href="media/image1.png" xlink:type="simple" xlink:show="embed" xlink:actuate="onLoad"/><svg:title/><svg:desc>F,{1bdae8a0-186a-42be-a75b-87eb5cf65d96}{150},0.6458333,0.6458333</svg:desc></draw:frame></text:p>
      <text:p text:style-name="P662"><text:span text:style-name="T663">Benjamin Howard</text:span></text:p>
      <text:p text:style-name="P664"><text:span text:style-name="T665">22 minutes 9 seconds22:09</text:span></text:p>
      <text:p text:style-name="P666"><text:span text:style-name="T667">Benjamin Howard 22 minutes 9 seconds</text:span></text:p>
      <text:p text:style-name="P668"><text:span text:style-name="T669">Great, thank you.</text:span></text:p>
      <text:p text:style-name="P670"><draw:frame draw:style-name="a36" draw:name="drawing" text:anchor-type="as-char" svg:x="0in" svg:y="0in" svg:width="0.375in" svg:height="0.375in" style:rel-width="scale" style:rel-height="scale"><draw:image xlink:href="media/image1.png" xlink:type="simple" xlink:show="embed" xlink:actuate="onLoad"/><svg:title/><svg:desc>F,{1bdae8a0-186a-42be-a75b-87eb5cf65d96}{200},0.6458333,0.6458333</svg:desc></draw:frame></text:p>
      <text:p text:style-name="P671"><text:span text:style-name="T672">Manish Tomar</text:span></text:p>
      <text:p text:style-name="P673"><text:span text:style-name="T674">22 minutes 18 seconds22:18</text:span></text:p>
      <text:p text:style-name="P675"><text:span text:style-name="T676">Manish Tomar 22 minutes 18 seconds</text:span></text:p>
      <text:p text:style-name="P677"><text:span text:style-name="T678">Design and then the page, I'll probably give this to Erika.</text:span></text:p>
      <text:p text:style-name="P679"><text:span text:style-name="T680">Manish Tomar 22 minutes 31 seconds</text:span></text:p>
      <text:p text:style-name="P681"><text:span text:style-name="T682">Yeah, and then I work with separately with Divya on all the other back end and stuff and how to distribute the work.</text:span></text:p>
      <text:p text:style-name="P683"><text:span text:style-name="T684">Manish Tomar 22 minutes 42 seconds</text:span></text:p>
      <text:p text:style-name="P685"><text:span text:style-name="T686">Cool.</text:span></text:p>
      <text:p text:style-name="P687"><text:span text:style-name="T688">Manish Tomar 22 minutes 44 seconds</text:span></text:p>
      <text:p text:style-name="P689"><text:span text:style-name="T690">If there are no more questions.</text:span></text:p>
      <text:p text:style-name="P691"><text:span text:style-name="T692">Manish Tomar 22 minutes 48 seconds</text:span></text:p>
      <text:p text:style-name="P693"><text:span text:style-name="T694">You can.</text:span></text:p>
      <text:p text:style-name="P695"><text:span text:style-name="T696">Manish Tomar 22 minutes 50 seconds</text:span></text:p>
      <text:p text:style-name="P697"><text:span text:style-name="T698">What?</text:span></text:p>
      <text:p text:style-name="P699"><draw:frame draw:style-name="a37" draw:name="drawing" text:anchor-type="as-char" svg:x="0in" svg:y="0in" svg:width="0.375in" svg:height="0.375in" style:rel-width="scale" style:rel-height="scale"><draw:image xlink:href="media/image1.png" xlink:type="simple" xlink:show="embed" xlink:actuate="onLoad"/><svg:title/><svg:desc>F,{f9809f8c-0900-45ab-8a84-9adffd35b9de}{95},0.6458333,0.6458333</svg:desc></draw:frame></text:p>
      <text:p text:style-name="P700"><text:span text:style-name="T701">Benjamin Howard</text:span></text:p>
      <text:p text:style-name="P702"><text:span text:style-name="T703">22 minutes 52 seconds22:52</text:span></text:p>
      <text:p text:style-name="P704"><text:span text:style-name="T705">Benjamin Howard 22 minutes 52 seconds</text:span></text:p>
      <text:p text:style-name="P706"><text:span text:style-name="T707">Alright, thank you. Bye, everyone.</text:span></text:p>
      <text:p text:style-name="P708"><draw:frame draw:style-name="a38" draw:name="drawing" text:anchor-type="as-char" svg:x="0in" svg:y="0in" svg:width="0.375in" svg:height="0.375in" style:rel-width="scale" style:rel-height="scale"><draw:image xlink:href="media/image1.png" xlink:type="simple" xlink:show="embed" xlink:actuate="onLoad"/><svg:title/><svg:desc>F,{f9809f8c-0900-45ab-8a84-9adffd35b9de}{145},0.6458333,0.6458333</svg:desc></draw:frame></text:p>
      <text:p text:style-name="P709"><text:span text:style-name="T710">Manish Tomar</text:span></text:p>
      <text:p text:style-name="P711"><text:span text:style-name="T712">22 minutes 54 seconds22:54</text:span></text:p>
      <text:p text:style-name="P713"><text:span text:style-name="T714">Manish Tomar 22 minutes 54 seconds</text:span></text:p>
      <text:p text:style-name="P715"><text:span text:style-name="T716">Thank you. Goodbye.</text:span></text:p>
      <text:p text:style-name="P717"><text:span text:style-name="T718">DP</text:span></text:p>
      <text:p text:style-name="P719"><text:span text:style-name="T720">Divya Pola</text:span></text:p>
      <text:p text:style-name="P721"><text:span text:style-name="T722">22 minutes 56 seconds22:56</text:span></text:p>
      <text:p text:style-name="P723"><text:span text:style-name="T724">Divya Pola 22 minutes 56 seconds</text:span></text:p>
      <text:p text:style-name="P725"><text:span text:style-name="T726">Thank you.</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stem-ui" svg:font-family="system-ui" style:font-family-generic="roman" svg:panose-1="0 0 0 0 0 0 0 0 0 0"/>
    <style:font-face style:name="BlinkMacSystemFont" svg:font-family="BlinkMacSystemFont" style:font-family-generic="roman" svg:panose-1="0 0 0 0 0 0 0 0 0 0"/>
    <style:font-face style:name="FabricMDL2Icons-6" svg:font-family="FabricMDL2Icons-6" style:font-family-generic="roman" svg:panose-1="0 0 0 0 0 0 0 0 0 0"/>
    <style:font-face style:name="Segoe UI" svg:font-family="Segoe UI" style:font-family-generic="swiss" style:font-pitch="variable" svg:panose-1="2 11 5 2 4 2 4 2 2 3"/>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Display"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Howard</meta:initial-creator>
    <dc:creator>Benjamin Howard</dc:creator>
    <meta:creation-date>2026-07-08T14:38:00Z</meta:creation-date>
    <dc:date>2026-07-08T14:38:00Z</dc:date>
    <meta:template xlink:href="Normal.dotm" xlink:type="simple"/>
    <meta:editing-cycles>1</meta:editing-cycles>
    <meta:editing-duration>PT0S</meta:editing-duration>
    <meta:document-statistic meta:page-count="1" meta:paragraph-count="33" meta:word-count="2490" meta:character-count="16655" meta:row-count="118" meta:non-whitespace-character-count="14198"/>
  </office:meta>
</office:document-meta>
</file>