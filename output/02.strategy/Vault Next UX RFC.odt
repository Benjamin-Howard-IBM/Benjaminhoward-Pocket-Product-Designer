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3.2465in"/>
    </style:style>
    <style:style style:name="TableColumn3" style:family="table-column">
      <style:table-column-properties style:column-width="3.2534in"/>
    </style:style>
    <style:style style:name="Table1" style:family="table" style:master-page-name="MP0">
      <style:table-properties style:width="6.5in" fo:margin-left="0in" table:align="left"/>
    </style:style>
    <style:style style:name="TableRow4" style:family="table-row">
      <style:table-row-properties style:min-row-height="0.2083in"/>
    </style:style>
    <style:style style:name="TableCell5" style:family="table-cell">
      <style:table-cell-properties fo:border-top="0.0104in solid #000000" fo:border-left="none" fo:border-bottom="none" fo:border-right="none" style:writing-mode="lr-tb" fo:padding-top="0.0312in" fo:padding-left="0.0729in" fo:padding-bottom="0.0312in" fo:padding-right="0.0729in"/>
    </style:style>
    <style:style style:name="P6" style:parent-style-name="Normal" style:family="paragraph">
      <style:paragraph-properties fo:break-before="page" fo:margin-bottom="0in" fo:line-height="100%"/>
      <style:text-properties style:font-name="Aptos" style:font-name-asian="Aptos" style:font-name-complex="Aptos" fo:color="#0F4761" fo:font-size="20pt" style:font-size-asian="20pt" style:font-size-complex="20pt"/>
    </style:style>
    <style:style style:name="TableRow29" style:family="table-row">
      <style:table-row-properties style:min-row-height="0.2083in"/>
    </style:style>
    <style:style style:name="TableCell30" style:family="table-cell">
      <style:table-cell-properties fo:border="none" style:writing-mode="lr-tb" fo:padding-top="0.0312in" fo:padding-left="0.0729in" fo:padding-bottom="0.0312in" fo:padding-right="0.0729in"/>
    </style:style>
    <style:style style:name="P31" style:parent-style-name="Normal" style:family="paragraph">
      <style:paragraph-properties fo:margin-bottom="0.0833in" fo:line-height="100%"/>
    </style:style>
    <style:style style:name="T32" style:parent-style-name="DefaultParagraphFont" style:family="text">
      <style:text-properties style:font-name="Aptos" style:font-name-asian="Aptos" style:font-name-complex="Aptos" fo:font-weight="bold" style:font-weight-asian="bold" style:font-weight-complex="bold"/>
    </style:style>
    <style:style style:name="T33" style:parent-style-name="DefaultParagraphFont" style:family="text">
      <style:text-properties style:font-name="Aptos" style:font-name-asian="Aptos" style:font-name-complex="Aptos"/>
    </style:style>
    <style:style style:name="TableRow34" style:family="table-row">
      <style:table-row-properties style:min-row-height="0.2083in"/>
    </style:style>
    <style:style style:name="TableCell35" style:family="table-cell">
      <style:table-cell-properties fo:border="none" style:writing-mode="lr-tb" fo:padding-top="0in" fo:padding-left="0.0729in" fo:padding-bottom="0in" fo:padding-right="0.0729in"/>
    </style:style>
    <style:style style:name="P36" style:parent-style-name="Normal" style:family="paragraph">
      <style:paragraph-properties fo:margin-bottom="0in" fo:line-height="100%"/>
    </style:style>
    <style:style style:name="T37" style:parent-style-name="DefaultParagraphFont" style:family="text">
      <style:text-properties style:font-name="Aptos" style:font-name-asian="Aptos" style:font-name-complex="Aptos" fo:font-weight="bold" style:font-weight-asian="bold" style:font-weight-complex="bold" fo:font-size="10pt" style:font-size-asian="10pt" style:font-size-complex="10pt"/>
    </style:style>
    <style:style style:name="T38" style:parent-style-name="DefaultParagraphFont" style:family="text">
      <style:text-properties style:font-name="Aptos" style:font-name-asian="Aptos" style:font-name-complex="Aptos" fo:font-size="10pt" style:font-size-asian="10pt" style:font-size-complex="10pt"/>
    </style:style>
    <style:style style:name="T39" style:parent-style-name="DefaultParagraphFont" style:family="text">
      <style:text-properties style:font-name="Aptos" style:font-name-asian="Aptos" style:font-name-complex="Aptos" fo:font-size="10pt" style:font-size-asian="10pt" style:font-size-complex="10pt"/>
    </style:style>
    <style:style style:name="T40" style:parent-style-name="DefaultParagraphFont" style:family="text">
      <style:text-properties style:font-name="Aptos" style:font-name-asian="Aptos" style:font-name-complex="Aptos" fo:font-size="10pt" style:font-size-asian="10pt" style:font-size-complex="10pt"/>
    </style:style>
    <style:style style:name="TableCell41" style:family="table-cell">
      <style:table-cell-properties fo:border="none" style:writing-mode="lr-tb" fo:padding-top="0in" fo:padding-left="0.0729in" fo:padding-bottom="0in" fo:padding-right="0.0729in"/>
    </style:style>
    <style:style style:name="P42" style:parent-style-name="Normal" style:family="paragraph">
      <style:paragraph-properties fo:margin-bottom="0in" fo:line-height="100%"/>
    </style:style>
    <style:style style:name="T43" style:parent-style-name="DefaultParagraphFont" style:family="text">
      <style:text-properties style:font-name="Aptos" style:font-name-asian="Aptos" style:font-name-complex="Aptos" fo:font-weight="bold" style:font-weight-asian="bold" style:font-weight-complex="bold" fo:font-size="10pt" style:font-size-asian="10pt" style:font-size-complex="10pt"/>
    </style:style>
    <style:style style:name="T44" style:parent-style-name="DefaultParagraphFont" style:family="text">
      <style:text-properties style:font-name="Aptos" style:font-name-asian="Aptos" style:font-name-complex="Aptos" fo:font-size="10pt" style:font-size-asian="10pt" style:font-size-complex="10pt"/>
    </style:style>
    <style:style style:name="T45" style:parent-style-name="DefaultParagraphFont" style:family="text">
      <style:text-properties style:font-name="Aptos" style:font-name-asian="Aptos" style:font-name-complex="Aptos" fo:font-weight="bold" style:font-weight-asian="bold" style:font-weight-complex="bold" fo:font-size="10pt" style:font-size-asian="10pt" style:font-size-complex="10pt"/>
    </style:style>
    <style:style style:name="T46" style:parent-style-name="DefaultParagraphFont" style:family="text">
      <style:text-properties style:font-name="Aptos" style:font-name-asian="Aptos" style:font-name-complex="Aptos" fo:font-size="10pt" style:font-size-asian="10pt" style:font-size-complex="10pt"/>
    </style:style>
    <style:style style:name="TableRow47" style:family="table-row">
      <style:table-row-properties style:min-row-height="0.2083in"/>
    </style:style>
    <style:style style:name="TableCell48" style:family="table-cell">
      <style:table-cell-properties fo:border="none" style:writing-mode="lr-tb" fo:padding-top="0in" fo:padding-left="0.0729in" fo:padding-bottom="0in" fo:padding-right="0.0729in"/>
    </style:style>
    <style:style style:name="P49" style:parent-style-name="Normal" style:family="paragraph">
      <style:paragraph-properties fo:margin-bottom="0in" fo:line-height="100%"/>
    </style:style>
    <style:style style:name="T50" style:parent-style-name="DefaultParagraphFont" style:family="text">
      <style:text-properties style:font-name="Aptos" style:font-name-asian="Aptos" style:font-name-complex="Aptos" fo:font-weight="bold" style:font-weight-asian="bold" style:font-weight-complex="bold" fo:font-size="10pt" style:font-size-asian="10pt" style:font-size-complex="10pt"/>
    </style:style>
    <style:style style:name="T51" style:parent-style-name="DefaultParagraphFont" style:family="text">
      <style:text-properties style:font-name="Aptos" style:font-name-asian="Aptos" style:font-name-complex="Aptos" fo:font-size="10pt" style:font-size-asian="10pt" style:font-size-complex="10pt"/>
    </style:style>
    <style:style style:name="TableCell52" style:family="table-cell">
      <style:table-cell-properties fo:border="none" style:writing-mode="lr-tb" fo:padding-top="0in" fo:padding-left="0.0729in" fo:padding-bottom="0in" fo:padding-right="0.0729in"/>
    </style:style>
    <style:style style:name="P53" style:parent-style-name="Normal" style:family="paragraph">
      <style:paragraph-properties fo:margin-bottom="0in" fo:line-height="100%"/>
    </style:style>
    <style:style style:name="T54" style:parent-style-name="DefaultParagraphFont" style:family="text">
      <style:text-properties style:font-name="Aptos" style:font-name-asian="Aptos" style:font-name-complex="Aptos" fo:font-weight="bold" style:font-weight-asian="bold" style:font-weight-complex="bold" fo:font-size="10pt" style:font-size-asian="10pt" style:font-size-complex="10pt"/>
    </style:style>
    <style:style style:name="T55" style:parent-style-name="DefaultParagraphFont" style:family="text">
      <style:text-properties style:font-name="Aptos" style:font-name-asian="Aptos" style:font-name-complex="Aptos" fo:font-size="10pt" style:font-size-asian="10pt" style:font-size-complex="10pt"/>
    </style:style>
    <style:style style:name="T56" style:parent-style-name="DefaultParagraphFont" style:family="text">
      <style:text-properties style:font-name="Aptos" style:font-name-asian="Aptos" style:font-name-complex="Aptos" fo:font-size="10pt" style:font-size-asian="10pt" style:font-size-complex="10pt"/>
    </style:style>
    <style:style style:name="TableRow57" style:family="table-row">
      <style:table-row-properties style:min-row-height="0.2083in"/>
    </style:style>
    <style:style style:name="TableCell58" style:family="table-cell">
      <style:table-cell-properties fo:border-top="none" fo:border-left="none" fo:border-bottom="0.0104in solid #000000" fo:border-right="none" style:writing-mode="lr-tb" fo:padding-top="0in" fo:padding-left="0.0729in" fo:padding-bottom="0in" fo:padding-right="0.0729in"/>
    </style:style>
    <style:style style:name="P59" style:parent-style-name="Normal" style:family="paragraph">
      <style:paragraph-properties fo:margin-bottom="0in" fo:line-height="100%"/>
    </style:style>
    <style:style style:name="T60" style:parent-style-name="DefaultParagraphFont" style:family="text">
      <style:text-properties style:font-name="Aptos" style:font-name-asian="Aptos" style:font-name-complex="Aptos" fo:font-weight="bold" style:font-weight-asian="bold" style:font-weight-complex="bold" fo:font-size="10pt" style:font-size-asian="10pt" style:font-size-complex="10pt" fo:language="pt" fo:country="BR"/>
    </style:style>
    <style:style style:name="T61" style:parent-style-name="DefaultParagraphFont" style:family="text">
      <style:text-properties style:font-name="Aptos" style:font-name-asian="Aptos" style:font-name-complex="Aptos" fo:font-size="10pt" style:font-size-asian="10pt" style:font-size-complex="10pt" fo:language="pt" fo:country="BR"/>
    </style:style>
    <style:style style:name="T62" style:parent-style-name="Hyperlink" style:family="text">
      <style:text-properties style:font-name="Aptos" style:font-name-asian="Aptos" style:font-name-complex="Aptos" fo:font-size="10pt" style:font-size-asian="10pt" style:font-size-complex="10pt" fo:language="pt" fo:country="BR"/>
    </style:style>
    <style:style style:name="T63" style:parent-style-name="Hyperlink" style:family="text">
      <style:text-properties style:font-name="Aptos" style:font-name-asian="Aptos" style:font-name-complex="Aptos" fo:font-size="10pt" style:font-size-asian="10pt" style:font-size-complex="10pt" fo:language="pt" fo:country="BR"/>
    </style:style>
    <style:style style:name="T64" style:parent-style-name="DefaultParagraphFont" style:family="text">
      <style:text-properties style:font-name="Aptos" style:font-name-asian="Aptos" style:font-name-complex="Aptos" fo:font-size="10pt" style:font-size-asian="10pt" style:font-size-complex="10pt" fo:language="pt" fo:country="BR"/>
    </style:style>
    <style:style style:name="TableCell65" style:family="table-cell">
      <style:table-cell-properties fo:border-top="none" fo:border-left="none" fo:border-bottom="0.0104in solid #000000" fo:border-right="none" style:writing-mode="lr-tb" fo:padding-top="0in" fo:padding-left="0.0729in" fo:padding-bottom="0in" fo:padding-right="0.0729in"/>
    </style:style>
    <style:style style:name="P66" style:parent-style-name="Normal" style:family="paragraph">
      <style:paragraph-properties fo:margin-bottom="0in" fo:line-height="100%"/>
    </style:style>
    <style:style style:name="T67" style:parent-style-name="DefaultParagraphFont" style:family="text">
      <style:text-properties style:font-name="Aptos" style:font-name-asian="Aptos" style:font-name-complex="Aptos" fo:font-weight="bold" style:font-weight-asian="bold" style:font-weight-complex="bold" fo:font-size="10pt" style:font-size-asian="10pt" style:font-size-complex="10pt"/>
    </style:style>
    <style:style style:name="T68" style:parent-style-name="DefaultParagraphFont" style:family="text">
      <style:text-properties style:font-name="Aptos" style:font-name-asian="Aptos" style:font-name-complex="Aptos" fo:font-size="10pt" style:font-size-asian="10pt" style:font-size-complex="10pt"/>
    </style:style>
    <style:style style:name="T69" style:parent-style-name="DefaultParagraphFont" style:family="text">
      <style:text-properties style:font-name="Aptos" style:font-name-asian="Aptos" style:font-name-complex="Aptos" fo:font-size="10pt" style:font-size-asian="10pt" style:font-size-complex="10pt"/>
    </style:style>
    <style:style style:name="T70" style:parent-style-name="DefaultParagraphFont" style:family="text">
      <style:text-properties style:font-name="Aptos" style:font-name-asian="Aptos" style:font-name-complex="Aptos" fo:font-size="10pt" style:font-size-asian="10pt" style:font-size-complex="10pt"/>
    </style:style>
    <style:style style:name="T71" style:parent-style-name="DefaultParagraphFont" style:family="text">
      <style:text-properties style:font-name="Aptos" style:font-name-asian="Aptos" style:font-name-complex="Aptos" fo:font-size="10pt" style:font-size-asian="10pt" style:font-size-complex="10pt"/>
    </style:style>
    <style:style style:name="T72" style:parent-style-name="DefaultParagraphFont" style:family="text">
      <style:text-properties style:font-name="Aptos" style:font-name-asian="Aptos" style:font-name-complex="Aptos" fo:font-size="10pt" style:font-size-asian="10pt" style:font-size-complex="10pt"/>
    </style:style>
    <style:style style:name="T73" style:parent-style-name="DefaultParagraphFont" style:family="text">
      <style:text-properties style:font-name="Aptos" style:font-name-asian="Aptos" style:font-name-complex="Aptos" fo:font-size="10pt" style:font-size-asian="10pt" style:font-size-complex="10pt"/>
    </style:style>
    <style:style style:name="T74" style:parent-style-name="DefaultParagraphFont" style:family="text">
      <style:text-properties style:font-name="Aptos" style:font-name-asian="Aptos" style:font-name-complex="Aptos" fo:font-size="10pt" style:font-size-asian="10pt" style:font-size-complex="10pt"/>
    </style:style>
    <style:style style:name="T75" style:parent-style-name="DefaultParagraphFont" style:family="text">
      <style:text-properties style:font-name="Aptos" style:font-name-asian="Aptos" style:font-name-complex="Aptos" fo:font-size="10pt" style:font-size-asian="10pt" style:font-size-complex="10pt"/>
    </style:style>
    <style:style style:name="T76" style:parent-style-name="DefaultParagraphFont" style:family="text">
      <style:text-properties style:font-name="Aptos" style:font-name-asian="Aptos" style:font-name-complex="Aptos" fo:font-size="10pt" style:font-size-asian="10pt" style:font-size-complex="10pt"/>
    </style:style>
    <style:style style:name="P77" style:parent-style-name="Normal" style:family="paragraph">
      <style:text-properties style:font-name="Aptos" style:font-name-asian="Aptos" style:font-name-complex="Aptos" fo:color="#000000"/>
    </style:style>
    <style:style style:name="P78" style:parent-style-name="TOC2" style:family="paragraph">
      <style:paragraph-properties>
        <style:tab-stops>
          <style:tab-stop style:type="right" style:leader-style="dotted" style:leader-text="." style:position="6.3472in"/>
        </style:tab-stops>
      </style:paragraph-properties>
    </style:style>
    <style:style style:name="P79" style:parent-style-name="TOC3" style:family="paragraph">
      <style:paragraph-properties>
        <style:tab-stops>
          <style:tab-stop style:type="right" style:leader-style="dotted" style:leader-text="." style:position="6.1944in"/>
        </style:tab-stops>
      </style:paragraph-properties>
    </style:style>
    <style:style style:name="P80" style:parent-style-name="TOC3" style:family="paragraph">
      <style:paragraph-properties>
        <style:tab-stops>
          <style:tab-stop style:type="right" style:leader-style="dotted" style:leader-text="." style:position="6.1944in"/>
        </style:tab-stops>
      </style:paragraph-properties>
    </style:style>
    <style:style style:name="P81" style:parent-style-name="TOC2" style:family="paragraph">
      <style:paragraph-properties>
        <style:tab-stops>
          <style:tab-stop style:type="right" style:leader-style="dotted" style:leader-text="." style:position="6.3472in"/>
        </style:tab-stops>
      </style:paragraph-properties>
    </style:style>
    <style:style style:name="P82" style:parent-style-name="TOC2" style:family="paragraph">
      <style:paragraph-properties>
        <style:tab-stops>
          <style:tab-stop style:type="right" style:leader-style="dotted" style:leader-text="." style:position="6.3472in"/>
        </style:tab-stops>
      </style:paragraph-properties>
    </style:style>
    <style:style style:name="P83" style:parent-style-name="TOC2" style:family="paragraph">
      <style:paragraph-properties>
        <style:tab-stops>
          <style:tab-stop style:type="right" style:leader-style="dotted" style:leader-text="." style:position="6.3472in"/>
        </style:tab-stops>
      </style:paragraph-properties>
    </style:style>
    <style:style style:name="P84" style:parent-style-name="TOC3" style:family="paragraph">
      <style:paragraph-properties>
        <style:tab-stops>
          <style:tab-stop style:type="right" style:leader-style="dotted" style:leader-text="." style:position="6.1944in"/>
        </style:tab-stops>
      </style:paragraph-properties>
    </style:style>
    <style:style style:name="P85" style:parent-style-name="TOC5" style:family="paragraph">
      <style:paragraph-properties>
        <style:tab-stops>
          <style:tab-stop style:type="right" style:leader-style="dotted" style:leader-text="." style:position="5.8888in"/>
        </style:tab-stops>
      </style:paragraph-properties>
    </style:style>
    <style:style style:name="P86" style:parent-style-name="TOC5" style:family="paragraph">
      <style:paragraph-properties>
        <style:tab-stops>
          <style:tab-stop style:type="right" style:leader-style="dotted" style:leader-text="." style:position="5.8888in"/>
        </style:tab-stops>
      </style:paragraph-properties>
    </style:style>
    <style:style style:name="P87" style:parent-style-name="TOC5" style:family="paragraph">
      <style:paragraph-properties>
        <style:tab-stops>
          <style:tab-stop style:type="right" style:leader-style="dotted" style:leader-text="." style:position="5.8888in"/>
        </style:tab-stops>
      </style:paragraph-properties>
    </style:style>
    <style:style style:name="P88" style:parent-style-name="TOC2" style:family="paragraph">
      <style:paragraph-properties>
        <style:tab-stops>
          <style:tab-stop style:type="right" style:leader-style="dotted" style:leader-text="." style:position="6.3472in"/>
        </style:tab-stops>
      </style:paragraph-properties>
    </style:style>
    <style:style style:name="P89" style:parent-style-name="TOC3" style:family="paragraph">
      <style:paragraph-properties>
        <style:tab-stops>
          <style:tab-stop style:type="right" style:leader-style="dotted" style:leader-text="." style:position="6.1944in"/>
        </style:tab-stops>
      </style:paragraph-properties>
    </style:style>
    <style:style style:name="P90" style:parent-style-name="TOC2" style:family="paragraph">
      <style:paragraph-properties>
        <style:tab-stops>
          <style:tab-stop style:type="right" style:leader-style="dotted" style:leader-text="." style:position="6.3472in"/>
        </style:tab-stops>
      </style:paragraph-properties>
    </style:style>
    <style:style style:name="P91" style:parent-style-name="TOC2" style:family="paragraph">
      <style:paragraph-properties>
        <style:tab-stops>
          <style:tab-stop style:type="right" style:leader-style="dotted" style:leader-text="." style:position="6.3472in"/>
        </style:tab-stops>
      </style:paragraph-properties>
    </style:style>
    <style:style style:name="P92" style:parent-style-name="TOC3" style:family="paragraph">
      <style:paragraph-properties>
        <style:tab-stops>
          <style:tab-stop style:type="right" style:leader-style="dotted" style:leader-text="." style:position="6.1944in"/>
        </style:tab-stops>
      </style:paragraph-properties>
    </style:style>
    <style:style style:name="P93" style:parent-style-name="TOC3" style:family="paragraph">
      <style:paragraph-properties>
        <style:tab-stops>
          <style:tab-stop style:type="right" style:leader-style="dotted" style:leader-text="." style:position="6.1944in"/>
        </style:tab-stops>
      </style:paragraph-properties>
    </style:style>
    <style:style style:name="P94" style:parent-style-name="TOC3" style:family="paragraph">
      <style:paragraph-properties>
        <style:tab-stops>
          <style:tab-stop style:type="right" style:leader-style="dotted" style:leader-text="." style:position="6.1944in"/>
        </style:tab-stops>
      </style:paragraph-properties>
    </style:style>
    <style:style style:name="P95" style:parent-style-name="TOC3" style:family="paragraph">
      <style:paragraph-properties>
        <style:tab-stops>
          <style:tab-stop style:type="right" style:leader-style="dotted" style:leader-text="." style:position="6.1944in"/>
        </style:tab-stops>
      </style:paragraph-properties>
    </style:style>
    <style:style style:name="P96" style:parent-style-name="TOC4" style:family="paragraph">
      <style:paragraph-properties>
        <style:tab-stops>
          <style:tab-stop style:type="right" style:leader-style="dotted" style:leader-text="." style:position="6.0416in"/>
        </style:tab-stops>
      </style:paragraph-properties>
    </style:style>
    <style:style style:name="P97" style:parent-style-name="TOC4" style:family="paragraph">
      <style:paragraph-properties>
        <style:tab-stops>
          <style:tab-stop style:type="right" style:leader-style="dotted" style:leader-text="." style:position="6.0416in"/>
        </style:tab-stops>
      </style:paragraph-properties>
    </style:style>
    <style:style style:name="P98" style:parent-style-name="TOC3" style:family="paragraph">
      <style:paragraph-properties>
        <style:tab-stops>
          <style:tab-stop style:type="right" style:leader-style="dotted" style:leader-text="." style:position="6.1944in"/>
        </style:tab-stops>
      </style:paragraph-properties>
    </style:style>
    <style:style style:name="P99" style:parent-style-name="TOC3" style:family="paragraph">
      <style:paragraph-properties>
        <style:tab-stops>
          <style:tab-stop style:type="right" style:leader-style="dotted" style:leader-text="." style:position="6.1944in"/>
        </style:tab-stops>
      </style:paragraph-properties>
    </style:style>
    <style:style style:name="P100" style:parent-style-name="TOC2" style:family="paragraph">
      <style:paragraph-properties>
        <style:tab-stops>
          <style:tab-stop style:type="right" style:leader-style="dotted" style:leader-text="." style:position="6.3472in"/>
        </style:tab-stops>
      </style:paragraph-properties>
    </style:style>
    <style:style style:name="P101" style:parent-style-name="TOC3" style:family="paragraph">
      <style:paragraph-properties>
        <style:tab-stops>
          <style:tab-stop style:type="right" style:leader-style="dotted" style:leader-text="." style:position="6.1944in"/>
        </style:tab-stops>
      </style:paragraph-properties>
    </style:style>
    <style:style style:name="P102" style:parent-style-name="TOC3" style:family="paragraph">
      <style:paragraph-properties>
        <style:tab-stops>
          <style:tab-stop style:type="right" style:leader-style="dotted" style:leader-text="." style:position="6.1944in"/>
        </style:tab-stops>
      </style:paragraph-properties>
    </style:style>
    <style:style style:name="P103" style:parent-style-name="TOC3" style:family="paragraph">
      <style:paragraph-properties>
        <style:tab-stops>
          <style:tab-stop style:type="right" style:leader-style="dotted" style:leader-text="." style:position="6.1944in"/>
        </style:tab-stops>
      </style:paragraph-properties>
    </style:style>
    <style:style style:name="P104" style:parent-style-name="TOC2" style:family="paragraph">
      <style:paragraph-properties>
        <style:tab-stops>
          <style:tab-stop style:type="right" style:leader-style="dotted" style:leader-text="." style:position="6.3472in"/>
        </style:tab-stops>
      </style:paragraph-properties>
    </style:style>
    <style:style style:name="P105" style:parent-style-name="TOC3" style:family="paragraph">
      <style:paragraph-properties>
        <style:tab-stops>
          <style:tab-stop style:type="right" style:leader-style="dotted" style:leader-text="." style:position="6.1944in"/>
        </style:tab-stops>
      </style:paragraph-properties>
    </style:style>
    <style:style style:name="P106" style:parent-style-name="TOC3" style:family="paragraph">
      <style:paragraph-properties>
        <style:tab-stops>
          <style:tab-stop style:type="right" style:leader-style="dotted" style:leader-text="." style:position="6.1944in"/>
        </style:tab-stops>
      </style:paragraph-properties>
    </style:style>
    <style:style style:name="P107" style:parent-style-name="TOC3" style:family="paragraph">
      <style:paragraph-properties>
        <style:tab-stops>
          <style:tab-stop style:type="right" style:leader-style="dotted" style:leader-text="." style:position="6.1944in"/>
        </style:tab-stops>
      </style:paragraph-properties>
    </style:style>
    <style:style style:name="P108" style:parent-style-name="TOC3" style:family="paragraph">
      <style:paragraph-properties>
        <style:tab-stops>
          <style:tab-stop style:type="right" style:leader-style="dotted" style:leader-text="." style:position="6.1944in"/>
        </style:tab-stops>
      </style:paragraph-properties>
    </style:style>
    <style:style style:name="P109" style:parent-style-name="TOC2" style:family="paragraph">
      <style:paragraph-properties>
        <style:tab-stops>
          <style:tab-stop style:type="right" style:leader-style="dotted" style:leader-text="." style:position="6.3472in"/>
        </style:tab-stops>
      </style:paragraph-properties>
    </style:style>
    <style:style style:name="P110" style:parent-style-name="TOC2" style:family="paragraph">
      <style:paragraph-properties>
        <style:tab-stops>
          <style:tab-stop style:type="right" style:leader-style="dotted" style:leader-text="." style:position="6.3472in"/>
        </style:tab-stops>
      </style:paragraph-properties>
    </style:style>
    <style:style style:name="P111" style:parent-style-name="Normal" style:family="paragraph">
      <style:text-properties style:font-name="Aptos" style:font-name-asian="Aptos" style:font-name-complex="Aptos" fo:color="#000000"/>
    </style:style>
    <style:style style:name="P112" style:parent-style-name="ListParagraph" style:family="paragraph"/>
    <style:style style:name="P113" style:parent-style-name="ListParagraph" style:family="paragraph"/>
    <style:style style:name="P114" style:parent-style-name="ListParagraph" style:family="paragraph"/>
    <style:style style:name="TableColumn116" style:family="table-column">
      <style:table-column-properties style:column-width="2.1645in"/>
    </style:style>
    <style:style style:name="TableColumn117" style:family="table-column">
      <style:table-column-properties style:column-width="4.3284in"/>
    </style:style>
    <style:style style:name="Table115" style:family="table">
      <style:table-properties style:width="6.493in" fo:margin-left="0in" table:align="left"/>
    </style:style>
    <style:style style:name="TableRow118" style:family="table-row">
      <style:table-row-properties style:min-row-height="0.2083in"/>
    </style:style>
    <style:style style:name="TableCell119" style:family="table-cell">
      <style:table-cell-properties fo:border="0.0069in solid #000000" fo:background-color="#DAE8F8" style:writing-mode="lr-tb" fo:padding-top="0in" fo:padding-left="0.075in" fo:padding-bottom="0in" fo:padding-right="0.075in"/>
    </style:style>
    <style:style style:name="P120" style:parent-style-name="Normal" style:family="paragraph">
      <style:paragraph-properties fo:margin-bottom="0in"/>
      <style:text-properties fo:font-weight="bold" style:font-weight-asian="bold" style:font-weight-complex="bold"/>
    </style:style>
    <style:style style:name="TableCell121" style:family="table-cell">
      <style:table-cell-properties fo:border="0.0069in solid #000000" fo:background-color="#DAE8F8" style:writing-mode="lr-tb" fo:padding-top="0in" fo:padding-left="0.075in" fo:padding-bottom="0in" fo:padding-right="0.075in"/>
    </style:style>
    <style:style style:name="P122" style:parent-style-name="Normal" style:family="paragraph">
      <style:paragraph-properties fo:margin-bottom="0in"/>
      <style:text-properties fo:font-weight="bold" style:font-weight-asian="bold" style:font-weight-complex="bold"/>
    </style:style>
    <style:style style:name="TableRow123" style:family="table-row">
      <style:table-row-properties style:min-row-height="0.2083in"/>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text-properties fo:font-weight="bold" style:font-weight-asian="bold" style:font-weight-complex="bold"/>
    </style:style>
    <style:style style:name="P126" style:parent-style-name="Normal"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Normal" style:family="paragraph">
      <style:paragraph-properties fo:margin-bottom="0in" fo:line-height="100%"/>
    </style:style>
    <style:style style:name="TableRow134" style:family="table-row">
      <style:table-row-properties style:min-row-height="0.2083in"/>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text-properties fo:font-weight="bold" style:font-weight-asian="bold" style:font-weight-complex="bold"/>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ListParagraph" style:family="paragraph"/>
    <style:style style:name="TableRow143" style:family="table-row">
      <style:table-row-properties style:min-row-height="0.2083in"/>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text-properties fo:font-weight="bold" style:font-weight-asian="bold" style:font-weight-complex="bold"/>
    </style:style>
    <style:style style:name="P146" style:parent-style-name="Normal" style:family="paragraph">
      <style:paragraph-properties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Normal" style:family="paragraph">
      <style:paragraph-properties fo:margin-bottom="0in" fo:line-height="100%"/>
    </style:style>
    <style:style style:name="P152" style:parent-style-name="Normal" style:family="paragraph">
      <style:paragraph-properties fo:break-before="page"/>
    </style:style>
    <style:style style:name="P153" style:parent-style-name="Heading3" style:family="paragraph">
      <style:paragraph-properties fo:margin-top="0in" fo:margin-bottom="0.1111in"/>
    </style:style>
    <style:style style:name="P154" style:parent-style-name="Normal" style:family="paragraph">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P156" style:parent-style-name="Normal" style:family="paragraph">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P160" style:parent-style-name="Normal" style:family="paragraph">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P162" style:parent-style-name="Normal" style:family="paragraph">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Normal" style:family="paragraph">
      <style:paragraph-properties fo:text-align="center"/>
    </style:style>
    <style:style style:name="T168" style:parent-style-name="DefaultParagraphFont" style:family="text">
      <style:text-properties fo:font-style="italic" style:font-style-asian="italic" style:font-style-complex="italic" fo:font-size="11pt" style:font-size-asian="11pt" style:font-size-complex="11pt"/>
    </style:style>
    <style:style style:name="T169" style:parent-style-name="DefaultParagraphFont" style:family="text">
      <style:text-properties fo:font-style="italic" style:font-style-asian="italic" style:font-style-complex="italic" fo:font-size="11pt" style:font-size-asian="11pt" style:font-size-complex="11pt"/>
    </style:style>
    <style:style style:name="P170" style:parent-style-name="Normal" style:family="paragraph">
      <style:paragraph-properties fo:text-align="center"/>
      <style:text-properties fo:font-style="italic" style:font-style-asian="italic" style:font-style-complex="italic" fo:font-size="11pt" style:font-size-asian="11pt" style:font-size-complex="11pt"/>
    </style:style>
    <style:style style:name="P171" style:parent-style-name="Normal" style:family="paragraph">
      <style:paragraph-properties fo:text-align="center"/>
    </style:style>
    <style:style style:name="T172" style:parent-style-name="DefaultParagraphFont" style:family="text">
      <style:text-properties fo:font-style="italic" style:font-style-asian="italic" style:font-style-complex="italic" fo:font-size="11pt" style:font-size-asian="11pt" style:font-size-complex="11pt"/>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T176" style:parent-style-name="Hyperlink" style:family="text">
      <style:text-properties fo:font-style="italic" style:font-style-asian="italic" style:font-style-complex="italic"/>
    </style:style>
    <style:style style:name="T177" style:parent-style-name="DefaultParagraphFont" style:family="text">
      <style:text-properties fo:font-style="italic" style:font-style-asian="italic" style:font-style-complex="italic"/>
    </style:style>
    <style:style style:name="T178" style:parent-style-name="Hyperlink" style:family="text">
      <style:text-properties fo:font-style="italic" style:font-style-asian="italic" style:font-style-complex="italic"/>
    </style:style>
    <style:style style:name="P179" style:parent-style-name="ListParagraph" style:family="paragraph"/>
    <style:style style:name="T180" style:parent-style-name="DefaultParagraphFont" style:family="text">
      <style:text-properties fo:font-weight="bold" style:font-weight-asian="bold" style:font-weight-complex="bold"/>
    </style:style>
    <style:style style:name="P181" style:parent-style-name="ListParagraph" style:family="paragraph"/>
    <style:style style:name="T182" style:parent-style-name="DefaultParagraphFont" style:family="text">
      <style:text-properties fo:font-weight="bold" style:font-weight-asian="bold" style:font-weight-complex="bold"/>
    </style:style>
    <style:style style:name="P183" style:parent-style-name="ListParagraph" style:family="paragraph"/>
    <style:style style:name="T184" style:parent-style-name="DefaultParagraphFont" style:family="text">
      <style:text-properties fo:font-weight="bold" style:font-weight-asian="bold" style:font-weight-complex="bold"/>
    </style:style>
    <style:style style:name="P185" style:parent-style-name="ListParagraph" style:family="paragraph"/>
    <style:style style:name="T186" style:parent-style-name="DefaultParagraphFont" style:family="text">
      <style:text-properties fo:font-weight="bold" style:font-weight-asian="bold" style:font-weight-complex="bold"/>
    </style:style>
    <style:style style:name="P187" style:parent-style-name="Normal" style:family="paragraph">
      <style:text-properties fo:font-weight="bold" style:font-weight-asian="bold" style:font-weight-complex="bold"/>
    </style:style>
    <style:style style:name="P188" style:parent-style-name="ListParagraph" style:family="paragraph"/>
    <style:style style:name="P189" style:parent-style-name="Normal" style:family="paragraph">
      <style:text-properties fo:font-weight="bold" style:font-weight-asian="bold" style:font-weight-complex="bold"/>
    </style:style>
    <style:style style:name="P190" style:parent-style-name="ListParagraph" style:family="paragraph"/>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style style:name="P198" style:parent-style-name="ListParagraph" style:family="paragraph"/>
    <style:style style:name="P199" style:parent-style-name="Normal" style:family="paragraph">
      <style:paragraph-properties fo:break-before="page"/>
    </style:style>
    <style:style style:name="T200" style:parent-style-name="DefaultParagraphFont" style:family="text">
      <style:text-properties fo:font-weight="bold" style:font-weight-asian="bold" style:font-weight-complex="bold"/>
    </style:style>
    <style:style style:name="P201" style:parent-style-name="Normal" style:family="paragraph">
      <style:text-properties fo:font-weight="bold" style:font-weight-asian="bold" style:font-weight-complex="bold"/>
    </style:style>
    <style:style style:name="P202" style:parent-style-name="Normal" style:family="paragraph">
      <style:text-properties fo:font-weight="bold" style:font-weight-asian="bold" style:font-weight-complex="bold"/>
    </style:style>
    <style:style style:name="P203" style:parent-style-name="Normal" style:family="paragraph">
      <style:text-properties fo:font-weight="bold" style:font-weight-asian="bold" style:font-weight-complex="bold"/>
    </style:style>
    <style:style style:name="P204" style:parent-style-name="Normal" style:family="paragraph">
      <style:text-properties fo:font-weight="bold" style:font-weight-asian="bold" style:font-weight-complex="bold"/>
    </style:style>
    <style:style style:name="P205" style:parent-style-name="Normal" style:family="paragraph">
      <style:text-properties fo:font-weight="bold" style:font-weight-asian="bold" style:font-weight-complex="bold"/>
    </style:style>
    <style:style style:name="T206" style:parent-style-name="CommentReference" style:family="text">
      <style:text-properties fo:font-size="14pt" style:font-size-asian="14pt" style:font-size-complex="14pt"/>
    </style:style>
    <style:style style:name="T207" style:parent-style-name="DefaultParagraphFont" style:family="text">
      <style:text-properties style:font-name="Aptos" style:font-name-asian="Aptos" style:font-name-complex="Aptos"/>
    </style:style>
    <style:style style:name="P208" style:parent-style-name="Normal" style:family="paragraph">
      <style:text-properties style:font-name="Aptos" style:font-name-asian="Aptos" style:font-name-complex="Aptos"/>
    </style:style>
    <style:style style:name="T209" style:parent-style-name="DefaultParagraphFont" style:family="text">
      <style:text-properties style:font-name="Aptos" style:font-name-asian="Aptos" style:font-name-complex="Aptos"/>
    </style:style>
    <style:style style:name="P210" style:parent-style-name="Normal" style:family="paragraph">
      <style:text-properties style:font-name="Aptos" style:font-name-asian="Aptos" style:font-name-complex="Aptos"/>
    </style:style>
    <style:style style:name="T211" style:parent-style-name="DefaultParagraphFont" style:family="text">
      <style:text-properties style:font-name="Aptos" style:font-name-asian="Aptos" style:font-name-complex="Aptos"/>
    </style:style>
    <style:style style:name="P212" style:parent-style-name="Normal" style:family="paragraph">
      <style:text-properties style:font-name="Aptos" style:font-name-asian="Aptos" style:font-name-complex="Aptos"/>
    </style:style>
    <style:style style:name="T213" style:parent-style-name="CommentReference" style:family="text">
      <style:text-properties fo:font-size="14pt" style:font-size-asian="14pt" style:font-size-complex="14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solid #bfbfbf"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columns-spanned="2">
            <text:p text:style-name="P6">[RFC] [VLT-???]: Vault Next UX - A User-focused Approach</text:p>
          </table:table-cell>
          <table:covered-table-cell/>
        </table:table-row>
        <table:table-row table:style-name="TableRow29">
          <table:table-cell table:style-name="TableCell30" table:number-columns-spanned="2">
            <text:p text:style-name="P31"><text:span text:style-name="T32">Summary:<text:s/></text:span><text:span text:style-name="T33">This document captures the user experience journey of Vault Next centered around its onboarding, adoption, and differentiating value.</text:span></text:p>
          </table:table-cell>
          <table:covered-table-cell/>
        </table:table-row>
        <table:table-row table:style-name="TableRow34">
          <table:table-cell table:style-name="TableCell35">
            <text:p text:style-name="P36"><text:span text:style-name="T37">Created:<text:s/></text:span><text:span text:style-name="T38"><text:s/>Apr<text:s/></text:span><text:span text:style-name="T39">28</text:span><text:span text:style-name="T40">, 2026</text:span></text:p>
          </table:table-cell>
          <table:table-cell table:style-name="TableCell41">
            <text:p text:style-name="P42"><text:span text:style-name="T43">Status:<text:s/></text:span><text:span text:style-name="T44"><text:s/></text:span><text:span text:style-name="T45">WIP</text:span><text:span text:style-name="T46"><text:s/>| In-Review | Approved | Obsolete</text:span></text:p>
          </table:table-cell>
        </table:table-row>
        <table:table-row table:style-name="TableRow47">
          <table:table-cell table:style-name="TableCell48">
            <text:p text:style-name="P49"><text:span text:style-name="T50">Product:<text:s/></text:span><text:span text:style-name="T51"><text:s/>Vault</text:span></text:p>
          </table:table-cell>
          <table:table-cell table:style-name="TableCell52">
            <text:p text:style-name="P53"><text:span text:style-name="T54">Owner:<text:s/></text:span><text:span text:style-name="T55"><text:s/></text:span><text:span text:style-name="T56">gabi.viana@ibm.com<text:s/></text:span></text:p>
          </table:table-cell>
        </table:table-row>
        <table:table-row table:style-name="TableRow57">
          <table:table-cell table:style-name="TableCell58">
            <text:p text:style-name="P59"><text:span text:style-name="T60">Contributors:<text:s/></text:span><text:span text:style-name="T61"><text:s/></text:span><text:a xlink:href="mailto:dpullat@ibm.com" office:target-frame-name="_top" xlink:show="replace"><text:span text:style-name="T62">dpullat@ibm.com</text:span><text:span text:style-name="T63">;</text:span></text:a><text:span text:style-name="T64"><text:s/>hans.kao@ibm.com</text:span></text:p>
          </table:table-cell>
          <table:table-cell table:style-name="TableCell65">
            <text:p text:style-name="P66"><text:span text:style-name="T67">Approvers:<text:s/></text:span><text:span text:style-name="T68"><text:s/></text:span><text:span text:style-name="T69">emily</text:span><text:span text:style-name="T70">.leahy</text:span><text:span text:style-name="T71">@ibm.com</text:span><text:span text:style-name="T72">, drew</text:span><text:span text:style-name="T73">.roy</text:span><text:span text:style-name="T74">@ibm.com</text:span><text:span text:style-name="T75">, jeff</text:span><text:span text:style-name="T76">.m@ibm.com</text:span></text:p>
          </table:table-cell>
        </table:table-row>
      </table:table>
      <text:p text:style-name="P77"/>
      <text:table-of-content text:name="_TOC3">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8"><text:a xlink:href="#_Toc360672756" office:target-frame-name="_top" xlink:show="replace"><text:span text:style-name="Hyperlink">Background</text:span><text:tab/><text:span text:style-name="Hyperlink">1</text:span></text:a></text:p>
          <text:p text:style-name="P79"><text:a xlink:href="#_Toc1566171963" office:target-frame-name="_top" xlink:show="replace"><text:span text:style-name="Hyperlink">Vault Next Personas</text:span><text:tab/><text:span text:style-name="Hyperlink">1</text:span></text:a></text:p>
          <text:p text:style-name="P80"><text:a xlink:href="#_Toc1009240234" office:target-frame-name="_top" xlink:show="replace"><text:span text:style-name="Hyperlink">Principles</text:span><text:tab/><text:span text:style-name="Hyperlink">2</text:span></text:a></text:p>
          <text:p text:style-name="P81"><text:a xlink:href="#_Toc1969137583" office:target-frame-name="_top" xlink:show="replace"><text:span text:style-name="Hyperlink">New structure</text:span><text:tab/><text:span text:style-name="Hyperlink">3</text:span></text:a></text:p>
          <text:p text:style-name="P82"><text:a xlink:href="#_Toc1505095067" office:target-frame-name="_top" xlink:show="replace"><text:span text:style-name="Hyperlink">Navigation</text:span><text:tab/><text:span text:style-name="Hyperlink">4</text:span></text:a></text:p>
          <text:p text:style-name="P83"><text:a xlink:href="#_Toc1257905002" office:target-frame-name="_top" xlink:show="replace"><text:span text:style-name="Hyperlink">Key concepts</text:span><text:tab/><text:span text:style-name="Hyperlink">5</text:span></text:a></text:p>
          <text:p text:style-name="P84"><text:a xlink:href="#_Toc516763593" office:target-frame-name="_top" xlink:show="replace"><text:span text:style-name="Hyperlink">Secrets</text:span><text:tab/><text:span text:style-name="Hyperlink">5</text:span></text:a></text:p>
          <text:p text:style-name="P85"><text:a xlink:href="#_Toc418707003" office:target-frame-name="_top" xlink:show="replace"><text:span text:style-name="Hyperlink">Secret Store</text:span><text:tab/><text:span text:style-name="Hyperlink">5</text:span></text:a></text:p>
          <text:p text:style-name="P86"><text:a xlink:href="#_Toc661015232" office:target-frame-name="_top" xlink:show="replace"><text:span text:style-name="Hyperlink">Secret Types</text:span><text:tab/><text:span text:style-name="Hyperlink">6</text:span></text:a></text:p>
          <text:p text:style-name="P87"><text:a xlink:href="#_Toc1236272452" office:target-frame-name="_top" xlink:show="replace"><text:span text:style-name="Hyperlink">Secret Version</text:span><text:tab/><text:span text:style-name="Hyperlink">6</text:span></text:a></text:p>
          <text:p text:style-name="P88"><text:a xlink:href="#_Toc339916086" office:target-frame-name="_top" xlink:show="replace"><text:span text:style-name="Hyperlink">Platform Engineer Experience</text:span><text:tab/><text:span text:style-name="Hyperlink">8</text:span></text:a></text:p>
          <text:p text:style-name="P89"><text:a xlink:href="#_Toc430686979" office:target-frame-name="_top" xlink:show="replace"><text:span text:style-name="Hyperlink">Setting up Vault</text:span><text:tab/><text:span text:style-name="Hyperlink">8</text:span></text:a></text:p>
          <text:p text:style-name="P90"><text:a xlink:href="#_Toc386723368" office:target-frame-name="_top" xlink:show="replace"><text:span text:style-name="Hyperlink">App Developer Experience</text:span><text:tab/><text:span text:style-name="Hyperlink">12</text:span></text:a></text:p>
          <text:p text:style-name="P91"><text:a xlink:href="#_Toc1099517352" office:target-frame-name="_top" xlink:show="replace"><text:span text:style-name="Hyperlink">Differentiators</text:span><text:tab/><text:span text:style-name="Hyperlink">13</text:span></text:a></text:p>
          <text:p text:style-name="P92"><text:a xlink:href="#_Toc887278729" office:target-frame-name="_top" xlink:show="replace"><text:span text:style-name="Hyperlink">Agentic</text:span><text:tab/><text:span text:style-name="Hyperlink">13</text:span></text:a></text:p>
          <text:p text:style-name="P93"><text:a xlink:href="#_Toc1802133644" office:target-frame-name="_top" xlink:show="replace"><text:span text:style-name="Hyperlink">Authenticate and authorize agents in real-time (Oauth)</text:span><text:tab/><text:span text:style-name="Hyperlink">13</text:span></text:a></text:p>
          <text:p text:style-name="P94"><text:a xlink:href="#_Toc1567203074" office:target-frame-name="_top" xlink:show="replace"><text:span text:style-name="Hyperlink">Audit agent activity</text:span><text:tab/><text:span text:style-name="Hyperlink">13</text:span></text:a></text:p>
          <text:p text:style-name="P95"><text:a xlink:href="#_Toc2117270213" office:target-frame-name="_top" xlink:show="replace"><text:span text:style-name="Hyperlink">Secrets management</text:span><text:tab/><text:span text:style-name="Hyperlink">13</text:span></text:a></text:p>
          <text:p text:style-name="P96"><text:a xlink:href="#_Toc418155131" office:target-frame-name="_top" xlink:show="replace"><text:span text:style-name="Hyperlink">Use strongly-typed secrets with validators</text:span><text:tab/><text:span text:style-name="Hyperlink">13</text:span></text:a></text:p>
          <text:p text:style-name="P97"><text:a xlink:href="#_Toc1101521599" office:target-frame-name="_top" xlink:show="replace"><text:span text:style-name="Hyperlink">View secret lifecycle metadata</text:span><text:tab/><text:span text:style-name="Hyperlink">13</text:span></text:a></text:p>
          <text:p text:style-name="P98"><text:a xlink:href="#_Toc1280718419" office:target-frame-name="_top" xlink:show="replace"><text:span text:style-name="Hyperlink">Pre-Canned Reports or Query Endpoints (numSecrets per scope, etc.)</text:span><text:tab/><text:span text:style-name="Hyperlink">14</text:span></text:a></text:p>
          <text:p text:style-name="P99"><text:a xlink:href="#_Toc982604032" office:target-frame-name="_top" xlink:show="replace"><text:span text:style-name="Hyperlink">Rotated Secrets (inside vault)</text:span><text:tab/><text:span text:style-name="Hyperlink">14</text:span></text:a></text:p>
          <text:p text:style-name="P100"><text:a xlink:href="#_Toc1404214657" office:target-frame-name="_top" xlink:show="replace"><text:span text:style-name="Hyperlink">PQC/Crypto Agility</text:span><text:tab/><text:span text:style-name="Hyperlink">14</text:span></text:a></text:p>
          <text:p text:style-name="P101"><text:a xlink:href="#_Toc1086790924" office:target-frame-name="_top" xlink:show="replace"><text:span text:style-name="Hyperlink">Translate or Migrate key algorithms across key versions</text:span><text:tab/><text:span text:style-name="Hyperlink">14</text:span></text:a></text:p>
          <text:p text:style-name="P102"><text:a xlink:href="#_Toc1508805899" office:target-frame-name="_top" xlink:show="replace"><text:span text:style-name="Hyperlink">Rotate to PQC algorithm (ML-KEM)</text:span><text:tab/><text:span text:style-name="Hyperlink">14</text:span></text:a></text:p>
          <text:p text:style-name="P103"><text:a xlink:href="#_Toc331061558" office:target-frame-name="_top" xlink:show="replace"><text:span text:style-name="Hyperlink">Use stable Key Resource ID</text:span><text:tab/><text:span text:style-name="Hyperlink">14</text:span></text:a></text:p>
          <text:p text:style-name="P104"><text:a xlink:href="#_Toc2079483858" office:target-frame-name="_top" xlink:show="replace"><text:span text:style-name="Hyperlink">Platform operations</text:span><text:tab/><text:span text:style-name="Hyperlink">14</text:span></text:a></text:p>
          <text:p text:style-name="P105"><text:a xlink:href="#_Toc397694579" office:target-frame-name="_top" xlink:show="replace"><text:span text:style-name="Hyperlink">Deploy Vault Next via infrastructure-as-code</text:span><text:tab/><text:span text:style-name="Hyperlink">14</text:span></text:a></text:p>
          <text:p text:style-name="P106"><text:a xlink:href="#_Toc827963814" office:target-frame-name="_top" xlink:show="replace"><text:span text:style-name="Hyperlink">Configure integrations with identity providers</text:span><text:tab/><text:span text:style-name="Hyperlink">15</text:span></text:a></text:p>
          <text:p text:style-name="P107"><text:a xlink:href="#_Toc1282893238" office:target-frame-name="_top" xlink:show="replace"><text:span text:style-name="Hyperlink">Send audit logs to disk for administrative operations</text:span><text:tab/><text:span text:style-name="Hyperlink">15</text:span></text:a></text:p>
          <text:p text:style-name="P108"><text:a xlink:href="#_Toc603262652" office:target-frame-name="_top" xlink:show="replace"><text:span text:style-name="Hyperlink">Authenticate bare-metal workloads using platform-native auth methods</text:span><text:tab/><text:span text:style-name="Hyperlink">15</text:span></text:a></text:p>
          <text:p text:style-name="P109"><text:a xlink:href="#_Toc1475142208" office:target-frame-name="_top" xlink:show="replace"><text:span text:style-name="Hyperlink">References</text:span><text:tab/><text:span text:style-name="Hyperlink">15</text:span></text:a></text:p>
          <text:p text:style-name="P110"><text:a xlink:href="#_Toc673293742" office:target-frame-name="_top" xlink:show="replace"><text:span text:style-name="Hyperlink">Approvers</text:span><text:tab/><text:span text:style-name="Hyperlink">15</text:span></text:a></text:p>
        </text:index-body>
      </text:table-of-content>
      <text:p text:style-name="Normal"/>
      <text:p text:style-name="P111"/>
      <text:h text:style-name="Heading2" text:outline-level="2"><text:bookmark-start text:name="_Toc360672756"/>Background<text:bookmark-end text:name="_Toc360672756"/></text:h>
      <text:p text:style-name="Normal">Vault Next reimagines Vault’s workflows with a relational database at its core and a strongly-typed resource model. It adopts the shared runtime and solves long-standing customer challenges, pain points, and needs that have been difficult or impossible to deliver with Vault’s current architecture.<text:s/></text:p>
      <text:p text:style-name="Normal">Vault Next will bring:</text:p>
      <text:list text:style-name="LFO10" text:continue-numbering="true">
        <text:list-item>
          <text:p text:style-name="P112">A new approach to organizing and managing <text:s/>secrets, certificates, encryption keys, and identities.</text:p>
        </text:list-item>
        <text:list-item>
          <text:p text:style-name="P113">A scalable deployment model built on tried and tested database and application infrastructure technologies.</text:p>
        </text:list-item>
        <text:list-item>
          <text:p text:style-name="P114">Native auditing, reporting, and observability.</text:p>
        </text:list-item>
      </text:list>
      <text:p text:style-name="Normal">The<text:s/>Calistoga:<text:s/><text:a xlink:href="https://docs.google.com/document/d/1nFxphVsjdsXRCvuiigaUZfQR76_s9dshfsQnutYl9PM/edit?tab=t.0" office:target-frame-name="_top" xlink:show="replace"><text:span text:style-name="Hyperlink">Vault Next Meta-PRD</text:span></text:a><text:s/>includes<text:s/>the full<text:s/>details.</text:p>
      <text:h text:style-name="Heading3" text:outline-level="3"/>
      <text:h text:style-name="Heading3" text:outline-level="3"><text:bookmark-start text:name="_Toc1566171963"/>Vault Next Personas<text:bookmark-end text:name="_Toc1566171963"/></text:h>
      <text:p text:style-name="Normal">The<text:s/><text:a xlink:href="https://docs.google.com/presentation/u/0/d/1lOM2UawwYGa3EHer19GOSEIuqCUX_2EL-qlPTVlcusc/edit" office:target-frame-name="_top" xlink:show="replace"><text:span text:style-name="Hyperlink">research</text:span></text:a><text:s/>shows that Vault usage tends to start with infrastructure or platform teams who manage the<text:s/>implementation and<text:s/>then expands to development teams who are the primary consumers of secrets.</text:p>
      <text:p text:style-name="Normal"/>
      <table:table table:style-name="Table115">
        <table:table-columns>
          <table:table-column table:style-name="TableColumn116"/>
          <table:table-column table:style-name="TableColumn117"/>
        </table:table-columns>
        <table:table-row table:style-name="TableRow118">
          <table:table-cell table:style-name="TableCell119">
            <text:p text:style-name="P120">Persona</text:p>
          </table:table-cell>
          <table:table-cell table:style-name="TableCell121">
            <text:p text:style-name="P122">Tasks</text:p>
          </table:table-cell>
        </table:table-row>
        <table:table-row table:style-name="TableRow123">
          <table:table-cell table:style-name="TableCell124">
            <text:p text:style-name="P125">Platform Engineer</text:p>
            <text:p text:style-name="P126"/>
          </table:table-cell>
          <table:table-cell table:style-name="TableCell127">
            <text:list text:style-name="LFO9" text:continue-numbering="true">
              <text:list-item>
                <text:p text:style-name="P128">Often the primary administrators of Vault</text:p>
              </text:list-item>
              <text:list-item>
                <text:p text:style-name="P129">Responsible for installation, configuration, and maintenance</text:p>
              </text:list-item>
              <text:list-item>
                <text:p text:style-name="P130">Set up policies, authentication methods, and secret engines</text:p>
              </text:list-item>
              <text:list-item>
                <text:p text:style-name="P131">Serve as the centralized team that manages the Vault service</text:p>
              </text:list-item>
              <text:list-item>
                <text:p text:style-name="P132">May manage Vault as code (via Terraform)</text:p>
              </text:list-item>
            </text:list>
            <text:p text:style-name="P133"/>
          </table:table-cell>
        </table:table-row>
        <table:table-row table:style-name="TableRow134">
          <table:table-cell table:style-name="TableCell135">
            <text:p text:style-name="P136">System Security Engineer</text:p>
            <text:p text:style-name="P137"/>
          </table:table-cell>
          <table:table-cell table:style-name="TableCell138">
            <text:list text:style-name="LFO7" text:continue-numbering="true">
              <text:list-item>
                <text:p text:style-name="P139">Often collaborate with platform teams or take ownership of Vault</text:p>
              </text:list-item>
              <text:list-item>
                <text:p text:style-name="P140">Define security policies and governance models</text:p>
              </text:list-item>
              <text:list-item>
                <text:p text:style-name="P141">Oversee compliance and audit requirements</text:p>
              </text:list-item>
              <text:list-item>
                <text:p text:style-name="P142">Sometimes initiate Vault adoption after security incident</text:p>
              </text:list-item>
            </text:list>
          </table:table-cell>
        </table:table-row>
        <table:table-row table:style-name="TableRow143">
          <table:table-cell table:style-name="TableCell144">
            <text:p text:style-name="P145">App developer</text:p>
            <text:p text:style-name="P146"/>
          </table:table-cell>
          <table:table-cell table:style-name="TableCell147">
            <text:list text:style-name="LFO8" text:continue-numbering="true">
              <text:list-item>
                <text:p text:style-name="P148">Consume secrets in their applications</text:p>
              </text:list-item>
              <text:list-item>
                <text:p text:style-name="P149">May have limited direct access to Vault (often via APIs rather than UI)</text:p>
              </text:list-item>
              <text:list-item>
                <text:p text:style-name="P150">Sometimes initiate Vault adoption at grassroots level before security teams get involved</text:p>
              </text:list-item>
            </text:list>
            <text:p text:style-name="P151"/>
          </table:table-cell>
        </table:table-row>
      </table:table>
      <text:p text:style-name="Normal"/>
      <text:p text:style-name="Normal"/>
      <text:p text:style-name="Normal"/>
      <text:p text:style-name="P152"/>
      <text:h text:style-name="P153" text:outline-level="3"><text:bookmark-start text:name="_Toc1009240234"/>Principles<text:bookmark-end text:name="_Toc1009240234"/></text:h>
      <text:p text:style-name="Normal">Our mission is to evolve Vault from a powerful tool into a seamless, opinionated partner for both platform engineers and developers. By reimagining the New Domain Model, we are stripping away complexity to ensure that Vault Next is simple and intuitive—accessible across the CLI, API, and UI without the need for extensive documentation. Beyond ease of use, we are reinforcing our commitment to a secure and reliable infrastructure; one that proactively guides users through mitigation, remains resilient against failures, and provides absolute transparency in billing and data.</text:p>
      <text:p text:style-name="P154">Opinionated</text:p>
      <text:p text:style-name="Normal"><text:span text:style-name="T155">Moving beyond "it's possible" to "here is the best way to do it," from access control to domain modeling.<text:s/></text:span>Offer guidance to users on how to setup and use Vault. From the New Domain Model to Access Control, Vault should support different user needs, while providing direction on how best to achieve them.</text:p>
      <text:p text:style-name="P156">Simple and intuitive</text:p>
      <text:p text:style-name="Normal"><text:span text:style-name="T157">Reducing the "time-to-value" so<text:s/></text:span><text:span text:style-name="T158">Platform Admins and App<text:s/></text:span><text:span text:style-name="T159">developers can find what they need, exactly when they need it.<text:s/></text:span>Easy and simple to use<text:s/>-<text:s/><text:s/>whether through the CLI, API and UI. Vault<text:s/>Next<text:s/>is so simple that Platform Engs and App developers won’t need to read lots of documents before and while using Vault. They will find what they<text:s/>need<text:s/>when they need it.</text:p>
      <text:p text:style-name="P160">Secure</text:p>
      <text:p text:style-name="Normal"><text:span text:style-name="T161">Shifting from silent security to active communication, offering clear impact analysis and mitigation steps.</text:span><text:s/>As a security management solution, the user should feel safe while using Vault. If<text:s/>there is any<text:s/>problem, Vault will notify the user, explain the problem and its impact, and provide guidance on how to mitigate the problem.</text:p>
      <text:p text:style-name="P162">Reliable</text:p>
      <text:p text:style-name="Normal"><text:span text:style-name="T163">Ensuring effortless upgrades, high fault tolerance, and absolute clarity in billing and data availability.<text:s/></text:span>Vault Next is easy to upgrade and can maintain its functionality and performance even in the presence of faults or failures.<text:s/>Billing<text:s/>information is<text:s/>clear,<text:s/>and data is available and reliable.</text:p>
      <text:p text:style-name="Normal"/>
      <text:h text:style-name="Heading2" text:outline-level="2"><text:bookmark-start text:name="_Toc1969137583"/>New structure<text:bookmark-end text:name="_Toc1969137583"/><text:s/></text:h>
      <text:p text:style-name="Normal">Compared to Vault current, Vault<text:s/>Next introduces new levels of scope to the user. The new scopes are:</text:p>
      <text:list text:style-name="LFO5" text:continue-numbering="true">
        <text:list-item>
          <text:p text:style-name="P164">Global</text:p>
        </text:list-item>
        <text:list-item>
          <text:p text:style-name="P165">Organizations<text:s/></text:p>
        </text:list-item>
        <text:list-item>
          <text:p text:style-name="P166">Projects<text:s/></text:p>
        </text:list-item>
      </text:list>
      <text:p text:style-name="Normal">These levels are inherited<text:s/>from<text:s/>Boundary and will replace the notion of “Namespaces” from Vault<text:s/>current.<text:s/>It will allow users to better represent their organization and better set boundaries.<text:s/></text:p>
      <text:p text:style-name="Normal">The assumption is that Platform Admins will concentrate<text:s/>on<text:s/>the Scope, Admin and Store levels.<text:s/>In addition, everything related to Vault Administration - as a platform – should be grouped in the Admin area. For example: Access Control, Report, Cost and Settings.</text:p>
      <text:p text:style-name="Normal">While the App Developer will concentrate on the Secrets,<text:s/>Certificates,<text:s/>and Cryptography objects.</text:p>
      <text:p text:style-name="P167"><draw:frame draw:style-name="a0" draw:name="drawing" text:anchor-type="as-char" svg:x="0in" svg:y="0in" svg:width="6.5in" svg:height="2.63542in" style:rel-width="scale" style:rel-height="scale"><draw:image xlink:href="media/image1.png" xlink:type="simple" xlink:show="embed" xlink:actuate="onLoad"/><svg:title/><svg:desc/></draw:frame><text:span text:style-name="T168">This image is a representation of the new structure, but it is not final, and it is under<text:s/></text:span><text:span text:style-name="T169">discovery.</text:span></text:p>
      <text:p text:style-name="P170"/>
      <text:h text:style-name="Heading2" text:outline-level="2"><text:bookmark-start text:name="_Toc1505095067"/>Navigation<text:bookmark-end text:name="_Toc1505095067"/></text:h>
      <text:p text:style-name="Normal">The new navigation allows the user to quickly navigate<text:s/>many levels of<text:s/>scope<text:s/>to<text:s/>other -<text:s/>a common pain point in Vault<text:s/>current.</text:p>
      <text:p text:style-name="Normal">For example, the user will be able to see all the secrets that belong to a “Global” level.</text:p>
      <text:p text:style-name="P171"><draw:frame draw:style-name="a1" draw:name="drawing" text:anchor-type="as-char" svg:x="0in" svg:y="0in" svg:width="6.5in" svg:height="5.69792in" style:rel-width="scale" style:rel-height="scale"><draw:image xlink:href="media/image2.png" xlink:type="simple" xlink:show="embed" xlink:actuate="onLoad"/><svg:title/><svg:desc/></draw:frame><text:span text:style-name="T172">This image is a representation of the new navigation, but it is not final, and it is under discovery.</text:span></text:p>
      <text:p text:style-name="Normal"/>
      <text:h text:style-name="Heading2" text:outline-level="2"><text:bookmark-start text:name="_Toc1257905002"/>Key concepts<text:bookmark-end text:name="_Toc1257905002"/></text:h>
      <text:h text:style-name="Heading3" text:outline-level="3"><text:bookmark-start text:name="_Toc516763593"/>Secrets<text:bookmark-end text:name="_Toc516763593"/></text:h>
      <text:p text:style-name="Normal"><text:span text:style-name="T173">For more information, please<text:s/></text:span><text:span text:style-name="T174">refer</text:span><text:span text:style-name="T175"><text:s/>to<text:s/></text:span><text:a xlink:href="https://docs.google.com/document/d/1nYXBRnKf_EVFl1uP-TUBvbp_9a8nqOHdQ0T7FGl5tO8/edit?tab=t.0" office:target-frame-name="_top" xlink:show="replace"><text:span text:style-name="T176">Vault Next: Static Secret Types</text:span></text:a><text:span text:style-name="T177"><text:s/>and<text:s/></text:span><text:a xlink:href="https://docs.google.com/document/d/1u7WcgRPPkxWBU-Mv1aBMdRLhZi6P1jIw4QWxk-BgqKM/edit?tab=t.0" office:target-frame-name="_top" xlink:show="replace"><text:span text:style-name="T178">Vault Next: Static Secret Store)</text:span></text:a></text:p>
      <text:p text:style-name="Normal">A Secret is a strongly typed resource in Vault Next, designed to be a collection of fields that adheres to a set of standard rules for management and access control.</text:p>
      <text:h text:style-name="Heading5" text:outline-level="5"><text:bookmark-start text:name="_Toc418707003"/>Secret Store<text:bookmark-end text:name="_Toc418707003"/></text:h>
      <text:p text:style-name="Normal">A Secret Store is a key domain object for organizing and managing secrets, acting as a container and a security boundary.</text:p>
      <text:list text:style-name="LFO2" text:continue-numbering="true">
        <text:list-item>
          <text:p text:style-name="P179"><text:span text:style-name="T180">Organization and Ownership:<text:s/></text:span>A Secret Store is the domain object under which all Secrets are stored. It is owned by one and only one scope, which must be either an organization or a project.</text:p>
        </text:list-item>
        <text:list-item>
          <text:p text:style-name="P181"><text:span text:style-name="T182">Resource Boundary:<text:s/></text:span>It is an RBAC boundary. Access control can be granted at the Store level, with everything inside inheriting those rules.</text:p>
        </text:list-item>
        <text:list-item>
          <text:p text:style-name="P183"><text:span text:style-name="T184">Lifecycle:</text:span><text:s/>The life of a secret is tied to the life of the Secret Store it is contained in, meaning all Secrets within it are deleted when the Secret Store is<text:s/>deleted,<text:s/>and the soft delete grace period has elapsed. A Secret Store must be deleted before the containing scope can be deleted.</text:p>
        </text:list-item>
        <text:list-item>
          <text:p text:style-name="P185"><text:span text:style-name="T186">Capacity:</text:span><text:s/>It has no limit on the number of Secrets that can be stored.</text:p>
        </text:list-item>
      </text:list>
      <text:h text:style-name="Heading5" text:outline-level="5"><text:bookmark-start text:name="_Toc661015232"/>Secret Types<text:bookmark-end text:name="_Toc661015232"/></text:h>
      <text:p text:style-name="Normal">In Vault Next, secrets are typed resources to allow for specific policies and workflows, defining the data format and structure.</text:p>
      <text:p text:style-name="P187">Abstract/Base Secret Type</text:p>
      <text:list text:style-name="LFO1" text:continue-numbering="true">
        <text:list-item>
          <text:p text:style-name="P188">Abstract Secret: Represents shared behavior among all secrets and has a Postgres base table and Go interface.1</text:p>
        </text:list-item>
      </text:list>
      <text:p text:style-name="P189">Concrete Secret Types</text:p>
      <text:list text:style-name="LFO3" text:continue-numbering="true">
        <text:list-item>
          <text:p text:style-name="P190">Login Credential Secret: Represents a set of values used to log in to a website or service.</text:p>
        </text:list-item>
        <text:list-item>
          <text:p text:style-name="P191">AWS IAM Access Key: Represents the fields required to log in to an AWS account.</text:p>
        </text:list-item>
        <text:list-item>
          <text:p text:style-name="P192">Postgres Password Credential Secret: Represents a set of values required for username/password authentication with a Postgres database instance.</text:p>
        </text:list-item>
        <text:list-item>
          <text:p text:style-name="P193">Postgres Certificate Credential Secret: Represents a set of values required for mTLS (Mutual TLS) authentication with a Postgres database instance.</text:p>
        </text:list-item>
        <text:list-item>
          <text:p text:style-name="P194">JSON: Arbitrary data formatted as a JSON object, with the only introspection provided being JSON validation.</text:p>
        </text:list-item>
      </text:list>
      <text:h text:style-name="Heading5" text:outline-level="5"><text:bookmark-start text:name="_Toc1236272452"/>Secret Version<text:bookmark-end text:name="_Toc1236272452"/></text:h>
      <text:p text:style-name="Normal">A Secret Version follows a lifecycle strategy that includes different states, primarily supporting graceful credential rotation. The state of a secret version indicates its role in this lifecycle:</text:p>
      <text:list text:style-name="LFO4" text:continue-numbering="true">
        <text:list-item>
          <text:p text:style-name="P195">Primary: The default version that consumers receive. Only one primary version may exist per secret at any time.</text:p>
        </text:list-item>
        <text:list-item>
          <text:p text:style-name="P196">Staged: A version being prepared for cutover. Its credentials may be usable simultaneously with the primary version during a rotation window.</text:p>
        </text:list-item>
        <text:list-item>
          <text:p text:style-name="P197">Active: The version is currently active and valid.</text:p>
        </text:list-item>
        <text:list-item>
          <text:p text:style-name="P198">Inactive: A retired version kept for audit or history.</text:p>
        </text:list-item>
      </text:list>
      <text:p text:style-name="Normal"/>
      <text:p text:style-name="Normal"/>
      <text:p text:style-name="Normal"/>
      <text:p text:style-name="P199"/>
      <text:p text:style-name="Normal"/>
      <text:h text:style-name="Heading2" text:outline-level="2"><text:bookmark-start text:name="_Toc339916086"/>Platform Engineer Experience<text:bookmark-end text:name="_Toc339916086"/><text:s/></text:h>
      <text:h text:style-name="Heading3" text:outline-level="3"><text:bookmark-start text:name="_Toc430686979"/>Setting up Vault<text:bookmark-end text:name="_Toc430686979"/></text:h>
      <text:p text:style-name="Normal"><text:span text:style-name="T200">JTBD: When setting up Vault, I want to quickly define my organization structure and authentication methods, so that app developers can access the secrets, certificates and keys</text:span></text:p>
      <text:p text:style-name="P201"/>
      <text:p text:style-name="P202"/>
      <text:p text:style-name="Normal"/>
      <text:p text:style-name="Normal">CUJ: As a platform<text:s/>engineer,<text:s/>I need to set up Vault, so that I can ensure compliance and protection of sensitive data within my organization</text:p>
      <text:p text:style-name="Normal"><draw:frame draw:style-name="a2" draw:name="drawing" text:anchor-type="as-char" svg:x="0in" svg:y="0in" svg:width="6.5in" svg:height="6.29167in" style:rel-width="scale" style:rel-height="scale"><draw:image xlink:href="media/image3.png" xlink:type="simple" xlink:show="embed" xlink:actuate="onLoad"/><svg:title/><svg:desc/></draw:frame></text:p>
      <text:p text:style-name="Normal">CUJ: As a platform<text:s/>engineer,<text:s/>I need to define my organization connections, stores, root certificates<text:s/>and secrets so that my teams can securely access and manage secrets, keys, and certificates</text:p>
      <text:p text:style-name="Normal"/>
      <text:p text:style-name="Normal"/>
      <text:p text:style-name="Normal">CUJ: As a platform<text:s/>engineer,<text:s/>I need to define my organization connections, stores and secrets so that my teams can securely access and manage secrets, keys, and certificates</text:p>
      <text:p text:style-name="Normal"/>
      <text:p text:style-name="Normal"><draw:frame draw:style-name="a3" draw:name="drawing" text:anchor-type="as-char" svg:x="0in" svg:y="0in" svg:width="6.5in" svg:height="4.52083in" style:rel-width="scale" style:rel-height="scale"><draw:image xlink:href="media/image4.png" xlink:type="simple" xlink:show="embed" xlink:actuate="onLoad"/><svg:title/><svg:desc/></draw:frame></text:p>
      <text:p text:style-name="Normal"/>
      <text:p text:style-name="Normal">CUJ: As a platform<text:s/>engineer,<text:s/>I want to understand if I properly configured Vault, so that the organization is secure and app developers can access the secrets, certificate and keys</text:p>
      <text:p text:style-name="Normal"/>
      <text:p text:style-name="Normal"/>
      <text:p text:style-name="P203">How might we give Platform engs the information they need when they need it, so they can make sure their organization security posture has not been compromised?</text:p>
      <text:p text:style-name="Normal"/>
      <text:p text:style-name="Normal">CUJ: As a platform<text:s/>engineer,<text:s/>I need to quickly understand how Vault has been used so that my organization is secure and we are best leveraging Vault</text:p>
      <text:p text:style-name="Normal">CUJ: As a platform<text:s/>engineer,<text:s/>I need to quickly understand how Vault has been used so that my organization is secure and we are best leveraging Vault</text:p>
      <text:p text:style-name="Normal">CUJ: As a platform<text:s/>engineer,<text:s/>I need to access logs in Vault so that I can identify how Vault has been used and if I should make updates</text:p>
      <text:p text:style-name="Normal"/>
      <text:p text:style-name="P204">How might we support Platform engs to manage the right org structure and access level within Vault so app developers can access what they need?</text:p>
      <text:p text:style-name="Normal">CUJ: As a platform engineer, I need to manage the projects so that I can address any problem it may exist and unblock app developers to do their work</text:p>
      <text:p text:style-name="Normal">CUJ: As a platform<text:s/>engineer,<text:s/>I need to define projects so that app developers can access the secrets according to the projects they have access</text:p>
      <text:p text:style-name="Normal">CUJ: As a platform engineer, I need to configure connectors and stores so that my teams can securely access and manage secrets, keys, and certificates</text:p>
      <text:p text:style-name="Normal">CUJ: As a platform<text:s/>engineer,<text:s/>I need to define/manage secrets so that app developers can securely access secrets</text:p>
      <text:p text:style-name="Normal">CUJ: As a platform<text:s/>engineer,<text:s/>I need to secrets details so that I can fix problems related to it</text:p>
      <text:p text:style-name="Normal">CUJ: As a platform<text:s/>engineer,<text:s/>I need to quickly understand Vault connections, so that I can troubleshoot any problem with secrets, certificates and keys</text:p>
      <text:p text:style-name="Normal">CUJ: As a platform<text:s/>engineer,<text:s/>I need to easily create policies so that I can control who has access to what</text:p>
      <text:p text:style-name="Normal"/>
      <text:p text:style-name="Normal"/>
      <text:p text:style-name="Normal"/>
      <text:p text:style-name="Normal"/>
      <text:p text:style-name="Normal"/>
      <text:h text:style-name="Heading2" text:outline-level="2"><text:bookmark-start text:name="_Toc386723368"/>App Developer Experience<text:bookmark-end text:name="_Toc386723368"/></text:h>
      <text:p text:style-name="Normal"/>
      <text:p text:style-name="P205">How might we support App Developers to quickly onboard on Vault so they can securely build apps?</text:p>
      <text:p text:style-name="Normal">CUJ: As an app developer, I need to access/create secrets, certificates and keys so that I can build my application</text:p>
      <text:p text:style-name="Normal">How might we support App developers to quickly access secrets so they can concentrate in building the app?</text:p>
      <text:p text:style-name="Normal">CUJ: As an app developer, I need to create secrets so that I can build my application</text:p>
      <text:p text:style-name="Normal">CUJ: As an app developer, I need to access secrets so that I can build my application</text:p>
      <text:p text:style-name="Normal">CUJ: As an app developer, I need to access secrets so that I can build my application</text:p>
      <text:p text:style-name="Normal"/>
      <text:h text:style-name="Heading2" text:outline-level="2"><text:bookmark-start text:name="_Toc1099517352"/>Differentiators<text:bookmark-end text:name="_Toc1099517352"/></text:h>
      <text:h text:style-name="Heading3" text:outline-level="3"><text:bookmark-start text:name="_Toc887278729"/>Agentic<text:bookmark-end text:name="_Toc887278729"/></text:h>
      <text:p text:style-name="Normal">Register agents with identity metadata and granular policies</text:p>
      <text:p text:style-name="Normal">As a Platform Admin, I want to register agents by defining their identity metadata and configuring granular access policies to achieve a baseline of least-privileged execution. AI agents are proliferating but lack standardized identity controls. Without bound identities, a compromised agent can move laterally or escalate privileges.</text:p>
      <text:p text:style-name="Normal"/>
      <text:h text:style-name="Heading3" text:outline-level="3"><text:bookmark-start text:name="_Toc1802133644"/>Authenticate and authorize agents in real-time (Oauth)<text:bookmark-end text:name="_Toc1802133644"/></text:h>
      <text:p text:style-name="Normal">As a Security Engineer, I want Vault to authenticate and authorize agents in real-time to achieve strict enforcement where an agent performs its transaction only within its allowed scope. Agents operate autonomously and can execute thousands of operations per minute — real-time enforcement is essential.</text:p>
      <text:p text:style-name="Normal"/>
      <text:h text:style-name="Heading3" text:outline-level="3"><text:bookmark-start text:name="_Toc1567203074"/>Audit agent activity<text:bookmark-end text:name="_Toc1567203074"/></text:h>
      <text:p text:style-name="Normal">As a Compliance Officer, I want to audit agent activity to achieve a verified record of what an agent was able to do and confirm it remained restricted to its defined boundaries. Regulators will ask 'what did your AI do?' — organizations need auditable answers.</text:p>
      <text:p text:style-name="Normal"/>
      <text:h text:style-name="Heading3" text:outline-level="3"><text:bookmark-start text:name="_Toc2117270213"/>Secrets management<text:bookmark-end text:name="_Toc2117270213"/></text:h>
      <text:h text:style-name="Heading4" text:outline-level="4"><text:bookmark-start text:name="_Toc418155131"/>Use strongly-typed secrets with validators<text:bookmark-end text:name="_Toc418155131"/></text:h>
      <text:p text:style-name="Normal">As a Platform Engineer, I want to use well-defined secret types with built-in validators to achieve automatic schema enforcement and ensure secret data is valid before stored. Untyped secrets lead to runtime failures, compliance gaps, and difficulty answering 'what do we have?'</text:p>
      <text:h text:style-name="Heading4" text:outline-level="4"><text:bookmark-start text:name="_Toc1101521599"/>View secret lifecycle metadata<text:bookmark-end text:name="_Toc1101521599"/></text:h>
      <text:p text:style-name="Normal">As an Auditor, I want to view a dashboard showing secret lifecycle metadata like 'who created' and 'last accessed' to achieve verified traceability of all secret modifications.</text:p>
      <text:p text:style-name="Normal"/>
      <text:h text:style-name="Heading3" text:outline-level="3"><text:bookmark-start text:name="_Toc1280718419"/>Pre-Canned Reports or Query Endpoints (numSecrets per scope, etc.)<text:bookmark-end text:name="_Toc1280718419"/><text:span text:style-name="T206"><office:annotation><dc:creator>Dino Pullat</dc:creator><dc:date>2026-05-12T08:38:00</dc:date><text:p text:style-name="Normal">Needs some detail here on the reporting/auditing capabilities?</text:p></office:annotation></text:span></text:h>
      <text:h text:style-name="Heading3" text:outline-level="3"><text:bookmark-start text:name="_Toc982604032"/>Rotated Secrets (inside vault)<text:bookmark-end text:name="_Toc982604032"/></text:h>
      <text:p text:style-name="Normal"/>
      <text:h text:style-name="Heading2" text:outline-level="2"><text:bookmark-start text:name="_Toc1404214657"/>PQC/Crypto Agility<text:bookmark-end text:name="_Toc1404214657"/></text:h>
      <text:h text:style-name="Heading3" text:outline-level="3"><text:bookmark-start text:name="_Toc1086790924"/>Translate or Migrate key algorithms across key versions<text:bookmark-end text:name="_Toc1086790924"/></text:h>
      <text:p text:style-name="Normal">As a Platform Engineer, I want to 'promote' new algorithms to a single logical key reference without breaking application code to achieve continuous security posture with zero uptime impact. Algorithm changes historically require code changes — decoupling logical key from algorithm enables agility.</text:p>
      <text:p text:style-name="Normal"/>
      <text:h text:style-name="Heading3" text:outline-level="3"><text:bookmark-start text:name="_Toc1508805899"/>Rotate to PQC algorithm (ML-KEM)<text:bookmark-end text:name="_Toc1508805899"/></text:h>
      <text:p text:style-name="Normal">As a Platform Engineer, I want to 'rotate' a logical key to a NIST-approved post-quantum algorithm (such as ML-KEM) to achieve proactive resilience against 'harvest now, decrypt later' attacks without requiring manual code changes. Quantum computers will break current encryption — data encrypted today is vulnerable to future decryption.</text:p>
      <text:p text:style-name="Normal"/>
      <text:h text:style-name="Heading3" text:outline-level="3"><text:bookmark-start text:name="_Toc331061558"/>Use stable Key Resource ID<text:bookmark-end text:name="_Toc331061558"/></text:h>
      <text:p text:style-name="Normal">As a Developer, I want to use a stable Key Resource ID to achieve seamless cryptographic agility without needing to update service configuration for every algorithm migration.</text:p>
      <text:p text:style-name="Normal"/>
      <text:h text:style-name="Heading2" text:outline-level="2"><text:bookmark-start text:name="_Toc2079483858"/>Platform operations<text:bookmark-end text:name="_Toc2079483858"/></text:h>
      <text:p text:style-name="Normal"/>
      <text:h text:style-name="Heading3" text:outline-level="3"><text:bookmark-start text:name="_Toc397694579"/>Deploy Vault Next via infrastructure-as-code<text:bookmark-end text:name="_Toc397694579"/></text:h>
      <text:p text:style-name="Normal"><text:span text:style-name="T207">As a Platform Engineer, I want to deploy Vault Next using infrastructure-as-code (Terraform, Helm) to achieve repeatable, auditable, and version-controlled deployments. Manual deployments are error-prone and non-auditable.</text:span></text:p>
      <text:p text:style-name="P208"/>
      <text:h text:style-name="Heading3" text:outline-level="3"><text:bookmark-start text:name="_Toc827963814"/>Configure integrations with identity providers<text:bookmark-end text:name="_Toc827963814"/></text:h>
      <text:p text:style-name="Normal"><text:span text:style-name="T209">As a Platform Engineer, I want to configure integrations with identity providers (OIDC, SAML, LDAP) to achieve single sign-on and federated identity for operators and applications.</text:span></text:p>
      <text:p text:style-name="P210"/>
      <text:h text:style-name="Heading3" text:outline-level="3"><text:bookmark-start text:name="_Toc1282893238"/>Send audit logs to disk for administrative operations<text:bookmark-end text:name="_Toc1282893238"/></text:h>
      <text:p text:style-name="Normal"><text:span text:style-name="T211">As a Compliance Officer, I want to view audit logs for all administrative operations to achieve accountability for configuration changes and access to sensitive operations.</text:span></text:p>
      <text:p text:style-name="P212"/>
      <text:h text:style-name="Heading3" text:outline-level="3"><text:bookmark-start text:name="_Toc603262652"/>Authenticate bare-metal workloads using platform-native auth methods<text:bookmark-end text:name="_Toc603262652"/><text:span text:style-name="T213"><office:annotation><dc:creator>Dino Pullat</dc:creator><dc:date>2026-05-12T09:18:00</dc:date><text:p text:style-name="Normal">We need to check how this is going to be supported, and assess the UI configuration needed for this.</text:p></office:annotation></text:span></text:h>
      <text:p text:style-name="Normal">As a Platform Engineer, I want to authenticate bare-metal workloads using platform-native auth methods (e.g., TPM, host-based attestation, machine identity certificates) to achieve secure, credential-free access for infrastructure that cannot leverage cloud-native identity providers. Bare-metal environments lack the metadata services and instance identity available in cloud platforms, creating an identity gap that forces teams to rely on long-lived static credentials.</text:p>
      <text:h text:style-name="Heading2" text:outline-level="2"><text:bookmark-start text:name="_Toc1475142208"/>References<text:bookmark-end text:name="_Toc1475142208"/></text:h>
      <text:h text:style-name="Heading2" text:outline-level="2"><text:bookmark-start text:name="_Toc673293742"/>Approvers<text:bookmark-end text:name="_Toc673293742"/></text:h>
      <text:p text:style-name="Normal">Collaborators:<text:s/>Dino</text:p>
      <text:p text:style-name="Normal">Design: Emily Leahy, Hans Kao, Gabi Viana</text:p>
      <text:p text:style-name="Normal">PM:<text:s/>Dino, Alex</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paragraph-properties fo:margin-bottom="0.0694in" fo:margin-left="0.3055in">
        <style:tab-stops/>
      </style:paragraph-properties>
      <style:text-properties fo:hyphenate="false"/>
    </style:style>
    <style:style style:name="TOC4" style:display-name="TOC 4" style:family="paragraph" style:parent-style-name="Normal" style:next-style-name="Normal">
      <style:paragraph-properties fo:margin-bottom="0.0694in" fo:margin-left="0.4583in">
        <style:tab-stops/>
      </style:paragraph-properties>
      <style:text-properties fo:hyphenate="false"/>
    </style:style>
    <style:style style:name="TOC5" style:display-name="TOC 5" style:family="paragraph" style:parent-style-name="Normal" style:next-style-name="Normal">
      <style:paragraph-properties fo:margin-bottom="0.0694in" fo:margin-left="0.6111in">
        <style:tab-stops/>
      </style:paragraph-properties>
      <style:text-properties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8" style:family="table-column">
      <style:table-column-properties style:column-width="2.1666in"/>
    </style:style>
    <style:style style:name="TableColumn9" style:family="table-column">
      <style:table-column-properties style:column-width="2.1666in"/>
    </style:style>
    <style:style style:name="TableColumn10" style:family="table-column">
      <style:table-column-properties style:column-width="2.1666in"/>
    </style:style>
    <style:style style:name="Table7" style:family="table">
      <style:table-properties style:width="6.5in" fo:margin-left="0in" table:align="left"/>
    </style:style>
    <style:style style:name="TableRow11" style:family="table-row">
      <style:table-row-properties style:min-row-height="0.2083in"/>
    </style:style>
    <style:style style:name="TableCell12" style:family="table-cell">
      <style:table-cell-properties fo:border="none" style:writing-mode="lr-tb" fo:padding-top="0in" fo:padding-left="0.075in" fo:padding-bottom="0in" fo:padding-right="0.075in"/>
    </style:style>
    <style:style style:name="P13"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4" style:family="table-cell">
      <style:table-cell-properties fo:border="none" style:writing-mode="lr-tb" fo:padding-top="0in" fo:padding-left="0.075in" fo:padding-bottom="0in" fo:padding-right="0.075in"/>
    </style:style>
    <style:style style:name="P15" style:parent-style-name="Header" style:family="paragraph">
      <style:paragraph-properties fo:text-align="center"/>
    </style:style>
    <style:style style:name="TableCell16" style:family="table-cell">
      <style:table-cell-properties fo:border="none" style:writing-mode="lr-tb" fo:padding-top="0in" fo:padding-left="0.075in" fo:padding-bottom="0in" fo:padding-right="0.075in"/>
    </style:style>
    <style:style style:name="P17" style:parent-style-name="Header" style:family="paragraph">
      <style:paragraph-properties fo:text-align="end" fo:margin-right="-0.0798in"/>
    </style:style>
    <style:style style:name="TableColumn19" style:family="table-column">
      <style:table-column-properties style:column-width="2.1666in"/>
    </style:style>
    <style:style style:name="TableColumn20" style:family="table-column">
      <style:table-column-properties style:column-width="2.1666in"/>
    </style:style>
    <style:style style:name="TableColumn21" style:family="table-column">
      <style:table-column-properties style:column-width="2.1666in"/>
    </style:style>
    <style:style style:name="Table18" style:family="table">
      <style:table-properties style:width="6.5in" fo:margin-left="0in" table:align="left"/>
    </style:style>
    <style:style style:name="TableRow22" style:family="table-row">
      <style:table-row-properties style:min-row-height="0.2083in"/>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5" style:family="table-cell">
      <style:table-cell-properties fo:border="none" style:writing-mode="lr-tb" fo:padding-top="0in" fo:padding-left="0.075in" fo:padding-bottom="0in" fo:padding-right="0.075in"/>
    </style:style>
    <style:style style:name="P26" style:parent-style-name="Header" style:family="paragraph">
      <style:paragraph-properties fo:text-align="center"/>
    </style:style>
    <style:style style:name="TableCell27" style:family="table-cell">
      <style:table-cell-properties fo:border="none" style:writing-mode="lr-tb" fo:padding-top="0in" fo:padding-left="0.075in" fo:padding-bottom="0in" fo:padding-right="0.075in"/>
    </style:style>
    <style:style style:name="P28" style:parent-style-name="Header" style:family="paragraph">
      <style:paragraph-properties fo:text-align="end"/>
    </style:style>
  </office:automatic-styles>
  <office:master-styles>
    <style:master-page style:name="MP0" style:page-layout-name="PL0">
      <style:header>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
            </table:table-cell>
            <table:table-cell table:style-name="TableCell14">
              <text:p text:style-name="P15"/>
            </table:table-cell>
            <table:table-cell table:style-name="TableCell16">
              <text:p text:style-name="P17"/>
            </table:table-cell>
          </table:table-row>
        </table:table>
        <text:p text:style-name="Header"/>
      </style:header>
      <style:footer>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
            </table:table-cell>
            <table:table-cell table:style-name="TableCell25">
              <text:p text:style-name="P26"/>
            </table:table-cell>
            <table:table-cell table:style-name="TableCell27">
              <text:p text:style-name="P28"/>
            </table:table-cell>
          </table:table-row>
        </table:tab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hua Ogle</meta:initial-creator>
    <dc:creator>Gabi Viana</dc:creator>
    <meta:creation-date>2026-05-19T21:17:00Z</meta:creation-date>
    <dc:date>2026-05-19T21:17:00Z</dc:date>
    <meta:template xlink:href="Normal.dotm" xlink:type="simple"/>
    <meta:editing-cycles>1</meta:editing-cycles>
    <meta:editing-duration>PT0S</meta:editing-duration>
    <meta:document-statistic meta:page-count="1" meta:paragraph-count="37" meta:word-count="2768" meta:character-count="18511" meta:row-count="131" meta:non-whitespace-character-count="15780"/>
  </office:meta>
</office:document-meta>
</file>