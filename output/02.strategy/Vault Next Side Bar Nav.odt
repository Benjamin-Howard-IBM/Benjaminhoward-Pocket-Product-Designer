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5" style:family="paragraph"/>
    <style:style style:name="P8" style:parent-style-name="ListParagraph" style:list-style-name="LFO5" style:family="paragraph"/>
    <style:style style:name="P9" style:parent-style-name="ListParagraph" style:list-style-name="LFO4" style:family="paragraph"/>
    <style:style style:name="P10" style:parent-style-name="ListParagraph" style:list-style-name="LFO4" style:family="paragraph"/>
    <style:style style:name="P11" style:parent-style-name="ListParagraph" style:list-style-name="LFO3" style:family="paragraph"/>
    <style:style style:name="P12" style:parent-style-name="ListParagraph" style:list-style-name="LFO3" style:family="paragraph"/>
    <style:style style:name="P13" style:parent-style-name="ListParagraph" style:list-style-name="LFO3" style:family="paragraph"/>
    <style:style style:name="P14" style:parent-style-name="ListParagraph" style:list-style-name="LFO3" style:family="paragraph"/>
    <style:style style:name="P15" style:parent-style-name="ListParagraph" style:list-style-name="LFO3" style:family="paragraph"/>
    <style:style style:name="P16" style:parent-style-name="ListParagraph" style:list-style-name="LFO3" style:family="paragraph"/>
    <style:style style:name="P17" style:parent-style-name="ListParagraph" style:list-style-name="LFO2" style:family="paragraph"/>
  </office:automatic-styles>
  <office:body>
    <office:text text:use-soft-page-breaks="true">
      <text:p text:style-name="P1">Vault Next Side Bar Nav</text:p>
      <text:p text:style-name="Normal">Top level sections</text:p>
      <text:list text:style-name="LFO1" text:continue-numbering="true">
        <text:list-item>
          <text:p text:style-name="P2">Secrets</text:p>
        </text:list-item>
        <text:list-item>
          <text:p text:style-name="P3">Cryptography</text:p>
        </text:list-item>
        <text:list-item>
          <text:p text:style-name="P4">Access control</text:p>
        </text:list-item>
        <text:list-item>
          <text:p text:style-name="P5">Manage scopes</text:p>
        </text:list-item>
        <text:list-item>
          <text:p text:style-name="P6">Support</text:p>
        </text:list-item>
      </text:list>
      <text:p text:style-name="Normal">Secrets</text:p>
      <text:list text:style-name="LFO5" text:continue-numbering="true">
        <text:list-item>
          <text:p text:style-name="P7">Secrets</text:p>
        </text:list-item>
        <text:list-item>
          <text:p text:style-name="P8">Secret Stores</text:p>
        </text:list-item>
      </text:list>
      <text:p text:style-name="Normal">Cryptography</text:p>
      <text:list text:style-name="LFO4" text:continue-numbering="true">
        <text:list-item>
          <text:p text:style-name="P9">Keys</text:p>
        </text:list-item>
        <text:list-item>
          <text:p text:style-name="P10">Key Stores</text:p>
        </text:list-item>
      </text:list>
      <text:p text:style-name="Normal">Access Control</text:p>
      <text:list text:style-name="LFO3" text:continue-numbering="true">
        <text:list-item>
          <text:p text:style-name="P11">Identities</text:p>
        </text:list-item>
        <text:list-item>
          <text:p text:style-name="P12">Groups</text:p>
        </text:list-item>
        <text:list-item>
          <text:p text:style-name="P13">Roles</text:p>
        </text:list-item>
        <text:list-item>
          <text:p text:style-name="P14">Grants</text:p>
        </text:list-item>
        <text:list-item>
          <text:p text:style-name="P15">Authentication methods</text:p>
        </text:list-item>
        <text:list-item>
          <text:p text:style-name="P16">Accounts</text:p>
        </text:list-item>
      </text:list>
      <text:p text:style-name="Normal">Mange Scopes</text:p>
      <text:p text:style-name="Normal">Support</text:p>
      <text:list text:style-name="LFO2" text:continue-numbering="true">
        <text:list-item>
          <text:p text:style-name="P17">Audit log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 Display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jamin Howard</meta:initial-creator>
    <dc:creator>Benjamin Howard</dc:creator>
    <meta:creation-date>2026-05-19T22:15:00Z</meta:creation-date>
    <dc:date>2026-05-19T22:15:00Z</dc:date>
    <meta:template xlink:href="Normal.dotm" xlink:type="simple"/>
    <meta:editing-cycles>1</meta:editing-cycles>
    <meta:editing-duration>PT0S</meta:editing-duration>
    <meta:document-statistic meta:page-count="1" meta:paragraph-count="1" meta:word-count="40" meta:character-count="269" meta:row-count="1" meta:non-whitespace-character-count="230"/>
  </office:meta>
</office:document-meta>
</file>